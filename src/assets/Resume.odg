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06400000064C10219C4.png" manifest:media-type="image/png"/>
  <manifest:file-entry manifest:full-path="Pictures/100000010000006400000064BC6DCE55.png" manifest:media-type="image/png"/>
  <manifest:file-entry manifest:full-path="Pictures/10000000000007C000000A5028CD7EB6.jpg" manifest:media-type="image/jpe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0.739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372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274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785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558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draw:fill="solid" draw:fill-color="#c6d3d7" draw:opacity="100%" draw:shadow="hidden" loext:decorative="false"/>
    </style:style>
    <style:style style:name="gr16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e0e6e6" draw:opacity="100%" draw:shadow="hidden" loext:decorative="false"/>
    </style:style>
    <style:style style:name="gr20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2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draw:stroke="none" draw:fill="solid" draw:fill-color="#7d9aaa" draw:opacity="100%" draw:shadow="hidden" loext:decorative="false"/>
    </style:style>
    <style:style style:name="gr27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8" style:family="graphic" style:parent-style-name="standard">
      <style:graphic-properties draw:stroke="none" draw:fill="solid" draw:fill-color="#a6bcc6" draw:opacity="100%" draw:shadow="hidden" loext:decorative="false"/>
    </style:style>
    <style:style style:name="gr29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30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opacity="100%" draw:shadow="hidden" loext:decorative="false"/>
    </style:style>
    <style:style style:name="gr32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none" draw:fill="bitmap" draw:fill-image-name="Bitmap_5f_5" style:repeat="stretch" draw:fill-image-ref-point="top-left" draw:shadow="visible" draw:shadow-offset-x="0cm" draw:shadow-offset-y="0cm" draw:shadow-color="#000000" draw:shadow-opacity="40%" loext:decorative="false"/>
    </style:style>
    <style:style style:name="gr34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5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start"/>
      <style:text-properties fo:color="#355269" loext:opacity="100%"/>
    </style:style>
    <style:style style:name="P5" style:family="paragraph">
      <loext:graphic-properties draw:fill="none"/>
      <style:paragraph-properties fo:text-align="start"/>
      <style:text-properties fo:color="#3465a4" loext:opacity="100%"/>
    </style:style>
    <style:style style:name="P6" style:family="paragraph">
      <style:paragraph-properties fo:text-align="start"/>
      <style:text-properties fo:color="#666666" loext:opacity="100%"/>
    </style:style>
    <style:style style:name="P7" style:family="paragraph">
      <loext:graphic-properties draw:fill="none"/>
      <style:paragraph-properties fo:text-align="start"/>
      <style:text-properties fo:color="#666666" loext:opacity="100%"/>
    </style:style>
    <style:style style:name="P8" style:family="paragraph">
      <loext:graphic-properties draw:fill="none"/>
      <style:text-properties style:text-underline-style="none"/>
    </style:style>
    <style:style style:name="P9" style:family="paragraph">
      <loext:graphic-properties draw:fill="bitmap" draw:fill-image-name="Bitmap_5f_1" style:repeat="stretch" draw:fill-image-ref-point="top-left"/>
    </style:style>
    <style:style style:name="P10" style:family="paragraph">
      <style:paragraph-properties fo:line-height="115%" fo:text-align="start"/>
    </style:style>
    <style:style style:name="P11" style:family="paragraph">
      <style:paragraph-properties fo:margin-left="0.635cm" fo:margin-right="0cm" fo:line-height="115%" fo:text-align="justify" fo:text-indent="-0.635cm"/>
    </style:style>
    <style:style style:name="P12" style:family="paragraph">
      <style:paragraph-properties fo:line-height="115%" fo:text-align="justify"/>
    </style:style>
    <style:style style:name="P13" style:family="paragraph">
      <loext:graphic-properties draw:fill="none"/>
      <style:paragraph-properties fo:line-height="115%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style:paragraph-properties fo:margin-left="0.635cm" fo:margin-right="0cm" fo:margin-top="0cm" fo:margin-bottom="0cm" fo:line-height="115%" fo:text-align="justify" fo:text-indent="-0.635cm"/>
    </style:style>
    <style:style style:name="P16" style:family="paragraph">
      <style:paragraph-properties fo:margin-left="0cm" fo:margin-right="0cm" fo:margin-top="0cm" fo:margin-bottom="0cm" fo:line-height="115%" fo:text-align="justify" fo:text-indent="0cm"/>
    </style:style>
    <style:style style:name="P17" style:family="paragraph">
      <style:paragraph-properties fo:margin-left="0.635cm" fo:margin-right="0cm" fo:margin-top="0cm" fo:margin-bottom="0cm" fo:line-height="100%" fo:text-align="justify" fo:text-indent="-0.635cm"/>
    </style:style>
    <style:style style:name="P18" style:family="paragraph">
      <style:paragraph-properties fo:margin-left="0.635cm" fo:margin-right="0cm" fo:text-align="justify" fo:text-indent="-0.635cm"/>
    </style:style>
    <style:style style:name="P19" style:family="paragraph">
      <style:paragraph-properties fo:text-align="justify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c6d3d7" draw:opacity="100%"/>
      <style:paragraph-properties fo:text-align="center"/>
    </style:style>
    <style:style style:name="P22" style:family="paragraph">
      <style:paragraph-properties fo:line-height="80%" fo:text-align="center"/>
    </style:style>
    <style:style style:name="P23" style:family="paragraph">
      <loext:graphic-properties draw:fill="none"/>
      <style:paragraph-properties fo:line-height="80%" fo:text-align="center"/>
    </style:style>
    <style:style style:name="P24" style:family="paragraph">
      <loext:graphic-properties draw:fill="solid" draw:fill-color="#e0e6e6" draw:opacity="10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80%" fo:text-align="center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7" style:family="paragraph">
      <style:paragraph-properties fo:margin-top="0cm" fo:margin-bottom="0.035cm" fo:line-height="115%" fo:text-align="start"/>
    </style:style>
    <style:style style:name="P28" style:family="paragraph">
      <loext:graphic-properties draw:fill="solid" draw:fill-color="#7d9aaa" draw:opacity="100%"/>
    </style:style>
    <style:style style:name="P29" style:family="paragraph">
      <loext:graphic-properties draw:fill="solid" draw:fill-color="#a6bcc6" draw:opacity="100%"/>
    </style:style>
    <style:style style:name="P30" style:family="paragraph">
      <loext:graphic-properties draw:fill="solid" draw:fill-color="#ffffff" draw:opacity="100%"/>
    </style:style>
    <style:style style:name="P31" style:family="paragraph">
      <loext:graphic-properties draw:fill="bitmap" draw:fill-image-name="Bitmap_5f_5" style:repeat="stretch" draw:fill-image-ref-point="top-lef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/>
      <style:text-properties style:use-window-font-color="true" loext:opacity="0%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1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2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3" style:family="text">
      <style:text-properties fo:color="#7f7f7f" loext:opacity="100%" style:font-name="Calibri" fo:font-size="9pt" fo:language="en" fo:country="GB" fo:font-weight="normal" style:font-name-asian="Calibri" style:font-size-asian="9pt" style:font-weight-asian="normal" style:font-name-complex="Calibri" style:font-size-complex="9pt" style:font-weight-complex="normal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3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4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5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46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48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49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0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1" style:family="text">
      <style:text-properties fo:color="#000000" loext:opacity="100%" style:font-name="Ubuntu" fo:font-size="7pt" fo:language="en" fo:country="GB" style:font-name-asian="Ubuntu" style:font-size-asian="7pt" style:font-name-complex="Ubuntu" style:font-size-complex="7pt"/>
    </style:style>
    <style:style style:name="T52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3" style:family="text">
      <style:text-properties fo:color="#000000" loext:opacity="100%" style:font-name="Calibri" fo:font-size="8pt" fo:language="en" fo:country="GB" style:font-name-asian="Calibri" style:font-size-asian="8pt" style:font-name-complex="Calibri" style:font-size-complex="8pt"/>
    </style:style>
    <style:style style:name="T54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5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1.257cm" svg:height="1.908cm" svg:x="9.747cm" svg:y="-0.011cm" svg:viewBox="0 0 11258 1909" draw:points="0,0 11258,0 11258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Venegas</text:span><text:span text:style-name="T2"> </text:span></text:p>
          </draw:text-box>
        </draw:frame>
        <draw:frame draw:style-name="gr3" draw:text-style-name="P5" draw:layer="layout" svg:width="5.539cm" svg:height="0.679cm" svg:x="1.255cm" svg:y="1.136cm">
          <draw:text-box>
            <text:p text:style-name="P4"><text:span text:style-name="T3">Data Engineer</text:span><text:span text:style-name="T4"> </text:span></text:p>
          </draw:text-box>
        </draw:frame>
        <draw:frame draw:style-name="gr4" draw:text-style-name="P3" draw:layer="layout" svg:width="3.556cm" svg:height="0.589cm" svg:x="10.6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7" draw:layer="layout" svg:width="3.238cm" svg:height="0.523cm" svg:x="10.654cm" svg:y="0.715cm">
          <draw:text-box>
            <text:p text:style-name="P6"><text:span text:style-name="T6">Munich, Germany</text:span></text:p>
          </draw:text-box>
        </draw:frame>
        <draw:frame draw:style-name="gr6" draw:text-style-name="P8" draw:layer="layout" svg:width="3.238cm" svg:height="0.616cm" svg:x="10.6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4.5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9" draw:layer="layout" svg:width="0.555cm" svg:height="0.555cm" svg:x="13.96cm" svg:y="0.724cm" svg:viewBox="0 0 556 556" draw:points="0,0 556,0 556,556 0,556">
          <text:p/>
        </draw:polygon>
        <draw:frame draw:style-name="gr8" draw:text-style-name="P3" draw:layer="layout" svg:width="2.922cm" svg:height="0.643cm" svg:x="14.5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3" draw:layer="layout" svg:width="18.46cm" svg:height="5.093cm" svg:x="1.291cm" svg:y="2.387cm">
          <draw:text-box>
            <text:p text:style-name="P10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11"><text:span text:style-name="T14">Coursing degree. </text:span><text:span text:style-name="T15">Statistics | Deep Learning | NLP | Machine Translation | Image Processing | Computer Vision.</text:span></text:p>
              </text:list-item>
              <text:list-item>
                <text:p text:style-name="P11"><text:span text:style-name="T16">Master Thesis: </text:span><text:span text:style-name="T17">BMW Group &amp; DFKI</text:span></text:p>
                <text:p text:style-name="P11"><text:span text:style-name="T18"/></text:p>
              </text:list-item>
            </text:list>
            <text:p text:style-name="P10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11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11"><text:span text:style-name="T15">ML | Time series | Algoriths &amp; Optimization | Cloud Computing &amp; Distributed | Automation &amp; PLC | Vehicle User Interfaces.</text:span></text:p>
              </text:list-item>
            </text:list>
            <text:p text:style-name="P12"><text:span text:style-name="T20"/></text:p>
            <text:p text:style-name="P10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11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 </text:span></text:p>
              </text:list-item>
            </text:list>
            <text:p text:style-name="P12"><text:span text:style-name="T21"/></text:p>
            <text:p text:style-name="P12"><text:span text:style-name="T22"/></text:p>
            <text:p text:style-name="P10"><text:span text:style-name="T9">Technologist in Automation and Robotics </text:span><text:span text:style-name="T10">CETI Colomos</text:span><text:span text:style-name="T11"><text:tab/>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11"><text:span text:style-name="T19">Thesis Project:</text:span><text:span text:style-name="T14"> Autonomous Tennis Machine. </text:span><text:span text:style-name="T15">Electronics | Robotics | Industrial Automation | Electricity | PLCs</text:span><text:span text:style-name="T14"> </text:span></text:p>
              </text:list-item>
            </text:list>
          </draw:text-box>
        </draw:frame>
        <draw:frame draw:style-name="gr11" draw:text-style-name="P13" draw:layer="layout" svg:width="18.491cm" svg:height="11.834cm" svg:x="1.234cm" svg:y="10.661cm">
          <draw:text-box>
            <text:p text:style-name="P14"><text:span text:style-name="T9">Data Scientist Masterarbeit </text:span><text:span text:style-name="T10">BMW Group &amp; DFKI &amp; Saarland University</text:span><text:span text:style-name="T10"><text:tab/></text:span><text:span text:style-name="T23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5"><text:span text:style-name="T26">Topic:</text:span><text:span text:style-name="T27"> </text:span><text:span text:style-name="T28">Evaluating Multi-Turn Tool-Using Agentic RAG Systems: A Synthetic Benchmark Generation Approach.</text:span></text:p>
              </text:list-item>
              <text:list-item>
                <text:p text:style-name="P15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5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5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6"><text:span text:style-name="T30"/></text:p>
            <text:p text:style-name="P10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11"><text:span text:style-name="T31">Develop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11"><text:span text:style-name="T14">Implemented an </text:span><text:span text:style-name="T19">Autoencoder</text:span><text:span text:style-name="T14"> model for </text:span><text:span text:style-name="T19">Anomaly Detection</text:span><text:span text:style-name="T14"> via </text:span><text:span text:style-name="T19">Federated Learning </text:span><text:span text:style-name="T14">across edge devices.</text:span></text:p>
              </text:list-item>
            </text:list>
            <text:p text:style-name="P12"><text:span text:style-name="T20"/></text:p>
            <text:p text:style-name="P10"><text:span text:style-name="T9">Cloud Software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11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11"><text:span text:style-name="T33">Developed tools for managing and deploying </text:span><text:span text:style-name="T34">big data clusters</text:span><text:span text:style-name="T33">. Implemented </text:span><text:span text:style-name="T34">pipelines </text:span><text:span text:style-name="T33">for automation and testing.</text:span><text:span text:style-name="T14"> </text:span></text:p>
              </text:list-item>
            </text:list>
            <text:p text:style-name="P12"><text:span text:style-name="T20"/></text:p>
            <text:p text:style-name="P10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11"><text:span text:style-name="T33">Developed a high-accuracy algorithm for </text:span><text:span text:style-name="T34">detecting external battery replacements</text:span><text:span text:style-name="T33">.</text:span><text:span text:style-name="T14"> </text:span></text:p>
              </text:list-item>
              <text:list-item>
                <text:p text:style-name="P11"><text:span text:style-name="T33">Found </text:span><text:span text:style-name="T34">root cause</text:span><text:span text:style-name="T33"> to </text:span><text:span text:style-name="T34">missing database values</text:span><text:span text:style-name="T33">, created a new processing pipeline and </text:span><text:span text:style-name="T34">increasing service demand by 62%</text:span><text:span text:style-name="T33">.</text:span><text:span text:style-name="T14"> </text:span></text:p>
              </text:list-item>
              <text:list-item>
                <text:p text:style-name="P11"><text:span text:style-name="T33">Designed a </text:span><text:span text:style-name="T34">Streamlit dashboard </text:span><text:span text:style-name="T33">for adjusting prediction model parameters and obtaining a </text:span><text:span text:style-name="T34">real-time output (&lt;8 seconds</text:span><text:span text:style-name="T33">).</text:span><text:span text:style-name="T14"> </text:span></text:p>
              </text:list-item>
              <text:list-item>
                <text:p text:style-name="P11"><text:span text:style-name="T33">Configured </text:span><text:span text:style-name="T34">cloud-based environments </text:span><text:span text:style-name="T33">for working with </text:span><text:span text:style-name="T34">PySpark</text:span><text:span text:style-name="T33">. </text:span></text:p>
              </text:list-item>
            </text:list>
            <text:p text:style-name="P12"><text:span text:style-name="T20"/></text:p>
            <text:p text:style-name="P10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1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11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11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2"><text:span text:style-name="T20"/></text:p>
            <text:p text:style-name="P10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2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5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0"> </text:span></text:p>
              </text:list-item>
              <text:list-item>
                <text:p text:style-name="P11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2"><text:span text:style-name="T20"/></text:p>
            <text:p text:style-name="P10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11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0"> </text:span></text:p>
              </text:list-item>
              <text:list-item>
                <text:p text:style-name="P11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20" draw:layer="layout" svg:width="18.452cm" svg:height="3.989cm" svg:x="1.239cm" svg:y="23.092cm">
          <draw:text-box>
            <text:p text:style-name="P16"><text:span text:style-name="T40">Da</text:span><text:span text:style-name="T40">te</text:span><text:span text:style-name="T40">n-</text:span><text:span text:style-name="T40">M</text:span><text:span text:style-name="T40">ap</text:span><text:span text:style-name="T40">pi</text:span><text:span text:style-name="T40">ng</text:span><text:span text:style-name="T40">-</text:span><text:span text:style-name="T40">Fr</text:span><text:span text:style-name="T40">a</text:span><text:span text:style-name="T40">m</text:span><text:span text:style-name="T40">ew</text:span><text:span text:style-name="T40">or</text:span><text:span text:style-name="T40">k </text:span><text:span text:style-name="T40">für </text:span><text:span text:style-name="T40">di</text:span><text:span text:style-name="T40">e </text:span><text:span text:style-name="T40">AA</text:span><text:span text:style-name="T40">S</text:span><text:span text:style-name="T40"><text:tab/></text:span><text:span text:style-name="T40"><text:tab/></text:span><text:span text:style-name="T40"><text:tab/></text:span><text:span text:style-name="T40"><text:tab/></text:span><text:span text:style-name="T41"><text:a xlink:href="https://doi.org/10.17560/atp.v68i5.2836" xlink:type="simple">DOI: 10.17560/atp.v68i5.2836	</text:a></text:span><text:span text:style-name="T42"><text:tab/></text:span><text:span text:style-name="T42"><text:tab/></text:span></text:p>
            <text:list text:style-name="L1">
              <text:list-item>
                <text:p text:style-name="P17"><text:span text:style-name="T43">D</text:span><text:span text:style-name="T43">e</text:span><text:span text:style-name="T43">v</text:span><text:span text:style-name="T43">e</text:span><text:span text:style-name="T43">l</text:span><text:span text:style-name="T43">o</text:span><text:span text:style-name="T43">p</text:span><text:span text:style-name="T43">e</text:span><text:span text:style-name="T43">d</text:span><text:span text:style-name="T43"> </text:span><text:span text:style-name="T43">a</text:span><text:span text:style-name="T43"> </text:span><text:span text:style-name="T43">m</text:span><text:span text:style-name="T43">a</text:span><text:span text:style-name="T43">p</text:span><text:span text:style-name="T43">p</text:span><text:span text:style-name="T43">i</text:span><text:span text:style-name="T43">n</text:span><text:span text:style-name="T43">g</text:span><text:span text:style-name="T43"> </text:span><text:span text:style-name="T44">f</text:span><text:span text:style-name="T44">r</text:span><text:span text:style-name="T44">a</text:span><text:span text:style-name="T44">m</text:span><text:span text:style-name="T44">e</text:span><text:span text:style-name="T44">w</text:span><text:span text:style-name="T44">o</text:span><text:span text:style-name="T44">r</text:span><text:span text:style-name="T44">k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3">s</text:span><text:span text:style-name="T43">c</text:span><text:span text:style-name="T43">h</text:span><text:span text:style-name="T43">e</text:span><text:span text:style-name="T43">m</text:span><text:span text:style-name="T43">a</text:span><text:span text:style-name="T43">s</text:span><text:span text:style-name="T43"> </text:span><text:span text:style-name="T43">t</text:span><text:span text:style-name="T43">o</text:span><text:span text:style-name="T43"> </text:span><text:span text:style-name="T44">A</text:span><text:span text:style-name="T44">s</text:span><text:span text:style-name="T44">s</text:span><text:span text:style-name="T44">e</text:span><text:span text:style-name="T44">t</text:span><text:span text:style-name="T44"> </text:span><text:span text:style-name="T44">A</text:span><text:span text:style-name="T44">d</text:span><text:span text:style-name="T44">m</text:span><text:span text:style-name="T44">i</text:span><text:span text:style-name="T44">n</text:span><text:span text:style-name="T44">i</text:span><text:span text:style-name="T44">s</text:span><text:span text:style-name="T44">t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 </text:span><text:span text:style-name="T44">S</text:span><text:span text:style-name="T44">h</text:span><text:span text:style-name="T44">e</text:span><text:span text:style-name="T44">l</text:span><text:span text:style-name="T44">l</text:span><text:span text:style-name="T44"> </text:span><text:span text:style-name="T43">t</text:span><text:span text:style-name="T43">o</text:span><text:span text:style-name="T43"> </text:span><text:span text:style-name="T43">a</text:span><text:span text:style-name="T43">c</text:span><text:span text:style-name="T43">h</text:span><text:span text:style-name="T43">i</text:span><text:span text:style-name="T43">e</text:span><text:span text:style-name="T43">v</text:span><text:span text:style-name="T43">e</text:span><text:span text:style-name="T43"> </text:span><text:span text:style-name="T43">i</text:span><text:span text:style-name="T43">n</text:span><text:span text:style-name="T43">t</text:span><text:span text:style-name="T43">e</text:span><text:span text:style-name="T43">r</text:span><text:span text:style-name="T43">o</text:span><text:span text:style-name="T43">p</text:span><text:span text:style-name="T43">e</text:span><text:span text:style-name="T43">r</text:span><text:span text:style-name="T43">a</text:span><text:span text:style-name="T43">b</text:span><text:span text:style-name="T43">i</text:span><text:span text:style-name="T43">l</text:span><text:span text:style-name="T43">i</text:span><text:span text:style-name="T43">t</text:span><text:span text:style-name="T43">y</text:span><text:span text:style-name="T43"> </text:span><text:span text:style-name="T43">i</text:span><text:span text:style-name="T43">n</text:span><text:span text:style-name="T43"> </text:span><text:span text:style-name="T44">I</text:span><text:span text:style-name="T44">n</text:span><text:span text:style-name="T44">d</text:span><text:span text:style-name="T44">u</text:span><text:span text:style-name="T44">s</text:span><text:span text:style-name="T44">t</text:span><text:span text:style-name="T44">r</text:span><text:span text:style-name="T44">y</text:span><text:span text:style-name="T44"> </text:span><text:span text:style-name="T44">4</text:span><text:span text:style-name="T44">.</text:span><text:span text:style-name="T44">0</text:span><text:span text:style-name="T43">.</text:span></text:p>
              </text:list-item>
              <text:list-item>
                <text:p text:style-name="P17"><text:span text:style-name="T43">D</text:span><text:span text:style-name="T43">e</text:span><text:span text:style-name="T43">s</text:span><text:span text:style-name="T43">i</text:span><text:span text:style-name="T43">g</text:span><text:span text:style-name="T43">n</text:span><text:span text:style-name="T43">e</text:span><text:span text:style-name="T43">d</text:span><text:span text:style-name="T43"> </text:span><text:span text:style-name="T43">a</text:span><text:span text:style-name="T43"> </text:span><text:span text:style-name="T43">d</text:span><text:span text:style-name="T43">u</text:span><text:span text:style-name="T43">a</text:span><text:span text:style-name="T43">l</text:span><text:span text:style-name="T43"> </text:span><text:span text:style-name="T43">a</text:span><text:span text:style-name="T43">l</text:span><text:span text:style-name="T43">i</text:span><text:span text:style-name="T43">g</text:span><text:span text:style-name="T43">n</text:span><text:span text:style-name="T43">m</text:span><text:span text:style-name="T43">e</text:span><text:span text:style-name="T43">n</text:span><text:span text:style-name="T43">t</text:span><text:span text:style-name="T43"> </text:span><text:span text:style-name="T43">s</text:span><text:span text:style-name="T43">t</text:span><text:span text:style-name="T43">r</text:span><text:span text:style-name="T43">a</text:span><text:span text:style-name="T43">t</text:span><text:span text:style-name="T43">e</text:span><text:span text:style-name="T43">g</text:span><text:span text:style-name="T43">y</text:span><text:span text:style-name="T43"> </text:span><text:span text:style-name="T43">s</text:span><text:span text:style-name="T43">e</text:span><text:span text:style-name="T43">p</text:span><text:span text:style-name="T43">a</text:span><text:span text:style-name="T43">r</text:span><text:span text:style-name="T43">a</text:span><text:span text:style-name="T43">t</text:span><text:span text:style-name="T43">i</text:span><text:span text:style-name="T43">n</text:span><text:span text:style-name="T43">g</text:span><text:span text:style-name="T43"> </text:span><text:span text:style-name="T43">s</text:span><text:span text:style-name="T43">t</text:span><text:span text:style-name="T43">a</text:span><text:span text:style-name="T43">n</text:span><text:span text:style-name="T43">d</text:span><text:span text:style-name="T43">a</text:span><text:span text:style-name="T43">r</text:span><text:span text:style-name="T43">d</text:span><text:span text:style-name="T43"> </text:span><text:span text:style-name="T44">r</text:span><text:span text:style-name="T44">e</text:span><text:span text:style-name="T44">l</text:span><text:span text:style-name="T44">a</text:span><text:span text:style-name="T44">t</text:span><text:span text:style-name="T44">i</text:span><text:span text:style-name="T44">o</text:span><text:span text:style-name="T44">n</text:span><text:span text:style-name="T44">a</text:span><text:span text:style-name="T44">l</text:span><text:span text:style-name="T43"> </text:span><text:span text:style-name="T43">t</text:span><text:span text:style-name="T43">a</text:span><text:span text:style-name="T43">b</text:span><text:span text:style-name="T43">l</text:span><text:span text:style-name="T43">e</text:span><text:span text:style-name="T43">s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4">h</text:span><text:span text:style-name="T44">i</text:span><text:span text:style-name="T44">e</text:span><text:span text:style-name="T44">r</text:span><text:span text:style-name="T44">a</text:span><text:span text:style-name="T44">r</text:span><text:span text:style-name="T44">c</text:span><text:span text:style-name="T44">h</text:span><text:span text:style-name="T44">i</text:span><text:span text:style-name="T44">c</text:span><text:span text:style-name="T44">a</text:span><text:span text:style-name="T44">l</text:span><text:span text:style-name="T43"> </text:span><text:span text:style-name="T43"><text:s/></text:span><text:span text:style-name="T43">a</text:span><text:span text:style-name="T43">s</text:span><text:span text:style-name="T43">s</text:span><text:span text:style-name="T43">e</text:span><text:span text:style-name="T43">t</text:span><text:span text:style-name="T43">s</text:span><text:span text:style-name="T43">.</text:span></text:p>
                <text:p text:style-name="P17"><text:span text:style-name="T45"/></text:p>
              </text:list-item>
            </text:list>
            <text:p text:style-name="P12"><text:span text:style-name="T46">Se</text:span><text:span text:style-name="T46">e </text:span><text:span text:style-name="T46">Yo</text:span><text:span text:style-name="T46">ur </text:span><text:span text:style-name="T46">W</text:span><text:span text:style-name="T46">orl</text:span><text:span text:style-name="T46">d</text:span></text:p>
            <text:list text:continue-numbering="true" text:style-name="L1">
              <text:list-item>
                <text:p text:style-name="P18"><text:span text:style-name="T14">C</text:span><text:span text:style-name="T14">r</text:span><text:span text:style-name="T14">a</text:span><text:span text:style-name="T14">f</text:span><text:span text:style-name="T14">t</text:span><text:span text:style-name="T14">e</text:span><text:span text:style-name="T14">d</text:span><text:span text:style-name="T14"> </text:span><text:span text:style-name="T14">a</text:span><text:span text:style-name="T14"> </text:span><text:span text:style-name="T14">h</text:span><text:span text:style-name="T14">a</text:span><text:span text:style-name="T14">c</text:span><text:span text:style-name="T14">k</text:span><text:span text:style-name="T14">a</text:span><text:span text:style-name="T14">t</text:span><text:span text:style-name="T14">h</text:span><text:span text:style-name="T14">o</text:span><text:span text:style-name="T14">n</text:span><text:span text:style-name="T14"> </text:span><text:span text:style-name="T19">a</text:span><text:span text:style-name="T19">w</text:span><text:span text:style-name="T19">a</text:span><text:span text:style-name="T19">r</text:span><text:span text:style-name="T19">d</text:span><text:span text:style-name="T19">-</text:span><text:span text:style-name="T19">w</text:span><text:span text:style-name="T19">i</text:span><text:span text:style-name="T19">n</text:span><text:span text:style-name="T19">n</text:span><text:span text:style-name="T19">i</text:span><text:span text:style-name="T19">n</text:span><text:span text:style-name="T19">g</text:span><text:span text:style-name="T14"> </text:span><text:span text:style-name="T14">a</text:span><text:span text:style-name="T14">p</text:span><text:span text:style-name="T14">p</text:span><text:span text:style-name="T14"> </text:span><text:span text:style-name="T14">f</text:span><text:span text:style-name="T14">o</text:span><text:span text:style-name="T14">r</text:span><text:span text:style-name="T14"> </text:span><text:span text:style-name="T14">t</text:span><text:span text:style-name="T14">h</text:span><text:span text:style-name="T14">e</text:span><text:span text:style-name="T14"> 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l</text:span><text:span text:style-name="T19">y</text:span><text:span text:style-name="T19"> </text:span><text:span text:style-name="T19">i</text:span><text:span text:style-name="T19">m</text:span><text:span text:style-name="T19">p</text:span><text:span text:style-name="T19">a</text:span><text:span text:style-name="T19">i</text:span><text:span text:style-name="T19">r</text:span><text:span text:style-name="T19">e</text:span><text:span text:style-name="T19">d</text:span><text:span text:style-name="T14">,</text:span><text:span text:style-name="T14"> </text:span><text:span text:style-name="T14">s</text:span><text:span text:style-name="T14">u</text:span><text:span text:style-name="T14">p</text:span><text:span text:style-name="T14">p</text:span><text:span text:style-name="T14">o</text:span><text:span text:style-name="T14">r</text:span><text:span text:style-name="T14">t</text:span><text:span text:style-name="T14">i</text:span><text:span text:style-name="T14">n</text:span><text:span text:style-name="T14">g</text:span><text:span text:style-name="T14"> </text:span><text:span text:style-name="T19">1</text:span><text:span text:style-name="T19">1</text:span><text:span text:style-name="T19"> </text:span><text:span text:style-name="T19">l</text:span><text:span text:style-name="T19">a</text:span><text:span text:style-name="T19">n</text:span><text:span text:style-name="T19">g</text:span><text:span text:style-name="T19">u</text:span><text:span text:style-name="T19">a</text:span><text:span text:style-name="T19">g</text:span><text:span text:style-name="T19">e</text:span><text:span text:style-name="T19">s</text:span><text:span text:style-name="T14">.</text:span><text:span text:style-name="T47"> </text:span></text:p>
              </text:list-item>
              <text:list-item>
                <text:p text:style-name="P18"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e</text:span><text:span text:style-name="T14">d</text:span><text:span text:style-name="T14"> </text:span><text:span text:style-name="T19">I</text:span><text:span text:style-name="T19">m</text:span><text:span text:style-name="T19">a</text:span><text:span text:style-name="T19">g</text:span><text:span text:style-name="T19">e</text:span><text:span text:style-name="T19"> </text:span><text:span text:style-name="T19">C</text:span><text:span text:style-name="T19">a</text:span><text:span text:style-name="T19">p</text:span><text:span text:style-name="T19">t</text:span><text:span text:style-name="T19">i</text:span><text:span text:style-name="T19">o</text:span><text:span text:style-name="T19">n</text:span><text:span text:style-name="T19">i</text:span><text:span text:style-name="T19">n</text:span><text:span text:style-name="T19">g</text:span><text:span text:style-name="T19"> </text:span><text:span text:style-name="T14">D</text:span><text:span text:style-name="T14">L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9">T</text:span><text:span text:style-name="T19">e</text:span><text:span text:style-name="T19">n</text:span><text:span text:style-name="T19">s</text:span><text:span text:style-name="T19">o</text:span><text:span text:style-name="T19">r</text:span><text:span text:style-name="T19">F</text:span><text:span text:style-name="T19">l</text:span><text:span text:style-name="T19">o</text:span><text:span text:style-name="T19">w</text:span><text:span text:style-name="T14">,</text:span><text:span text:style-name="T14"> </text:span><text:span text:style-name="T14">d</text:span><text:span text:style-name="T14">e</text:span><text:span text:style-name="T14">p</text:span><text:span text:style-name="T14">l</text:span><text:span text:style-name="T14">o</text:span><text:span text:style-name="T14">y</text:span><text:span text:style-name="T14">e</text:span><text:span text:style-name="T14">d</text:span><text:span text:style-name="T14">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9">F</text:span><text:span text:style-name="T19">l</text:span><text:span text:style-name="T19">a</text:span><text:span text:style-name="T19">s</text:span><text:span text:style-name="T19">k</text:span><text:span text:style-name="T19">,</text:span><text:span text:style-name="T19"> </text:span><text:span text:style-name="T19">D</text:span><text:span text:style-name="T19">o</text:span><text:span text:style-name="T19">c</text:span><text:span text:style-name="T19">k</text:span><text:span text:style-name="T19">e</text:span><text:span text:style-name="T19">r</text:span><text:span text:style-name="T19">,</text:span><text:span text:style-name="T19"> </text:span><text:span text:style-name="T14">a</text:span><text:span text:style-name="T14">n</text:span><text:span text:style-name="T14">d</text:span><text:span text:style-name="T14"> </text:span><text:span text:style-name="T19">G</text:span><text:span text:style-name="T19">o</text:span><text:span text:style-name="T19">o</text:span><text:span text:style-name="T19">g</text:span><text:span text:style-name="T19">l</text:span><text:span text:style-name="T19">e</text:span><text:span text:style-name="T19"> </text:span><text:span text:style-name="T19">C</text:span><text:span text:style-name="T19">l</text:span><text:span text:style-name="T19">o</text:span><text:span text:style-name="T19">u</text:span><text:span text:style-name="T19">d</text:span><text:span text:style-name="T19"> </text:span><text:span text:style-name="T19">V</text:span><text:span text:style-name="T19">M</text:span><text:span text:style-name="T14">.</text:span></text:p>
                <text:p text:style-name="P18"><text:span text:style-name="T30"/></text:p>
              </text:list-item>
            </text:list>
            <text:p text:style-name="P19"><text:span text:style-name="T46">De</text:span><text:span text:style-name="T46">vU</text:span><text:span text:style-name="T46">p</text:span></text:p>
            <text:list text:continue-numbering="true" text:style-name="L1">
              <text:list-item>
                <text:p text:style-name="P18"><text:span text:style-name="T14">S</text:span><text:span text:style-name="T14">e</text:span><text:span text:style-name="T14">c</text:span><text:span text:style-name="T14">u</text:span><text:span text:style-name="T14">r</text:span><text:span text:style-name="T14">e</text:span><text:span text:style-name="T14">d</text:span><text:span text:style-name="T14"> </text:span><text:span text:style-name="T19">v</text:span><text:span text:style-name="T19">i</text:span><text:span text:style-name="T19">c</text:span><text:span text:style-name="T19">t</text:span><text:span text:style-name="T19">o</text:span><text:span text:style-name="T19">r</text:span><text:span text:style-name="T19">y</text:span><text:span text:style-name="T14"> </text:span><text:span text:style-name="T14">i</text:span><text:span text:style-name="T14">n</text:span><text:span text:style-name="T14"> </text:span><text:span text:style-name="T14">M</text:span><text:span text:style-name="T14">L</text:span><text:span text:style-name="T14">H</text:span><text:span text:style-name="T14">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i</text:span><text:span text:style-name="T14">n</text:span><text:span text:style-name="T14">g</text:span><text:span text:style-name="T14"> </text:span><text:span text:style-name="T19">H</text:span><text:span text:style-name="T19">a</text:span><text:span text:style-name="T19">c</text:span><text:span text:style-name="T19">k</text:span><text:span text:style-name="T19">a</text:span><text:span text:style-name="T19">t</text:span><text:span text:style-name="T19">h</text:span><text:span text:style-name="T19">o</text:span><text:span text:style-name="T19">n</text:span><text:span text:style-name="T14">.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text:span text:style-name="T14"> </text:span><text:span text:style-name="T14">t</text:span><text:span text:style-name="T14">o</text:span><text:span text:style-name="T14"> </text:span><text:span text:style-name="T14">h</text:span><text:span text:style-name="T14">e</text:span><text:span text:style-name="T14">l</text:span><text:span text:style-name="T14">p</text:span><text:span text:style-name="T14"> </text:span><text:span text:style-name="T14">d</text:span><text:span text:style-name="T14">e</text:span><text:span text:style-name="T14">v</text:span><text:span text:style-name="T14">e</text:span><text:span text:style-name="T14">l</text:span><text:span text:style-name="T14">o</text:span><text:span text:style-name="T14">p</text:span><text:span text:style-name="T14">e</text:span><text:span text:style-name="T14">r</text:span><text:span text:style-name="T14">s</text:span><text:span text:style-name="T14"> </text:span><text:span text:style-name="T14">f</text:span><text:span text:style-name="T14">i</text:span><text:span text:style-name="T14">n</text:span><text:span text:style-name="T14">d</text:span><text:span text:style-name="T14"> </text:span><text:span text:style-name="T14">t</text:span><text:span text:style-name="T14">e</text:span><text:span text:style-name="T14">a</text:span><text:span text:style-name="T14">m</text:span><text:span text:style-name="T14">m</text:span><text:span text:style-name="T14">a</text:span><text:span text:style-name="T14">t</text:span><text:span text:style-name="T14">e</text:span><text:span text:style-name="T14">s</text:span><text:span text:style-name="T14"> </text:span><text:span text:style-name="T14">f</text:span><text:span text:style-name="T14">o</text:span><text:span text:style-name="T14">r</text:span><text:span text:style-name="T14"> </text:span><text:span text:style-name="T14">s</text:span><text:span text:style-name="T14">i</text:span><text:span text:style-name="T14">d</text:span><text:span text:style-name="T14">e</text:span><text:span text:style-name="T14">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</text:span><text:span text:style-name="T14">s</text:span><text:span text:style-name="T14">.</text:span><text:span text:style-name="T14"> </text:span></text:p>
              </text:list-item>
              <text:list-item>
                <text:p text:style-name="P18"><text:span text:style-name="T14">U</text:span><text:span text:style-name="T14">s</text:span><text:span text:style-name="T14">e</text:span><text:span text:style-name="T14">d</text:span><text:span text:style-name="T14"> </text:span><text:span text:style-name="T19">I</text:span><text:span text:style-name="T19">o</text:span><text:span text:style-name="T19">n</text:span><text:span text:style-name="T19">i</text:span><text:span text:style-name="T19">c</text:span><text:span text:style-name="T19"> </text:span><text:span text:style-name="T19">R</text:span><text:span text:style-name="T19">e</text:span><text:span text:style-name="T19">a</text:span><text:span text:style-name="T19">c</text:span><text:span text:style-name="T19">t</text:span><text:span text:style-name="T14">,</text:span><text:span text:style-name="T14"> </text:span><text:span text:style-name="T19">D</text:span><text:span text:style-name="T19">o</text:span><text:span text:style-name="T19">c</text:span><text:span text:style-name="T19">k</text:span><text:span text:style-name="T19">e</text:span><text:span text:style-name="T19">r</text:span><text:span text:style-name="T14">,</text:span><text:span text:style-name="T14"> </text:span><text:span text:style-name="T19">A</text:span><text:span text:style-name="T19">W</text:span><text:span text:style-name="T19">S</text:span><text:span text:style-name="T19"> </text:span><text:span text:style-name="T19">E</text:span><text:span text:style-name="T19">C</text:span><text:span text:style-name="T19">2</text:span><text:span text:style-name="T14">,</text:span><text:span text:style-name="T14"> </text:span><text:span text:style-name="T19">N</text:span><text:span text:style-name="T19">G</text:span><text:span text:style-name="T19">I</text:span><text:span text:style-name="T19">N</text:span><text:span text:style-name="T19">X</text:span><text:span text:style-name="T14">,</text:span><text:span text:style-name="T14"> </text:span><text:span text:style-name="T19">F</text:span><text:span text:style-name="T19">l</text:span><text:span text:style-name="T19">a</text:span><text:span text:style-name="T19">s</text:span><text:span text:style-name="T19">k</text:span><text:span text:style-name="T14">,</text:span><text:span text:style-name="T14"> </text:span><text:span text:style-name="T19">P</text:span><text:span text:style-name="T19">o</text:span><text:span text:style-name="T19">s</text:span><text:span text:style-name="T19">t</text:span><text:span text:style-name="T19">g</text:span><text:span text:style-name="T19">r</text:span><text:span text:style-name="T19">e</text:span><text:span text:style-name="T19">S</text:span><text:span text:style-name="T19">Q</text:span><text:span text:style-name="T19">L</text:span><text:span text:style-name="T14">,</text:span><text:span text:style-name="T14"> </text:span><text:span text:style-name="T19">C</text:span><text:span text:style-name="T19">I</text:span><text:span text:style-name="T19">/</text:span><text:span text:style-name="T19">C</text:span><text:span text:style-name="T19">D</text:span><text:span text:style-name="T19">,</text:span><text:span text:style-name="T14"> </text:span><text:span text:style-name="T19">c</text:span><text:span text:style-name="T19">A</text:span><text:span text:style-name="T19">d</text:span><text:span text:style-name="T19">v</text:span><text:span text:style-name="T19">i</text:span><text:span text:style-name="T19">s</text:span><text:span text:style-name="T19">o</text:span><text:span text:style-name="T19">r</text:span><text:span text:style-name="T14">,</text:span><text:span text:style-name="T14"> </text:span><text:span text:style-name="T19">G</text:span><text:span text:style-name="T19">r</text:span><text:span text:style-name="T19">a</text:span><text:span text:style-name="T19">f</text:span><text:span text:style-name="T19">a</text:span><text:span text:style-name="T19">n</text:span><text:span text:style-name="T19">a</text:span><text:span text:style-name="T19"> </text:span><text:span text:style-name="T14">a</text:span><text:span text:style-name="T14">n</text:span><text:span text:style-name="T14">d</text:span><text:span text:style-name="T14"> </text:span><text:span text:style-name="T19">P</text:span><text:span text:style-name="T19">r</text:span><text:span text:style-name="T19">o</text:span><text:span text:style-name="T19">m</text:span><text:span text:style-name="T19">e</text:span><text:span text:style-name="T19">t</text:span><text:span text:style-name="T19">h</text:span><text:span text:style-name="T19">e</text:span><text:span text:style-name="T19">u</text:span><text:span text:style-name="T19">s</text:span><text:span text:style-name="T14">.</text:span><text:span text:style-name="T14"> </text:span></text:p>
              </text:list-item>
            </text:list>
          </draw:text-box>
        </draw:frame>
        <draw:frame draw:style-name="gr13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20" draw:layer="layout" svg:width="6.019cm" svg:height="0.971cm" svg:x="1.26cm" svg:y="22.33cm">
          <draw:text-box>
            <text:p text:style-name="P2"><text:span text:style-name="T8">PROJ</text:span><text:span text:style-name="T8">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4">
          <draw:path draw:style-name="gr15" draw:text-style-name="P21" draw:layer="layout" svg:width="2.375cm" svg:height="0.534cm" svg:x="6.927cm" svg:y="8.071cm" svg:viewBox="0 0 2376 535" svg:d="M108 0c-54 0-108 44-108 88v358c0 45 54 89 108 89h2158c55 0 110-44 110-89v-358c0-44-55-88-110-88zM108 0z">
            <text:p/>
          </draw:path>
          <draw:frame draw:style-name="gr16" draw:text-style-name="P23" draw:layer="layout" svg:width="2.375cm" svg:height="0.863cm" svg:x="6.927cm" svg:y="8.071cm">
            <draw:text-box>
              <text:p text:style-name="P22"><text:span text:style-name="T48">HuggingFace </text:span></text:p>
            </draw:text-box>
          </draw:frame>
        </draw:g>
        <draw:g draw:style-name="gr14">
          <draw:path draw:style-name="gr15" draw:text-style-name="P21" draw:layer="layout" svg:width="2cm" svg:height="0.534cm" svg:x="4.875cm" svg:y="8.071cm" svg:viewBox="0 0 2001 535" svg:d="M88 0c-44 0-88 44-88 88v358c0 45 44 89 88 89h1825c44 0 88-44 88-89v-358c0-44-44-88-88-88zM88 0z">
            <text:p/>
          </draw:path>
          <draw:frame draw:style-name="gr16" draw:text-style-name="P23" draw:layer="layout" svg:width="2cm" svg:height="0.863cm" svg:x="4.875cm" svg:y="8.071cm">
            <draw:text-box>
              <text:p text:style-name="P22"><text:span text:style-name="T48">LangChain </text:span></text:p>
            </draw:text-box>
          </draw:frame>
        </draw:g>
        <draw:g draw:style-name="gr14">
          <draw:path draw:style-name="gr15" draw:text-style-name="P21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7" draw:text-style-name="P23" draw:layer="layout" svg:width="2.145cm" svg:height="0.534cm" svg:x="13.94cm" svg:y="8.072cm">
            <draw:text-box>
              <text:p text:style-name="P22"><text:span text:style-name="T48">TensorFlow </text:span></text:p>
            </draw:text-box>
          </draw:frame>
        </draw:g>
        <draw:g draw:style-name="gr14">
          <draw:path draw:style-name="gr15" draw:text-style-name="P21" draw:layer="layout" svg:width="1.628cm" svg:height="0.534cm" svg:x="11.241cm" svg:y="8.059cm" svg:viewBox="0 0 1629 535" svg:d="M84 0c-42 0-84 44-84 88v358c0 45 42 89 84 89h1461c42 0 84-44 84-89v-358c0-44-42-88-84-88zM84 0z">
            <text:p/>
          </draw:path>
          <draw:frame draw:style-name="gr17" draw:text-style-name="P23" draw:layer="layout" svg:width="1.628cm" svg:height="0.534cm" svg:x="11.241cm" svg:y="8.059cm">
            <draw:text-box>
              <text:p text:style-name="P22"><text:span text:style-name="T48">Matlab </text:span></text:p>
            </draw:text-box>
          </draw:frame>
        </draw:g>
        <draw:g draw:style-name="gr14">
          <draw:path draw:style-name="gr15" draw:text-style-name="P21" draw:layer="layout" svg:width="0.5cm" svg:height="0.534cm" svg:x="10.622cm" svg:y="8.071cm" svg:viewBox="0 0 501 535" svg:d="M83 0c-42 0-83 41-83 83v369c0 42 41 83 83 83h335c42 0 83-41 83-83v-369c0-42-41-83-83-83zM83 0z">
            <text:p/>
          </draw:path>
          <draw:frame draw:style-name="gr17" draw:text-style-name="P23" draw:layer="layout" svg:width="0.5cm" svg:height="0.534cm" svg:x="10.622cm" svg:y="8.071cm">
            <draw:text-box>
              <text:p text:style-name="P22"><text:span text:style-name="T48">R </text:span></text:p>
            </draw:text-box>
          </draw:frame>
        </draw:g>
        <draw:frame draw:style-name="gr18" draw:text-style-name="P3" draw:layer="layout" svg:width="1.901cm" svg:height="0.658cm" svg:x="1.274cm" svg:y="8.059cm">
          <draw:text-box>
            <text:p text:style-name="P2"><text:span text:style-name="T49">Data </text:span></text:p>
          </draw:text-box>
        </draw:frame>
        <draw:g draw:style-name="gr14">
          <draw:path draw:style-name="gr19" draw:text-style-name="P24" draw:layer="layout" svg:width="1.6cm" svg:height="0.534cm" svg:x="12.123cm" svg:y="8.71cm" svg:viewBox="0 0 1601 535" svg:d="M88 0c-44 0-88 44-88 88v358c0 45 44 89 88 89h1425c44 0 88-44 88-89v-358c0-44-44-88-88-88zM88 0z">
            <text:p/>
          </draw:path>
          <draw:frame draw:style-name="gr17" draw:text-style-name="P23" draw:layer="layout" svg:width="1.6cm" svg:height="0.534cm" svg:x="12.123cm" svg:y="8.71cm">
            <draw:text-box>
              <text:p text:style-name="P22"><text:span text:style-name="T48">Angular </text:span></text:p>
            </draw:text-box>
          </draw:frame>
        </draw:g>
        <draw:g draw:style-name="gr14">
          <draw:path draw:style-name="gr19" draw:text-style-name="P24" draw:layer="layout" svg:width="1.2cm" svg:height="0.534cm" svg:x="10.872cm" svg:y="8.71cm" svg:viewBox="0 0 1201 535" svg:d="M88 0c-44 0-88 44-88 88v358c0 45 44 89 88 89h1024c44 0 89-44 89-89v-358c0-44-45-88-89-88zM88 0z">
            <text:p/>
          </draw:path>
          <draw:frame draw:style-name="gr17" draw:text-style-name="P23" draw:layer="layout" svg:width="1.2cm" svg:height="0.534cm" svg:x="10.872cm" svg:y="8.71cm">
            <draw:text-box>
              <text:p text:style-name="P22"><text:span text:style-name="T48">React </text:span></text:p>
            </draw:text-box>
          </draw:frame>
        </draw:g>
        <draw:g draw:style-name="gr14">
          <draw:path draw:style-name="gr19" draw:text-style-name="P24" draw:layer="layout" svg:width="1.1cm" svg:height="0.534cm" svg:x="13.819cm" svg:y="8.71cm" svg:viewBox="0 0 1101 535" svg:d="M88 0c-44 0-88 44-88 88v358c0 45 44 89 88 89h924c44 0 89-44 89-89v-358c0-44-45-88-89-88zM88 0z">
            <text:p/>
          </draw:path>
          <draw:frame draw:style-name="gr16" draw:text-style-name="P23" draw:layer="layout" svg:width="1.1cm" svg:height="0.863cm" svg:x="13.819cm" svg:y="8.71cm">
            <draw:text-box>
              <text:p text:style-name="P22"><text:span text:style-name="T48">Flask </text:span></text:p>
            </draw:text-box>
          </draw:frame>
        </draw:g>
        <draw:frame draw:style-name="gr20" draw:text-style-name="P3" draw:layer="layout" svg:width="2.222cm" svg:height="0.641cm" svg:x="1.27cm" svg:y="8.724cm">
          <draw:text-box>
            <text:p text:style-name="P2"><text:span text:style-name="T49">Software</text:span></text:p>
          </draw:text-box>
        </draw:frame>
        <draw:g draw:style-name="gr14">
          <draw:path draw:style-name="gr19" draw:text-style-name="P24" draw:layer="layout" svg:width="1.2cm" svg:height="0.534cm" svg:x="14.966cm" svg:y="8.71cm" svg:viewBox="0 0 1201 535" svg:d="M88 0c-44 0-88 44-88 88v358c0 45 44 89 88 89h1024c44 0 89-44 89-89v-358c0-44-45-88-89-88zM88 0z">
            <text:p/>
          </draw:path>
          <draw:frame draw:style-name="gr17" draw:text-style-name="P23" draw:layer="layout" svg:width="1.2cm" svg:height="0.534cm" svg:x="14.966cm" svg:y="8.71cm">
            <draw:text-box>
              <text:p text:style-name="P22"><text:span text:style-name="T48">Node </text:span></text:p>
            </draw:text-box>
          </draw:frame>
        </draw:g>
        <draw:frame draw:style-name="gr18" draw:text-style-name="P3" draw:layer="layout" svg:width="2.222cm" svg:height="0.658cm" svg:x="1.27cm" svg:y="9.377cm">
          <draw:text-box>
            <text:p text:style-name="P2"><text:span text:style-name="T49">Systems</text:span></text:p>
          </draw:text-box>
        </draw:frame>
        <draw:g draw:style-name="gr14">
          <draw:path draw:style-name="gr21" draw:text-style-name="P21" draw:layer="layout" svg:width="1.2cm" svg:height="0.534cm" svg:x="10.064cm" svg:y="9.345cm" svg:viewBox="0 0 1201 535" svg:d="M88 0c-44 0-88 44-88 88v358c0 45 44 89 88 89h1024c44 0 89-44 89-89v-358c0-44-45-88-89-88zM88 0z">
            <text:p/>
          </draw:path>
          <draw:frame draw:style-name="gr22" draw:text-style-name="P23" draw:layer="layout" svg:width="1.2cm" svg:height="0.534cm" svg:x="10.064cm" svg:y="9.345cm">
            <draw:text-box>
              <text:p text:style-name="P22"><text:span text:style-name="T48">CI/CD </text:span></text:p>
            </draw:text-box>
          </draw:frame>
        </draw:g>
        <draw:g draw:style-name="gr14">
          <draw:path draw:style-name="gr15" draw:text-style-name="P21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7" draw:text-style-name="P23" draw:layer="layout" svg:width="1cm" svg:height="0.534cm" svg:x="12.914cm" svg:y="8.059cm">
            <draw:text-box>
              <text:p text:style-name="P22"><text:span text:style-name="T48">SQL </text:span></text:p>
            </draw:text-box>
          </draw:frame>
        </draw:g>
        <draw:g draw:style-name="gr14">
          <draw:path draw:style-name="gr21" draw:text-style-name="P21" draw:layer="layout" svg:width="1.2cm" svg:height="0.534cm" svg:x="3.872cm" svg:y="9.345cm" svg:viewBox="0 0 1201 535" svg:d="M88 0c-44 0-88 44-88 88v358c0 45 44 89 88 89h1024c44 0 89-44 89-89v-358c0-44-45-88-89-88zM88 0z">
            <text:p/>
          </draw:path>
          <draw:frame draw:style-name="gr22" draw:text-style-name="P23" draw:layer="layout" svg:width="1.2cm" svg:height="0.534cm" svg:x="3.872cm" svg:y="9.345cm">
            <draw:text-box>
              <text:p text:style-name="P22"><text:span text:style-name="T48">Linux </text:span></text:p>
            </draw:text-box>
          </draw:frame>
        </draw:g>
        <draw:g draw:style-name="gr14">
          <draw:path draw:style-name="gr19" draw:text-style-name="P24" draw:layer="layout" svg:width="1.869cm" svg:height="0.534cm" svg:x="3.862cm" svg:y="8.707cm" svg:viewBox="0 0 1870 535" svg:d="M118 0c-59 0-118 44-118 88v358c0 45 59 89 118 89h1633c59 0 119-44 119-89v-358c0-44-60-88-119-88zM118 0z">
            <text:p/>
          </draw:path>
          <draw:frame draw:style-name="gr23" draw:text-style-name="P26" draw:layer="layout" svg:width="1.869cm" svg:height="0.534cm" svg:x="3.862cm" svg:y="8.707cm">
            <draw:text-box>
              <text:p text:style-name="P25"><text:span text:style-name="T48">JavaScript</text:span></text:p>
            </draw:text-box>
          </draw:frame>
        </draw:g>
        <draw:frame draw:style-name="gr24" draw:text-style-name="P13" draw:layer="layout" svg:width="2.443cm" svg:height="1.902cm" svg:x="15.153cm" svg:y="27.646cm">
          <draw:text-box>
            <text:p text:style-name="P27"><text:span text:style-name="T50">Spanish <text:s text:c="2"/></text:span><text:span text:style-name="T51">Native</text:span><text:span text:style-name="T52"> </text:span></text:p>
            <text:p text:style-name="P27"><text:span text:style-name="T50">English <text:s text:c="3"/></text:span><text:span text:style-name="T51">C1</text:span><text:span text:style-name="T52"> </text:span></text:p>
            <text:p text:style-name="P27"><text:span text:style-name="T50">German <text:s/></text:span><text:span text:style-name="T51">C1</text:span><text:span text:style-name="T53"> </text:span></text:p>
          </draw:text-box>
        </draw:frame>
        <draw:g draw:style-name="gr25">
          <draw:g draw:style-name="gr14">
            <draw:path draw:style-name="gr26" draw:text-style-name="P28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7" draw:text-style-name="P20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6" draw:text-style-name="P28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7" draw:text-style-name="P20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6" draw:text-style-name="P28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7" draw:text-style-name="P20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6" draw:text-style-name="P28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7" draw:text-style-name="P20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6" draw:text-style-name="P28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7" draw:text-style-name="P20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5">
          <draw:g draw:style-name="gr14">
            <draw:path draw:style-name="gr28" draw:text-style-name="P29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9" draw:text-style-name="P20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8" draw:text-style-name="P29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9" draw:text-style-name="P20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8" draw:text-style-name="P29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9" draw:text-style-name="P20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8" draw:text-style-name="P29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9" draw:text-style-name="P20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4">
            <draw:path draw:style-name="gr28" draw:text-style-name="P29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9" draw:text-style-name="P20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20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30" draw:text-style-name="P13" draw:layer="layout" svg:width="13.113cm" svg:height="2.038cm" svg:x="1.292cm" svg:y="27.649cm">
          <draw:text-box>
            <text:list text:style-name="L1">
              <text:list-item>
                <text:p text:style-name="P11"><text:span text:style-name="T14">Mathematics for Data Science Specialization <text:s text:c="2"/></text:span><text:span text:style-name="T14"><text:tab/></text:span><text:span text:style-name="T54">Higher School of Economics <text:s/>- <text:s/>2021</text:span><text:span text:style-name="T14"> </text:span></text:p>
              </text:list-item>
              <text:list-item>
                <text:p text:style-name="P11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4">HarvardX <text:s/>- <text:s/>2020</text:span><text:span text:style-name="T14"> </text:span></text:p>
              </text:list-item>
              <text:list-item>
                <text:p text:style-name="P11"><text:span text:style-name="T14">Python Data Science Professional Certificate <text:s/></text:span><text:span text:style-name="T14"><text:tab/></text:span><text:span text:style-name="T54">IBMX <text:s/>- 2020</text:span><text:span text:style-name="T14"> </text:span></text:p>
              </text:list-item>
              <text:list-item>
                <text:p text:style-name="P11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4">IBMX <text:s/>- <text:s/>2020</text:span><text:span text:style-name="T14"> </text:span></text:p>
              </text:list-item>
            </text:list>
          </draw:text-box>
        </draw:frame>
        <draw:frame draw:style-name="gr9" draw:text-style-name="P20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4">
          <draw:path draw:style-name="gr19" draw:text-style-name="P24" draw:layer="layout" svg:width="2.049cm" svg:height="0.534cm" svg:x="16.22cm" svg:y="8.71cm" svg:viewBox="0 0 2050 535" svg:d="M78 0c-39 0-78 44-78 88v358c0 45 39 89 78 89h1893c39 0 79-44 79-89v-358c0-44-40-88-79-88zM78 0z">
            <text:p/>
          </draw:path>
          <draw:frame draw:style-name="gr16" draw:text-style-name="P23" draw:layer="layout" svg:width="2.049cm" svg:height="0.863cm" svg:x="16.22cm" svg:y="8.71cm">
            <draw:text-box>
              <text:p text:style-name="P22"><text:span text:style-name="T48">Ionic/Tauri</text:span></text:p>
            </draw:text-box>
          </draw:frame>
        </draw:g>
        <draw:g draw:style-name="gr14">
          <draw:path draw:style-name="gr21" draw:text-style-name="P21" draw:layer="layout" svg:width="1.5cm" svg:height="0.534cm" svg:x="5.15cm" svg:y="9.345cm" svg:viewBox="0 0 1501 535" svg:d="M88 0c-44 0-88 44-88 88v358c0 45 44 89 88 89h1325c44 0 88-44 88-89v-358c0-44-44-88-88-88zM88 0z">
            <text:p/>
          </draw:path>
          <draw:frame draw:style-name="gr22" draw:text-style-name="P23" draw:layer="layout" svg:width="1.5cm" svg:height="0.534cm" svg:x="5.15cm" svg:y="9.345cm">
            <draw:text-box>
              <text:p text:style-name="P22"><text:span text:style-name="T48">Docker </text:span></text:p>
            </draw:text-box>
          </draw:frame>
        </draw:g>
        <draw:g draw:style-name="gr25">
          <draw:g draw:style-name="gr14">
            <draw:path draw:style-name="gr26" draw:text-style-name="P28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7" draw:text-style-name="P20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4">
            <draw:path draw:style-name="gr26" draw:text-style-name="P28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7" draw:text-style-name="P20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4">
            <draw:path draw:style-name="gr26" draw:text-style-name="P28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7" draw:text-style-name="P20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4">
            <draw:path draw:style-name="gr31" draw:text-style-name="P30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2" draw:text-style-name="P20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4">
            <draw:path draw:style-name="gr26" draw:text-style-name="P28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7" draw:text-style-name="P20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4">
          <draw:path draw:style-name="gr21" draw:text-style-name="P21" draw:layer="layout" svg:width="1.016cm" svg:height="0.534cm" svg:x="8.97cm" svg:y="9.345cm" svg:viewBox="0 0 1017 535" svg:d="M88 0c-44 0-88 44-88 88v358c0 45 44 89 88 89h841c44 0 88-44 88-89v-358c0-44-44-88-88-88zM88 0z">
            <text:p/>
          </draw:path>
          <draw:frame draw:style-name="gr22" draw:text-style-name="P23" draw:layer="layout" svg:width="1.016cm" svg:height="0.534cm" svg:x="8.97cm" svg:y="9.345cm">
            <draw:text-box>
              <text:p text:style-name="P22"><text:span text:style-name="T48">AWS </text:span></text:p>
            </draw:text-box>
          </draw:frame>
        </draw:g>
        <draw:g draw:style-name="gr14">
          <draw:path draw:style-name="gr21" draw:text-style-name="P21" draw:layer="layout" svg:width="1.575cm" svg:height="0.534cm" svg:x="15.42cm" svg:y="9.345cm" svg:viewBox="0 0 1576 535" svg:d="M88 0c-44 0-88 44-88 88v358c0 45 44 89 88 89h1399c45 0 89-44 89-89v-358c0-44-44-88-89-88zM88 0z">
            <text:p/>
          </draw:path>
          <draw:frame draw:style-name="gr22" draw:text-style-name="P23" draw:layer="layout" svg:width="1.575cm" svg:height="0.534cm" svg:x="15.42cm" svg:y="9.345cm">
            <draw:text-box>
              <text:p text:style-name="P22"><text:span text:style-name="T48">Arduino </text:span></text:p>
            </draw:text-box>
          </draw:frame>
        </draw:g>
        <draw:polygon draw:style-name="gr33" draw:text-style-name="P31" draw:layer="layout" svg:width="2.778cm" svg:height="3.682cm" svg:x="18.058cm" svg:y="0.128cm" svg:viewBox="0 0 2779 3683" draw:points="0,0 2779,0 2779,3683 0,3683">
          <text:p/>
        </draw:polygon>
        <draw:g draw:style-name="gr14">
          <draw:path draw:style-name="gr21" draw:text-style-name="P21" draw:layer="layout" svg:width="1.465cm" svg:height="0.534cm" svg:x="11.382cm" svg:y="9.345cm" svg:viewBox="0 0 1466 535" svg:d="M61 0c-30 0-61 44-61 88v358c0 45 31 89 61 89h1343c31 0 62-44 62-89v-358c0-44-31-88-62-88zM61 0z">
            <text:p/>
          </draw:path>
          <draw:frame draw:style-name="gr22" draw:text-style-name="P23" draw:layer="layout" svg:width="1.465cm" svg:height="0.534cm" svg:x="11.382cm" svg:y="9.345cm">
            <draw:text-box>
              <text:p text:style-name="P22"><text:span text:style-name="T48">Grafana</text:span></text:p>
            </draw:text-box>
          </draw:frame>
        </draw:g>
        <draw:g draw:style-name="gr14">
          <draw:path draw:style-name="gr21" draw:text-style-name="P21" draw:layer="layout" svg:width="1.269cm" svg:height="0.534cm" svg:x="12.97cm" svg:y="9.345cm" svg:viewBox="0 0 1270 535" svg:d="M53 0c-26 0-53 44-53 88v358c0 45 27 89 53 89h1163c27 0 54-44 54-89v-358c0-44-27-88-54-88zM53 0z">
            <text:p/>
          </draw:path>
          <draw:frame draw:style-name="gr22" draw:text-style-name="P23" draw:layer="layout" svg:width="1.269cm" svg:height="0.534cm" svg:x="12.97cm" svg:y="9.345cm">
            <draw:text-box>
              <text:p text:style-name="P22"><text:span text:style-name="T48">MQTT</text:span></text:p>
            </draw:text-box>
          </draw:frame>
        </draw:g>
        <draw:g draw:style-name="gr14">
          <draw:path draw:style-name="gr21" draw:text-style-name="P21" draw:layer="layout" svg:width="0.952cm" svg:height="0.534cm" svg:x="14.357cm" svg:y="9.345cm" svg:viewBox="0 0 953 535" svg:d="M40 0c-20 0-40 44-40 88v358c0 45 20 89 40 89h873c20 0 40-44 40-89v-358c0-44-20-88-40-88zM40 0z">
            <text:p/>
          </draw:path>
          <draw:frame draw:style-name="gr22" draw:text-style-name="P23" draw:layer="layout" svg:width="0.952cm" svg:height="0.534cm" svg:x="14.357cm" svg:y="9.345cm">
            <draw:text-box>
              <text:p text:style-name="P22"><text:span text:style-name="T48">PLC</text:span></text:p>
            </draw:text-box>
          </draw:frame>
        </draw:g>
        <draw:g draw:style-name="gr14">
          <draw:path draw:style-name="gr21" draw:text-style-name="P21" draw:layer="layout" svg:width="2.1cm" svg:height="0.534cm" svg:x="6.724cm" svg:y="9.345cm" svg:viewBox="0 0 2101 535" svg:d="M88 0c-44 0-88 44-88 88v358c0 45 44 89 88 89h1924c44 0 89-44 89-89v-358c0-44-45-88-89-88zM88 0z">
            <text:p/>
          </draw:path>
          <draw:frame draw:style-name="gr22" draw:text-style-name="P23" draw:layer="layout" svg:width="2.1cm" svg:height="0.534cm" svg:x="6.724cm" svg:y="9.345cm">
            <draw:text-box>
              <text:p text:style-name="P22"><text:span text:style-name="T48">Kubernetes </text:span></text:p>
            </draw:text-box>
          </draw:frame>
        </draw:g>
        <draw:g draw:style-name="gr14">
          <draw:path draw:style-name="gr19" draw:text-style-name="P24" draw:layer="layout" svg:width="1.904cm" svg:height="0.534cm" svg:x="5.785cm" svg:y="8.707cm" svg:viewBox="0 0 1905 535" svg:d="M120 0c-60 0-120 44-120 88v358c0 45 60 89 120 89h1664c60 0 121-44 121-89v-358c0-44-61-88-121-88zM120 0z">
            <text:p/>
          </draw:path>
          <draw:frame draw:style-name="gr17" draw:text-style-name="P23" draw:layer="layout" svg:width="1.904cm" svg:height="0.534cm" svg:x="5.785cm" svg:y="8.707cm">
            <draw:text-box>
              <text:p text:style-name="P22"><text:span text:style-name="T48">TypeScript</text:span></text:p>
            </draw:text-box>
          </draw:frame>
        </draw:g>
        <draw:g draw:style-name="gr14">
          <draw:path draw:style-name="gr19" draw:text-style-name="P24" draw:layer="layout" svg:width="1.438cm" svg:height="0.534cm" svg:x="7.786cm" svg:y="8.708cm" svg:viewBox="0 0 1439 535" svg:d="M91 0c-46 0-91 44-91 88v358c0 45 45 89 91 89h1256c46 0 92-44 92-89v-358c0-44-46-88-92-88zM91 0z">
            <text:p/>
          </draw:path>
          <draw:frame draw:style-name="gr17" draw:text-style-name="P23" draw:layer="layout" svg:width="1.438cm" svg:height="0.534cm" svg:x="7.786cm" svg:y="8.708cm">
            <draw:text-box>
              <text:p text:style-name="P22"><text:span text:style-name="T48">Python</text:span></text:p>
            </draw:text-box>
          </draw:frame>
        </draw:g>
        <draw:g draw:style-name="gr14">
          <draw:path draw:style-name="gr19" draw:text-style-name="P24" draw:layer="layout" svg:width="0.572cm" svg:height="0.534cm" svg:x="9.287cm" svg:y="8.709cm" svg:viewBox="0 0 573 535" svg:d="M36 0c-18 0-36 44-36 88v358c0 45 18 89 36 89h501c18 0 36-44 36-89v-358c0-44-18-88-36-88zM36 0z">
            <text:p/>
          </draw:path>
          <draw:frame draw:style-name="gr17" draw:text-style-name="P23" draw:layer="layout" svg:width="0.573cm" svg:height="0.534cm" svg:x="9.287cm" svg:y="8.709cm">
            <draw:text-box>
              <text:p text:style-name="P22"><text:span text:style-name="T48">C</text:span></text:p>
            </draw:text-box>
          </draw:frame>
        </draw:g>
        <draw:g draw:style-name="gr14">
          <draw:path draw:style-name="gr19" draw:text-style-name="P24" draw:layer="layout" svg:width="0.823cm" svg:height="0.534cm" svg:x="9.988cm" svg:y="8.71cm" svg:viewBox="0 0 824 535" svg:d="M52 0c-26 0-52 44-52 88v358c0 45 26 89 52 89h720c25 0 52-44 52-89v-358c0-44-27-88-52-88zM52 0z">
            <text:p/>
          </draw:path>
          <draw:frame draw:style-name="gr17" draw:text-style-name="P23" draw:layer="layout" svg:width="0.824cm" svg:height="0.534cm" svg:x="9.988cm" svg:y="8.71cm">
            <draw:text-box>
              <text:p text:style-name="P22"><text:span text:style-name="T48">C++</text:span></text:p>
            </draw:text-box>
          </draw:frame>
        </draw:g>
        <draw:g draw:style-name="gr14">
          <draw:path draw:style-name="gr15" draw:text-style-name="P21" draw:layer="layout" svg:width="0.914cm" svg:height="0.534cm" svg:x="3.827cm" svg:y="8.072cm" svg:viewBox="0 0 915 535" svg:d="M40 0c-20 0-40 44-40 88v358c0 45 20 89 40 89h835c20 0 40-44 40-89v-358c0-44-20-88-40-88zM40 0z">
            <text:p/>
          </draw:path>
          <draw:frame draw:style-name="gr16" draw:text-style-name="P23" draw:layer="layout" svg:width="0.915cm" svg:height="0.863cm" svg:x="3.827cm" svg:y="8.072cm">
            <draw:text-box>
              <text:p text:style-name="P22"><text:span text:style-name="T48">RAG</text:span></text:p>
            </draw:text-box>
          </draw:frame>
        </draw:g>
        <draw:g draw:style-name="gr14">
          <draw:path draw:style-name="gr15" draw:text-style-name="P21" draw:layer="layout" svg:width="1.093cm" svg:height="0.534cm" svg:x="9.401cm" svg:y="8.072cm" svg:viewBox="0 0 1094 535" svg:d="M57 0c-29 0-57 44-57 88v358c0 45 28 89 57 89h980c29 0 57-44 57-89v-358c0-44-28-88-57-88zM57 0z">
            <text:p/>
          </draw:path>
          <draw:frame draw:style-name="gr17" draw:text-style-name="P23" draw:layer="layout" svg:width="1.093cm" svg:height="0.534cm" svg:x="9.401cm" svg:y="8.072cm">
            <draw:text-box>
              <text:p text:style-name="P22"><text:span text:style-name="T48">MCP </text:span></text:p>
            </draw:text-box>
          </draw:frame>
        </draw:g>
        <draw:g draw:style-name="gr14">
          <draw:path draw:style-name="gr15" draw:text-style-name="P21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7" draw:text-style-name="P23" draw:layer="layout" svg:width="3.244cm" svg:height="0.534cm" svg:x="16.14cm" svg:y="8.073cm">
            <draw:text-box>
              <text:p text:style-name="P22"><text:span text:style-name="T48">Knowledge Graphs</text:span></text:p>
            </draw:text-box>
          </draw:frame>
        </draw:g>
        <draw:g draw:style-name="gr14">
          <draw:path draw:style-name="gr34" draw:text-style-name="P20" draw:layer="layout" svg:width="0.745cm" svg:height="0.286cm" svg:x="5.735cm" svg:y="25.886cm" svg:viewBox="0 0 746 287" svg:d="M55 0c-28 0-55 23-55 47v192c0 24 27 48 55 48h635c28 0 56-24 56-48v-192c0-24-28-47-56-47z">
            <text:p/>
          </draw:path>
          <draw:frame draw:style-name="gr35" draw:text-style-name="P33" draw:layer="layout" svg:width="0.745cm" svg:height="0.873cm" svg:x="5.731cm" svg:y="25.596cm">
            <draw:text-box>
              <text:p text:style-name="P32"><text:span text:style-name="T55">AWS </text:span></text:p>
            </draw:text-box>
          </draw:frame>
        </draw:g>
        <draw:g draw:style-name="gr14">
          <draw:path draw:style-name="gr34" draw:text-style-name="P20" draw:layer="layout" svg:width="1.594cm" svg:height="0.286cm" svg:x="6.639cm" svg:y="25.887cm" svg:viewBox="0 0 1595 287" svg:d="M118 0c-60 0-118 23-118 47v192c0 24 58 48 118 48h1357c60 0 120-24 120-48v-192c0-24-60-47-120-47z">
            <text:p/>
          </draw:path>
          <draw:frame draw:style-name="gr36" draw:text-style-name="P33" draw:layer="layout" svg:width="1.592cm" svg:height="1.207cm" svg:x="6.631cm" svg:y="25.43cm">
            <draw:text-box>
              <text:p text:style-name="P32"><text:span text:style-name="T55">Monitoring </text:span></text:p>
            </draw:text-box>
          </draw:frame>
        </draw:g>
        <draw:g draw:style-name="gr14">
          <draw:path draw:style-name="gr34" draw:text-style-name="P20" draw:layer="layout" svg:width="1.135cm" svg:height="0.286cm" svg:x="4.445cm" svg:y="25.887cm" svg:viewBox="0 0 1136 287" svg:d="M84 0c-43 0-84 23-84 47v192c0 24 41 48 84 48h967c43 0 85-24 85-48v-192c0-24-42-47-85-47z">
            <text:p/>
          </draw:path>
          <draw:frame draw:style-name="gr37" draw:text-style-name="P33" draw:layer="layout" svg:width="1.134cm" svg:height="0.873cm" svg:x="4.439cm" svg:y="25.597cm">
            <draw:text-box>
              <text:p text:style-name="P32"><text:span text:style-name="T55">Docker </text:span></text:p>
            </draw:text-box>
          </draw:frame>
        </draw:g>
        <draw:g draw:style-name="gr14">
          <draw:path draw:style-name="gr34" draw:text-style-name="P20" draw:layer="layout" svg:width="1.601cm" svg:height="0.286cm" svg:x="4.447cm" svg:y="24.658cm" svg:viewBox="0 0 1602 287" svg:d="M118 0c-60 0-118 23-118 47v192c0 24 58 48 118 48h1364c60 0 120-24 120-48v-192c0-24-60-47-120-47z">
            <text:p/>
          </draw:path>
          <draw:frame draw:style-name="gr38" draw:text-style-name="P33" draw:layer="layout" svg:width="1.599cm" svg:height="0.873cm" svg:x="4.439cm" svg:y="24.368cm">
            <draw:text-box>
              <text:p text:style-name="P32"><text:span text:style-name="T55">Tensorflow </text:span></text:p>
            </draw:text-box>
          </draw:frame>
        </draw:g>
        <draw:g draw:style-name="gr14">
          <draw:path draw:style-name="gr34" draw:text-style-name="P20" draw:layer="layout" svg:width="1.838cm" svg:height="0.286cm" svg:x="6.148cm" svg:y="24.659cm" svg:viewBox="0 0 1839 287" svg:d="M136 0c-69 0-136 23-136 47v192c0 24 67 48 136 48h1565c69 0 138-24 138-48v-192c0-24-69-47-138-47z">
            <text:p/>
          </draw:path>
          <draw:frame draw:style-name="gr39" draw:text-style-name="P33" draw:layer="layout" svg:width="1.835cm" svg:height="0.873cm" svg:x="6.139cm" svg:y="24.369cm">
            <draw:text-box>
              <text:p text:style-name="P32"><text:span text:style-name="T55">Google Cloud </text:span></text:p>
            </draw:text-box>
          </draw:frame>
        </draw:g>
        <draw:g draw:style-name="gr14">
          <draw:path draw:style-name="gr34" draw:text-style-name="P20" draw:layer="layout" svg:width="0.866cm" svg:height="0.286cm" svg:x="8.143cm" svg:y="24.659cm" svg:viewBox="0 0 867 287" svg:d="M64 0c-32 0-64 23-64 47v192c0 24 32 48 64 48h738c32 0 65-24 65-48v-192c0-24-33-47-65-47z">
            <text:p/>
          </draw:path>
          <draw:frame draw:style-name="gr40" draw:text-style-name="P33" draw:layer="layout" svg:width="0.865cm" svg:height="0.873cm" svg:x="8.139cm" svg:y="24.369cm">
            <draw:text-box>
              <text:p text:style-name="P32"><text:span text:style-name="T55">Flask </text:span></text:p>
            </draw:text-box>
          </draw:frame>
        </draw:g>
        <draw:g draw:style-name="gr14">
          <draw:path draw:style-name="gr34" draw:text-style-name="P20" draw:layer="layout" svg:width="0.742cm" svg:height="0.286cm" svg:x="8.802cm" svg:y="23.32cm" svg:viewBox="0 0 743 287" svg:d="M55 0c-28 0-55 23-55 47v192c0 24 27 48 55 48h633c27 0 55-24 55-48v-192c0-24-28-47-55-47z">
            <text:p/>
          </draw:path>
          <draw:frame draw:style-name="gr41" draw:text-style-name="P33" draw:layer="layout" svg:width="0.742cm" svg:height="0.873cm" svg:x="8.798cm" svg:y="23.03cm">
            <draw:text-box>
              <text:p text:style-name="P32"><text:span text:style-name="T55">AAS </text:span></text:p>
            </draw:text-box>
          </draw:frame>
        </draw:g>
        <draw:g draw:style-name="gr14">
          <draw:path draw:style-name="gr34" draw:text-style-name="P20" draw:layer="layout" svg:width="1.683cm" svg:height="0.286cm" svg:x="9.708cm" svg:y="23.321cm" svg:viewBox="0 0 1684 287" svg:d="M124 0c-63 0-124 23-124 47v192c0 24 61 48 124 48h1434c63 0 126-24 126-48v-192c0-24-63-47-126-47z">
            <text:p/>
          </draw:path>
          <draw:frame draw:style-name="gr42" draw:text-style-name="P33" draw:layer="layout" svg:width="1.682cm" svg:height="1.541cm" svg:x="9.699cm" svg:y="22.697cm">
            <draw:text-box>
              <text:p text:style-name="P32"><text:span text:style-name="T55">Industry 4.0</text:span></text:p>
            </draw:text-box>
          </draw:frame>
        </draw:g>
        <draw:g draw:style-name="gr14">
          <draw:path draw:style-name="gr34" draw:text-style-name="P20" draw:layer="layout" svg:width="0.748cm" svg:height="0.286cm" svg:x="11.504cm" svg:y="23.322cm" svg:viewBox="0 0 749 287" svg:d="M55 0c-28 0-55 23-55 47v192c0 24 27 48 55 48h638c28 0 56-24 56-48v-192c0-24-28-47-56-47z">
            <text:p/>
          </draw:path>
          <draw:frame draw:style-name="gr43" draw:text-style-name="P33" draw:layer="layout" svg:width="0.748cm" svg:height="1.541cm" svg:x="11.5cm" svg:y="22.698cm">
            <draw:text-box>
              <text:p text:style-name="P32"><text:span text:style-name="T55">LLM</text:span></text:p>
            </draw:text-box>
          </draw:frame>
        </draw:g>
        <draw:g draw:style-name="gr25">
          <draw:g draw:style-name="gr14">
            <draw:path draw:style-name="gr44" draw:text-style-name="P34" draw:layer="layout" svg:width="1.35cm" svg:height="0.286cm" svg:x="8.465cm" svg:y="25.887cm" svg:viewBox="0 0 1351 287" svg:d="M100 0c-51 0-100 23-100 47v192c0 24 49 48 100 48h1150c50 0 101-24 101-48v-192c0-24-51-47-101-47z">
              <text:p/>
            </draw:path>
            <draw:frame draw:style-name="gr45" draw:text-style-name="P33" draw:layer="layout" svg:width="1.348cm" svg:height="1.207cm" svg:x="8.458cm" svg:y="25.43cm">
              <draw:text-box>
                <text:p text:style-name="P32"><text:span text:style-name="T56"><text:s text:c="4"/></text:span><text:span text:style-name="T56"><text:a xlink:href="https://github.com/LaloVene/MLH-PE-Project" xlink:type="simple">Github</text:a></text:span></text:p>
              </draw:text-box>
            </draw:frame>
          </draw:g>
          <draw:frame draw:style-name="gr46" draw:text-style-name="P35" draw:layer="layout" svg:width="0.273cm" svg:height="0.26cm" svg:x="8.528cm" svg:y="25.902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25">
          <draw:g draw:style-name="gr14">
            <draw:path draw:style-name="gr44" draw:text-style-name="P34" draw:layer="layout" svg:width="1.35cm" svg:height="0.286cm" svg:x="9.239cm" svg:y="24.68cm" svg:viewBox="0 0 1351 287" svg:d="M100 0c-51 0-100 23-100 47v192c0 24 49 48 100 48h1150c50 0 101-24 101-48v-192c0-24-51-47-101-47z">
              <text:p/>
            </draw:path>
            <draw:frame draw:style-name="gr47" draw:text-style-name="P33" draw:layer="layout" svg:width="1.348cm" svg:height="1.207cm" svg:x="9.232cm" svg:y="24.223cm">
              <draw:text-box>
                <text:p text:style-name="P32"><text:span text:style-name="T56"><text:s text:c="4"/></text:span><text:span text:style-name="T56"><text:a xlink:href="https://github.com/LaloVene/Image-Captioning-Project" xlink:type="simple">Github</text:a></text:span></text:p>
              </draw:text-box>
            </draw:frame>
          </draw:g>
          <draw:frame draw:style-name="gr46" draw:text-style-name="P35" draw:layer="layout" svg:width="0.273cm" svg:height="0.26cm" svg:x="9.302cm" svg:y="24.6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6" draw:text-style-name="P35" draw:layer="layout" svg:width="0.547cm" svg:height="0.547cm" svg:x="10.1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6" draw:text-style-name="P35" draw:layer="layout" svg:width="0.46cm" svg:height="0.46cm" svg:x="10.1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6" draw:text-style-name="P35" draw:layer="layout" svg:width="0.442cm" svg:height="0.442cm" svg:x="10.1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6" draw:text-style-name="P35" draw:layer="layout" svg:width="0.467cm" svg:height="0.467cm" svg:x="14.01cm" svg:y="0.137cm">
          <draw:image xlink:href="Pictures/100000010000006400000064BC6DCE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fill-image draw:name="Bitmap_5f_5" draw:display-name="Bitmap_5" xlink:href="Pictures/10000000000007C000000A5028CD7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1T09:44:32.484786104</dc:date>
    <meta:creation-date>2025-07-18T15:54:30Z</meta:creation-date>
    <meta:generator>LibreOffice/26.2.3.2$Linux_X86_64 LibreOffice_project/620$Build-2</meta:generator>
    <meta:editing-duration>PT1H32M30S</meta:editing-duration>
    <meta:editing-cycles>45</meta:editing-cycles>
    <meta:print-date>2026-05-30T10:39:09.768111750</meta:print-date>
    <meta:printed-by>PDF files</meta:printed-by>
    <meta:document-statistic meta:object-count="197"/>
  </office:meta>
</office:document-meta>
</file>