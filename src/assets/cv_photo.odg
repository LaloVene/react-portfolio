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400000064BC6DCE55.png" manifest:media-type="image/png"/>
  <manifest:file-entry manifest:full-path="Pictures/100000010000006400000064C40BEBAE.png" manifest:media-type="image/png"/>
  <manifest:file-entry manifest:full-path="Pictures/1000000100000064000000647E7E347F.png" manifest:media-type="image/png"/>
  <manifest:file-entry manifest:full-path="Pictures/100000010000043F000005A7B970142B.png" manifest:media-type="image/png"/>
  <manifest:file-entry manifest:full-path="Pictures/100000010000006400000064C10219C4.png" manifest:media-type="image/png"/>
  <manifest:file-entry manifest:full-path="Pictures/100000010000003000000030C27FB9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be1e1" draw:opacity="100%" draw:shadow="hidden" loext:decorative="false"/>
    </style:style>
    <style:style style:name="gr2" style:family="graphic" style:parent-style-name="standard">
      <style:graphic-properties draw:stroke="none" draw:fill="none" fo:min-height="1.03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475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85cm" fo:min-width="2.54cm" fo:padding-top="0.102cm" fo:padding-bottom="0.102cm" fo:padding-left="0.102cm" fo:padding-right="0.10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19cm" fo:min-width="2.54cm" fo:padding-top="0.102cm" fo:padding-bottom="0.102cm" fo:padding-left="0.102cm" fo:padding-right="0.10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8" style:family="graphic" style:parent-style-name="standard">
      <style:graphic-properties draw:stroke="none" draw:fill="none" fo:min-height="0.439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67cm" fo:min-width="2.54cm" fo:padding-top="0.102cm" fo:padding-bottom="0.102cm" fo:padding-left="0.102cm" fo:padding-right="0.1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4.889cm" fo:min-width="2.54cm" fo:padding-top="0.102cm" fo:padding-bottom="0.102cm" fo:padding-left="0.102cm" fo:padding-right="0.10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63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848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draw:fill="solid" draw:fill-color="#c6d3d7" draw:opacity="100%" draw:shadow="hidden" loext:decorative="false"/>
    </style:style>
    <style:style style:name="gr15" style:family="graphic" style:parent-style-name="standard">
      <style:graphic-properties draw:stroke="none" draw:fill="none" fo:min-height="0.659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54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0e6e6" draw:opacity="100%" draw:shadow="hidden" loext:decorative="false"/>
    </style:style>
    <style:style style:name="gr19" style:family="graphic" style:parent-style-name="standard">
      <style:graphic-properties draw:stroke="none" draw:fill="none" fo:min-height="0.437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6d3d7" draw:opacity="100%" draw:textarea-vertical-align="middle" draw:shadow="hidden" loext:decorative="false"/>
    </style:style>
    <style:style style:name="gr21" style:family="graphic" style:parent-style-name="standard">
      <style:graphic-properties draw:stroke="none" draw:fill="none" draw:textarea-vertical-align="middl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698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="solid" draw:fill-color="#7d9aaa" draw:opacity="100%" draw:shadow="hidden" loext:decorative="false"/>
    </style:style>
    <style:style style:name="gr26" style:family="graphic" style:parent-style-name="standard">
      <style:graphic-properties draw:stroke="solid" svg:stroke-width="0.071cm" svg:stroke-color="#7d9aaa" draw:fill="none" fo:padding-top="0.16cm" fo:padding-bottom="0.16cm" fo:padding-left="0.285cm" fo:padding-right="0.285cm" loext:decorative="false"/>
    </style:style>
    <style:style style:name="gr27" style:family="graphic" style:parent-style-name="standard">
      <style:graphic-properties draw:stroke="none" draw:fill="solid" draw:fill-color="#a6bcc6" draw:opacity="100%" draw:shadow="hidden" loext:decorative="false"/>
    </style:style>
    <style:style style:name="gr28" style:family="graphic" style:parent-style-name="standard">
      <style:graphic-properties draw:stroke="solid" svg:stroke-width="0.071cm" svg:stroke-color="#a6bcc6" draw:fill="none" fo:padding-top="0.16cm" fo:padding-bottom="0.16cm" fo:padding-left="0.285cm" fo:padding-right="0.285cm" loext:decorative="false"/>
    </style:style>
    <style:style style:name="gr29" style:family="graphic" style:parent-style-name="standard">
      <style:graphic-properties draw:stroke="none" draw:fill="none" fo:min-height="1.834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100%" draw:shadow="hidden" loext:decorative="false"/>
    </style:style>
    <style:style style:name="gr31" style:family="graphic" style:parent-style-name="standard">
      <style:graphic-properties draw:stroke="solid" svg:stroke-width="0.035cm" svg:stroke-color="#7d9aaa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solid" svg:stroke-width="0.035cm" svg:stroke-color="#a6bcc6" draw:fill="none" fo:padding-top="0.142cm" fo:padding-bottom="0.142cm" fo:padding-left="0.267cm" fo:padding-right="0.267cm" loext:decorative="false"/>
    </style:style>
    <style:style style:name="gr33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333333" draw:fill="none" fo:padding-top="0.142cm" fo:padding-bottom="0.142cm" fo:padding-left="0.267cm" fo:padding-right="0.267cm" loext:decorative="false"/>
    </style:style>
    <style:style style:name="gr40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dbe1e1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start"/>
      <style:text-properties fo:color="#3465a4" loext:opacity="100%"/>
    </style:style>
    <style:style style:name="P5" style:family="paragraph">
      <loext:graphic-properties draw:fill="none"/>
      <style:paragraph-properties fo:text-align="start"/>
      <style:text-properties fo:color="#666666" loext:opacity="100%"/>
    </style:style>
    <style:style style:name="P6" style:family="paragraph">
      <loext:graphic-properties draw:fill="none"/>
      <style:text-properties style:text-underline-style="none"/>
    </style:style>
    <style:style style:name="P7" style:family="paragraph">
      <loext:graphic-properties draw:fill="bitmap" draw:fill-image-name="Bitmap_5f_1" style:repeat="stretch" draw:fill-image-ref-point="top-left"/>
    </style:style>
    <style:style style:name="P8" style:family="paragraph">
      <style:paragraph-properties fo:line-height="115%" fo:text-align="start"/>
    </style:style>
    <style:style style:name="P9" style:family="paragraph">
      <style:paragraph-properties fo:margin-left="0.635cm" fo:margin-right="0cm" fo:line-height="115%" fo:text-align="justify" fo:text-indent="-0.635cm"/>
    </style:style>
    <style:style style:name="P10" style:family="paragraph">
      <style:paragraph-properties fo:line-height="115%" fo:text-align="justify"/>
    </style:style>
    <style:style style:name="P11" style:family="paragraph">
      <loext:graphic-properties draw:fill="none"/>
      <style:paragraph-properties fo:line-height="115%"/>
    </style:style>
    <style:style style:name="P12" style:family="paragraph">
      <style:paragraph-properties fo:margin-left="0cm" fo:margin-right="0cm" fo:margin-top="0cm" fo:margin-bottom="0cm" fo:line-height="115%" fo:text-align="start" fo:text-indent="0cm"/>
    </style:style>
    <style:style style:name="P13" style:family="paragraph">
      <style:paragraph-properties fo:margin-left="0.635cm" fo:margin-right="0cm" fo:margin-top="0cm" fo:margin-bottom="0cm" fo:line-height="115%" fo:text-align="justify" fo:text-indent="-0.635cm"/>
    </style:style>
    <style:style style:name="P14" style:family="paragraph">
      <style:paragraph-properties fo:margin-left="0cm" fo:margin-right="0cm" fo:margin-top="0cm" fo:margin-bottom="0cm" fo:line-height="115%" fo:text-align="justify" fo:text-indent="0cm"/>
    </style:style>
    <style:style style:name="P15" style:family="paragraph">
      <style:paragraph-properties fo:margin-left="0.635cm" fo:margin-right="0cm" fo:margin-top="0cm" fo:margin-bottom="0cm" fo:line-height="100%" fo:text-align="justify" fo:text-indent="-0.635cm"/>
    </style:style>
    <style:style style:name="P16" style:family="paragraph">
      <style:paragraph-properties fo:margin-left="0.635cm" fo:margin-right="0cm" fo:text-align="justify" fo:text-indent="-0.635cm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c6d3d7" draw:opacity="100%"/>
      <style:paragraph-properties fo:text-align="center"/>
    </style:style>
    <style:style style:name="P19" style:family="paragraph">
      <style:paragraph-properties fo:line-height="80%" fo:text-align="center"/>
    </style:style>
    <style:style style:name="P20" style:family="paragraph">
      <loext:graphic-properties draw:fill="none"/>
      <style:paragraph-properties fo:line-height="80%" fo:text-align="center"/>
    </style:style>
    <style:style style:name="P21" style:family="paragraph">
      <loext:graphic-properties draw:fill="solid" draw:fill-color="#e0e6e6" draw:opacity="10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8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80%" fo:text-align="center" fo:text-indent="0cm"/>
    </style:style>
    <style:style style:name="P24" style:family="paragraph">
      <style:paragraph-properties fo:margin-top="0cm" fo:margin-bottom="0.035cm" fo:line-height="100%" fo:text-align="start"/>
    </style:style>
    <style:style style:name="P25" style:family="paragraph">
      <loext:graphic-properties draw:fill="none"/>
      <style:paragraph-properties fo:line-height="100%"/>
      <style:text-properties fo:font-size="9pt" style:font-size-asian="9pt" style:font-size-complex="9pt"/>
    </style:style>
    <style:style style:name="P26" style:family="paragraph">
      <loext:graphic-properties draw:fill="solid" draw:fill-color="#7d9aaa" draw:opacity="100%"/>
    </style:style>
    <style:style style:name="P27" style:family="paragraph">
      <loext:graphic-properties draw:fill="solid" draw:fill-color="#a6bcc6" draw:opacity="100%"/>
    </style:style>
    <style:style style:name="P28" style:family="paragraph">
      <loext:graphic-properties draw:fill="solid" draw:fill-color="#ffffff" draw:opacity="100%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text-properties style:use-window-font-color="true" loext:opacity="0%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Ubuntu" fo:font-size="26pt" fo:language="en" fo:country="GB" fo:font-weight="bold" style:font-name-asian="Ubuntu" style:font-size-asian="26pt" style:font-weight-asian="bold" style:font-name-complex="Ubuntu" style:font-size-complex="26pt" style:font-weight-complex="bold"/>
    </style:style>
    <style:style style:name="T2" style:family="text">
      <style:text-properties fo:color="#000000" loext:opacity="100%" style:font-name="Ubuntu" fo:font-size="12pt" fo:language="en" fo:country="GB" fo:font-weight="bold" style:font-name-asian="Ubuntu" style:font-size-asian="12pt" style:font-weight-asian="bold" style:font-name-complex="Ubuntu" style:font-size-complex="12pt" style:font-weight-complex="bold"/>
    </style:style>
    <style:style style:name="T3" style:family="text">
      <style:text-properties fo:color="#355269" loext:opacity="100%" style:font-name="Ubuntu" fo:font-size="12pt" fo:language="en" fo:country="GB" style:font-name-asian="Ubuntu" style:font-size-asian="12pt" style:font-name-complex="Ubuntu" style:font-size-complex="12pt"/>
    </style:style>
    <style:style style:name="T4" style:family="text">
      <style:text-properties fo:color="#355269" loext:opacity="100%" style:font-name="Ubuntu" fo:font-size="10pt" fo:language="en" fo:country="GB" style:font-name-asian="Ubuntu" style:font-size-asian="10pt" style:font-name-complex="Ubuntu" style:font-size-complex="10pt"/>
    </style:style>
    <style:style style:name="T5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font-name-asian="Ubuntu" style:font-size-asian="8pt" style:font-weight-asian="bold" style:font-name-complex="Ubuntu" style:font-size-complex="8pt" style:font-weight-complex="bold"/>
    </style:style>
    <style:style style:name="T6" style:family="text">
      <style:text-properties fo:color="#666666" loext:opacity="100%" style:font-name="Ubuntu" fo:font-size="8pt" fo:language="en" fo:country="GB" fo:font-weight="bold" style:font-name-asian="Ubuntu" style:font-size-asian="8pt" style:font-weight-asian="bold" style:font-name-complex="Ubuntu" style:font-size-complex="8pt" style:font-weight-complex="bold"/>
    </style:style>
    <style:style style:name="T7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8pt" style:font-weight-asian="bold" style:font-name-complex="Ubuntu" style:font-size-complex="8pt" style:font-weight-complex="bold"/>
    </style:style>
    <style:style style:name="T8" style:family="text">
      <style:text-properties fo:color="#000000" loext:opacity="100%" style:font-name="Avenir Next LT Pro" fo:font-size="16pt" fo:language="en" fo:country="GB" fo:font-weight="bold" style:font-name-asian="Avenir Next LT Pro" style:font-size-asian="16pt" style:font-weight-asian="bold" style:font-name-complex="Avenir Next LT Pro" style:font-size-complex="16pt" style:font-weight-complex="bold"/>
    </style:style>
    <style:style style:name="T9" style:family="text">
      <style:text-properties fo:color="#000000" loext:opacity="100%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f7f7f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11" style:family="text">
      <style:text-properties fo:color="#7f7f7f" loext:opacity="100%" style:font-name="Calibri" fo:font-size="8pt" fo:language="en" fo:country="GB" style:font-name-asian="Calibri" style:font-size-asian="8pt" style:font-name-complex="Calibri" style:font-size-complex="8pt"/>
    </style:style>
    <style:style style:name="T12" style:family="text">
      <style:text-properties fo:color="#7f7f7f" loext:opacity="100%" style:font-name="Calibri" fo:font-size="8pt" fo:language="en" fo:country="GB" fo:font-style="italic" style:font-name-asian="Calibri" style:font-size-asian="8pt" style:font-style-asian="italic" style:font-name-complex="Calibri" style:font-size-complex="8pt" style:font-style-complex="italic"/>
    </style:style>
    <style:style style:name="T13" style:family="text">
      <style:text-properties fo:color="#000000" loext:opacity="100%" style:font-name="Calibri" fo:font-size="11pt" fo:language="en" fo:country="GB" style:font-name-asian="Calibri" style:font-size-asian="11pt" style:font-name-complex="Calibri" style:font-size-complex="11pt"/>
    </style:style>
    <style:style style:name="T14" style:family="text">
      <style:text-properties fo:color="#000000" loext:opacity="100%" style:font-name="Calibri" fo:font-size="10pt" fo:language="en" fo:country="GB" style:font-name-asian="Calibri" style:font-size-asian="10pt" style:font-name-complex="Calibri" style:font-size-complex="10pt"/>
    </style:style>
    <style:style style:name="T15" style:family="text">
      <style:text-properties fo:color="#000000" loext:opacity="100%" style:font-name="Calibri" fo:font-size="10pt" fo:language="en" fo:country="GB" fo:font-style="italic" style:font-name-asian="Calibri" style:font-size-asian="10pt" style:font-style-asian="italic" style:font-name-complex="Calibri" style:font-size-complex="10pt" style:font-style-complex="italic"/>
    </style:style>
    <style:style style:name="T16" style:family="text">
      <style:text-properties fo:color="#000000" loext:opacity="100%" style:font-name="Calibri" fo:font-size="10pt" fo:language="en" fo:country="GB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color="#000000" loext:opacity="100%" style:font-name="Calibri" fo:font-size="10pt" fo:language="en" fo:country="GB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color="#000000" loext:opacity="100%" style:font-name="Calibri" fo:font-size="4pt" fo:language="en" fo:country="GB" fo:font-style="normal" fo:font-weight="normal" style:font-name-asian="Calibri" style:font-size-asian="4pt" style:font-style-asian="normal" style:font-weight-asian="normal" style:font-name-complex="Calibri" style:font-size-complex="4pt" style:font-style-complex="normal" style:font-weight-complex="normal"/>
    </style:style>
    <style:style style:name="T19" style:family="text">
      <style:text-properties fo:color="#000000" loext:opacity="100%" style:font-name="Calibri" fo:font-size="10pt" fo:language="en" fo:country="GB" fo:font-weight="bold" style:font-name-asian="Calibri" style:font-size-asian="10pt" style:font-weight-asian="bold" style:font-name-complex="Calibri" style:font-size-complex="10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italic" fo:text-shadow="none" style:text-underline-style="none" fo:font-weight="normal" style:letter-kerning="true" style:font-name-asian="Calibri" style:font-size-asian="10pt" style:font-style-asian="italic" style:font-weight-asian="normal" style:font-name-complex="Calib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alibri" fo:font-size="4pt" fo:language="en" fo:country="GB" style:font-name-asian="Calibri" style:font-size-asian="4pt" style:font-name-complex="Calibri" style:font-size-complex="4pt"/>
    </style:style>
    <style:style style:name="T22" style:family="text">
      <style:text-properties fo:color="#000000" loext:opacity="100%" style:font-name="Calibri" fo:font-size="4pt" fo:language="en" fo:country="GB" fo:font-style="italic" style:font-name-asian="Calibri" style:font-size-asian="4pt" style:font-style-asian="italic" style:font-name-complex="Calibri" style:font-size-complex="4pt" style:font-style-complex="italic"/>
    </style:style>
    <style:style style:name="T23" style:family="text">
      <style:text-properties fo:color="#000000" loext:opacity="100%" style:font-name="Calibri" fo:font-size="1pt" fo:language="en" fo:country="GB" style:font-name-asian="Calibri" style:font-size-asian="1pt" style:font-name-complex="Calibri" style:font-size-complex="1pt"/>
    </style:style>
    <style:style style:name="T24" style:family="text">
      <style:text-properties fo:color="#7f7f7f" loext:opacity="100%" style:font-name="Calibri" fo:font-size="8pt" fo:language="en" fo:country="GB" fo:font-style="italic" fo:font-weight="normal" style:font-name-asian="Calibri" style:font-size-asian="8pt" style:font-style-asian="italic" style:font-weight-asian="normal" style:font-name-complex="Calibri" style:font-size-complex="8pt" style:font-style-complex="italic" style:font-weight-complex="normal"/>
    </style:style>
    <style:style style:name="T25" style:family="text">
      <style:text-properties fo:color="#000000" loext:opacity="100%" style:font-name="Calibri" fo:font-size="11pt" fo:language="en" fo:country="GB" fo:font-weight="normal" style:font-name-asian="Calibri" style:font-size-asian="11pt" style:font-weight-asian="normal" style:font-name-complex="Calibri" style:font-size-complex="11pt" style:font-weight-complex="normal"/>
    </style:style>
    <style:style style:name="T26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7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8" style:family="text">
      <style:text-properties fo:color="#000000" loext:opacity="100%" style:font-name="Calibri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9" style:family="text">
      <style:text-properties fo:color="#000000" loext:opacity="100%" style:font-name="Calibri" fo:font-size="10pt" fo:language="en" fo:country="GB" fo:font-weight="normal" style:font-name-asian="Calibri" style:font-size-asian="10pt" style:font-weight-asian="normal" style:font-name-complex="Calibri" style:font-size-complex="10pt" style:font-weight-complex="normal"/>
    </style:style>
    <style:style style:name="T30" style:family="text">
      <style:text-properties fo:color="#000000" loext:opacity="100%" style:font-name="Calibri" fo:font-size="4pt" fo:language="en" fo:country="GB" fo:font-weight="bold" style:font-name-asian="Calibri" style:font-size-asian="4pt" style:font-weight-asian="bold" style:font-name-complex="Calibri" style:font-size-complex="4pt" style:font-weight-complex="bold"/>
    </style:style>
    <style:style style:name="T3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32" style:family="text">
      <style:text-properties fo:color="#7f7f7f" loext:opacity="100%" style:font-name="Calibri" fo:font-size="9pt" fo:language="en" fo:country="GB" style:font-name-asian="Calibri" style:font-size-asian="9pt" style:font-name-complex="Calibri" style:font-size-complex="9pt"/>
    </style:style>
    <style:style style:name="T33" style:family="text">
      <style:text-properties fo:color="#000000" loext:opacity="100%" style:font-name="Calibri" fo:font-size="10pt" fo:language="es" fo:country="none" style:font-name-asian="Calibri" style:font-size-asian="10pt" style:font-name-complex="Calibri" style:font-size-complex="10pt"/>
    </style:style>
    <style:style style:name="T34" style:family="text">
      <style:text-properties fo:color="#000000" loext:opacity="100%" style:font-name="Calibri" fo:font-size="10pt" fo:language="es" fo:country="none" fo:font-weight="bold" style:font-name-asian="Calibri" style:font-size-asian="10pt" style:font-weight-asian="bold" style:font-name-complex="Calibri" style:font-size-complex="10pt" style:font-weight-complex="bold"/>
    </style:style>
    <style:style style:name="T35" style:family="text">
      <style:text-properties fo:color="#7f7f7f" loext:opacity="100%" style:font-name="Calibri" fo:font-size="8pt" fo:language="en" fo:country="GB" fo:font-weight="bold" style:font-name-asian="Calibri" style:font-size-asian="8pt" style:font-weight-asian="bold" style:font-name-complex="Calibri" style:font-size-complex="8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font-name="Calibri" fo:font-size="10pt" fo:language="de" fo:country="DE" style:font-name-asian="Calibri" style:font-size-asian="10pt" style:font-name-complex="Calibri" style:font-size-complex="10pt"/>
    </style:style>
    <style:style style:name="T39" style:family="text">
      <style:text-properties fo:color="#000000" loext:opacity="100%" style:font-name="Calibri" fo:font-size="10pt" fo:language="de" fo:country="DE" fo:font-weight="bold" style:font-name-asian="Calibri" style:font-size-asian="10pt" style:font-weight-asian="bold" style:font-name-complex="Calibri" style:font-size-complex="10pt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style:text-underline-mode="continuous" style:text-overline-mode="continuous" style:text-line-through-mode="continuous" style:letter-kerning="true" style:font-name-asian="Calibri" style:font-size-asian="10pt" style:font-style-asian="normal" style:font-name-complex="Calibri" style:font-size-complex="10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4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4pt" style:font-style-asian="normal" style:font-weight-asian="bold" style:font-name-complex="Calibri" style:font-size-complex="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pt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7pt" style:font-style-asian="italic" style:font-weight-asian="bold" style:font-name-complex="Calibri" style:font-size-complex="7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loext:opacity="100%" style:font-name="Calibri" fo:font-size="8pt" fo:language="en" fo:country="GB" style:text-underline-style="none" fo:font-weight="normal" style:text-underline-mode="continuous" style:text-overline-mode="continuous" style:text-line-through-mode="continuous" style:font-name-asian="Calibri" style:font-size-asian="8pt" style:font-weight-asian="normal" style:font-name-complex="Calibri" style:font-size-complex="8pt" style:font-weight-complex="normal"/>
    </style:style>
    <style:style style:name="T47" style:family="text">
      <style:text-properties fo:color="#000000" loext:opacity="100%" style:font-name="Calibri" fo:font-size="10pt" fo:language="en" fo:country="GB" style:text-underline-style="none" fo:font-weight="normal" style:text-underline-mode="continuous" style:text-overline-mode="continuous" style:text-line-through-mode="continuous" style:font-name-asian="Calibri" style:font-size-asian="10pt" style:font-weight-asian="normal" style:font-name-complex="Calibri" style:font-size-complex="10pt" style:font-weight-complex="normal"/>
    </style:style>
    <style:style style:name="T48" style:family="text">
      <style:text-properties fo:color="#000000" loext:opacity="100%" style:font-name="Calibri" fo:font-size="10pt" fo:language="en" fo:country="GB" style:text-underline-style="none" fo:font-weight="bold" style:text-underline-mode="continuous" style:text-overline-mode="continuous" style:text-line-through-mode="continuous" style:font-name-asian="Calibri" style:font-size-asian="10pt" style:font-weight-asian="bold" style:font-name-complex="Calibri" style:font-size-complex="10pt" style:font-weight-complex="bold"/>
    </style:style>
    <style:style style:name="T49" style:family="text">
      <style:text-properties fo:color="#000000" loext:opacity="100%" style:font-name="Calibri" fo:font-size="4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4pt" style:font-weight-asian="bold" style:font-name-complex="Calibri" style:font-size-complex="4pt" style:font-weight-complex="bold"/>
    </style:style>
    <style:style style:name="T50" style:family="text">
      <style:text-properties fo:color="#000000" loext:opacity="100%" style:font-name="Calibri" fo:font-size="12pt" fo:language="en" fo:country="GB" style:text-underline-style="none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51" style:family="text">
      <style:text-properties fo:color="#000000" loext:opacity="100%" style:font-name="Calibri" fo:font-size="6pt" fo:language="en" fo:country="GB" fo:font-weight="bold" style:font-name-asian="Calibri" style:font-size-asian="6pt" style:font-weight-asian="bold" style:font-name-complex="Calibri" style:font-size-complex="6pt" style:font-weight-complex="bold"/>
    </style:style>
    <style:style style:name="T52" style:family="text">
      <style:text-properties fo:color="#595959" loext:opacity="100%" style:font-name="Ubuntu" fo:font-size="10pt" fo:language="en" fo:country="GB" style:font-name-asian="Ubuntu" style:font-size-asian="10pt" style:font-name-complex="Ubuntu" style:font-size-complex="10pt"/>
    </style:style>
    <style:style style:name="T53" style:family="text">
      <style:text-properties fo:color="#000000" loext:opacity="100%" style:font-name="Ubuntu" fo:font-size="11pt" fo:language="en" fo:country="GB" fo:font-weight="bold" style:font-name-asian="Ubuntu" style:font-size-asian="11pt" style:font-weight-asian="bold" style:font-name-complex="Ubuntu" style:font-size-complex="11pt" style:font-weight-complex="bold"/>
    </style:style>
    <style:style style:name="T54" style:family="text">
      <style:text-properties fo:color="#000000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55" style:family="text">
      <style:text-properties fo:color="#000000" loext:opacity="100%" style:font-name="Ubuntu" fo:font-size="9pt" fo:language="en" fo:country="GB" style:font-name-asian="Ubuntu" style:font-size-asian="9pt" style:font-name-complex="Ubuntu" style:font-size-complex="9pt"/>
    </style:style>
    <style:style style:name="T56" style:family="text">
      <style:text-properties fo:color="#000000" loext:opacity="100%" style:font-name="Calibri" fo:font-size="9pt" fo:language="en" fo:country="GB" style:font-name-asian="Calibri" style:font-size-asian="9pt" style:font-name-complex="Calibri" style:font-size-complex="9pt"/>
    </style:style>
    <style:style style:name="T57" style:family="text">
      <style:text-properties fo:color="#7c7c7c" loext:opacity="100%" style:font-name="Calibri" fo:font-size="9pt" fo:language="en" fo:country="GB" fo:font-style="italic" style:font-name-asian="Calibri" style:font-size-asian="9pt" style:font-style-asian="italic" style:font-name-complex="Calibri" style:font-size-complex="9pt" style:font-style-complex="italic"/>
    </style:style>
    <style:style style:name="T58" style:family="text">
      <style:text-properties fo:font-variant="normal" fo:text-transform="none" fo:color="#5c7f92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10.7cm" svg:height="1.908cm" svg:x="10.304cm" svg:y="-0.011cm" svg:viewBox="0 0 10701 1909" draw:points="0,0 10701,0 10701,1909 0,1909">
          <text:p/>
        </draw:polygon>
        <draw:frame draw:style-name="gr2" draw:text-style-name="P3" draw:layer="layout" svg:width="7.811cm" svg:height="1.234cm" svg:x="1.206cm" svg:y="0.193cm">
          <draw:text-box>
            <text:p text:style-name="P2"><text:span text:style-name="T1">Edu</text:span><text:span text:style-name="T1">ard</text:span><text:span text:style-name="T1">o </text:span><text:span text:style-name="T1">Ve</text:span><text:span text:style-name="T1">neg</text:span><text:span text:style-name="T1">as</text:span><text:span text:style-name="T2"> </text:span></text:p>
          </draw:text-box>
        </draw:frame>
        <draw:frame draw:style-name="gr3" draw:text-style-name="P4" draw:layer="layout" svg:width="5.539cm" svg:height="0.679cm" svg:x="1.255cm" svg:y="1.136cm">
          <draw:text-box>
            <text:p text:style-name="P2"><text:span text:style-name="T3">Data &amp; </text:span><text:span text:style-name="T3">AI </text:span><text:span text:style-name="T3">Engin</text:span><text:span text:style-name="T3">eer</text:span><text:span text:style-name="T4"> </text:span></text:p>
          </draw:text-box>
        </draw:frame>
        <draw:frame draw:style-name="gr4" draw:text-style-name="P3" draw:layer="layout" svg:width="3.556cm" svg:height="0.589cm" svg:x="11.054cm" svg:y="0.126cm">
          <draw:text-box>
            <text:p text:style-name="P2"><text:span text:style-name="T5"><text:a xlink:href="mailto:lalohdez77@gmail.com" xlink:type="simple">lalohdez77@gmail.com</text:a></text:span></text:p>
          </draw:text-box>
        </draw:frame>
        <draw:frame draw:style-name="gr5" draw:text-style-name="P5" draw:layer="layout" svg:width="3.238cm" svg:height="0.523cm" svg:x="11.054cm" svg:y="0.715cm">
          <draw:text-box>
            <text:p text:style-name="P2"><text:span text:style-name="T6">Munich, </text:span><text:span text:style-name="T6">German</text:span><text:span text:style-name="T6">y</text:span></text:p>
          </draw:text-box>
        </draw:frame>
        <draw:frame draw:style-name="gr6" draw:text-style-name="P6" draw:layer="layout" svg:width="3.238cm" svg:height="0.616cm" svg:x="11.054cm" svg:y="1.3cm">
          <draw:text-box>
            <text:p text:style-name="P2"><text:span text:style-name="T7"><text:a xlink:href="https://github.com/LaloVene/" xlink:type="simple">LaloVene</text:a></text:span></text:p>
          </draw:text-box>
        </draw:frame>
        <draw:frame draw:style-name="gr4" draw:text-style-name="P3" draw:layer="layout" svg:width="2.675cm" svg:height="0.589cm" svg:x="15.015cm" svg:y="0.742cm">
          <draw:text-box>
            <text:p text:style-name="P2"><text:span text:style-name="T7"><text:a xlink:href="https://www.linkedin.com/in/eduardo-venegas/" xlink:type="simple">eduardo venegas</text:a></text:span></text:p>
          </draw:text-box>
        </draw:frame>
        <draw:polygon draw:style-name="gr7" draw:text-style-name="P7" draw:layer="layout" svg:width="0.555cm" svg:height="0.555cm" svg:x="14.46cm" svg:y="0.724cm" svg:viewBox="0 0 556 556" draw:points="0,0 556,0 556,556 0,556">
          <text:p/>
        </draw:polygon>
        <draw:frame draw:style-name="gr8" draw:text-style-name="P3" draw:layer="layout" svg:width="2.922cm" svg:height="0.643cm" svg:x="15.015cm" svg:y="0.099cm">
          <draw:text-box>
            <text:p text:style-name="P2"><text:span text:style-name="T7"><text:a xlink:href="https://lalovene.netlify.app/" xlink:type="simple">lalovene.netlify.app</text:a></text:span></text:p>
          </draw:text-box>
        </draw:frame>
        <draw:frame draw:style-name="gr9" draw:text-style-name="P3" draw:layer="layout" svg:width="3.82cm" svg:height="0.971cm" svg:x="1.26cm" svg:y="1.625cm">
          <draw:text-box>
            <text:p text:style-name="P2"><text:span text:style-name="T8">ED</text:span><text:span text:style-name="T8">UC</text:span><text:span text:style-name="T8">ATI</text:span><text:span text:style-name="T8">ON </text:span></text:p>
          </draw:text-box>
        </draw:frame>
        <draw:frame draw:style-name="gr10" draw:text-style-name="P11" draw:layer="layout" svg:width="18.46cm" svg:height="5.093cm" svg:x="1.291cm" svg:y="2.387cm">
          <draw:text-box>
            <text:p text:style-name="P8"><text:span text:style-name="T9">MS</text:span><text:span text:style-name="T9">c. </text:span><text:span text:style-name="T9">Dat</text:span><text:span text:style-name="T9">a </text:span><text:span text:style-name="T9">Sci</text:span><text:span text:style-name="T9">enc</text:span><text:span text:style-name="T9">e </text:span><text:span text:style-name="T9">an</text:span><text:span text:style-name="T9">d </text:span><text:span text:style-name="T9">Art</text:span><text:span text:style-name="T9">ifici</text:span><text:span text:style-name="T9">al </text:span><text:span text:style-name="T9">Int</text:span><text:span text:style-name="T9">elli</text:span><text:span text:style-name="T9">ge</text:span><text:span text:style-name="T9">nce </text:span><text:span text:style-name="T10">Univ</text:span><text:span text:style-name="T10">ersit</text:span><text:span text:style-name="T10">ät </text:span><text:span text:style-name="T10">des </text:span><text:span text:style-name="T10">Saar</text:span><text:span text:style-name="T10">land</text:span><text:span text:style-name="T10">es</text:span><text:span text:style-name="T11"><text:tab/></text:span><text:span text:style-name="T12">10/2</text:span><text:span text:style-name="T12">024 </text:span><text:span text:style-name="T12">– </text:span><text:span text:style-name="T12">09/2</text:span><text:span text:style-name="T12">026</text:span><text:span text:style-name="T12"><text:tab/></text:span><text:span text:style-name="T12">Saar</text:span><text:span text:style-name="T12">brüc</text:span><text:span text:style-name="T12">ken, </text:span><text:span text:style-name="T12">Ger</text:span><text:span text:style-name="T12">man</text:span><text:span text:style-name="T12">y</text:span><text:span text:style-name="T13"> </text:span></text:p>
            <text:list text:style-name="L1">
              <text:list-item>
                <text:p text:style-name="P9"><text:span text:style-name="T14">C</text:span><text:span text:style-name="T14">o</text:span><text:span text:style-name="T14">u</text:span><text:span text:style-name="T14">r</text:span><text:span text:style-name="T14">s</text:span><text:span text:style-name="T14">i</text:span><text:span text:style-name="T14">n</text:span><text:span text:style-name="T14">g</text:span><text:span text:style-name="T14">.</text:span><text:span text:style-name="T14"> </text:span><text:span text:style-name="T15">S</text:span><text:span text:style-name="T15">t</text:span><text:span text:style-name="T15">a</text:span><text:span text:style-name="T15">t</text:span><text:span text:style-name="T15">i</text:span><text:span text:style-name="T15">s</text:span><text:span text:style-name="T15">t</text:span><text:span text:style-name="T15">i</text:span><text:span text:style-name="T15">c</text:span><text:span text:style-name="T15">s</text:span><text:span text:style-name="T15"> </text:span><text:span text:style-name="T15">|</text:span><text:span text:style-name="T15"> </text:span><text:span text:style-name="T15">M</text:span><text:span text:style-name="T15">L</text:span><text:span text:style-name="T15"> </text:span><text:span text:style-name="T15">C</text:span><text:span text:style-name="T15">y</text:span><text:span text:style-name="T15">b</text:span><text:span text:style-name="T15">e</text:span><text:span text:style-name="T15">r</text:span><text:span text:style-name="T15">s</text:span><text:span text:style-name="T15">e</text:span><text:span text:style-name="T15">c</text:span><text:span text:style-name="T15">u</text:span><text:span text:style-name="T15">r</text:span><text:span text:style-name="T15">i</text:span><text:span text:style-name="T15">t</text:span><text:span text:style-name="T15">y</text:span><text:span text:style-name="T15"> </text:span><text:span text:style-name="T15">|</text:span><text:span text:style-name="T15"> </text:span><text:span text:style-name="T15">N</text:span><text:span text:style-name="T15">L</text:span><text:span text:style-name="T15">P</text:span><text:span text:style-name="T15"> </text:span><text:span text:style-name="T15">|</text:span><text:span text:style-name="T15"> </text:span><text:span text:style-name="T15">M</text:span><text:span text:style-name="T15">a</text:span><text:span text:style-name="T15">c</text:span><text:span text:style-name="T15">h</text:span><text:span text:style-name="T15">i</text:span><text:span text:style-name="T15">n</text:span><text:span text:style-name="T15">e</text:span><text:span text:style-name="T15"> </text:span><text:span text:style-name="T15">T</text:span><text:span text:style-name="T15">r</text:span><text:span text:style-name="T15">a</text:span><text:span text:style-name="T15">n</text:span><text:span text:style-name="T15">s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|</text:span><text:span text:style-name="T15"> </text:span><text:span text:style-name="T15">I</text:span><text:span text:style-name="T15">m</text:span><text:span text:style-name="T15">a</text:span><text:span text:style-name="T15">g</text:span><text:span text:style-name="T15">e</text:span><text:span text:style-name="T15">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i</text:span><text:span text:style-name="T15">n</text:span><text:span text:style-name="T15">g</text:span><text:span text:style-name="T15"> </text:span><text:span text:style-name="T15">&amp;</text:span><text:span text:style-name="T15"> </text:span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</text:span><text:span text:style-name="T15">r</text:span><text:span text:style-name="T15"> </text:span><text:span text:style-name="T15">V</text:span><text:span text:style-name="T15">i</text:span><text:span text:style-name="T15">s</text:span><text:span text:style-name="T15">i</text:span><text:span text:style-name="T15">o</text:span><text:span text:style-name="T15">n</text:span><text:span text:style-name="T15">.</text:span></text:p>
              </text:list-item>
              <text:list-item>
                <text:p text:style-name="P9"><text:span text:style-name="T16">T</text:span><text:span text:style-name="T16">h</text:span><text:span text:style-name="T16">e</text:span><text:span text:style-name="T16">s</text:span><text:span text:style-name="T16">i</text:span><text:span text:style-name="T16">s</text:span><text:span text:style-name="T16"> </text:span><text:span text:style-name="T16">(</text:span><text:span text:style-name="T16">S</text:span><text:span text:style-name="T16">e</text:span><text:span text:style-name="T16">m</text:span><text:span text:style-name="T16">i</text:span><text:span text:style-name="T16">n</text:span><text:span text:style-name="T16">a</text:span><text:span text:style-name="T16">r</text:span><text:span text:style-name="T16"> </text:span><text:span text:style-name="T16">G</text:span><text:span text:style-name="T16">r</text:span><text:span text:style-name="T16">a</text:span><text:span text:style-name="T16">d</text:span><text:span text:style-name="T16">e</text:span><text:span text:style-name="T16"> </text:span><text:span text:style-name="T16">1</text:span><text:span text:style-name="T16">.</text:span><text:span text:style-name="T16">0</text:span><text:span text:style-name="T16">)</text:span><text:span text:style-name="T16">:</text:span><text:span text:style-name="T17"> </text:span><text:span text:style-name="T17">E</text:span><text:span text:style-name="T17">v</text:span><text:span text:style-name="T17">a</text:span><text:span text:style-name="T17">l</text:span><text:span text:style-name="T17">u</text:span><text:span text:style-name="T17">a</text:span><text:span text:style-name="T17">t</text:span><text:span text:style-name="T17">i</text:span><text:span text:style-name="T17">n</text:span><text:span text:style-name="T17">g</text:span><text:span text:style-name="T17"> </text:span><text:span text:style-name="T17">M</text:span><text:span text:style-name="T17">u</text:span><text:span text:style-name="T17">l</text:span><text:span text:style-name="T17">t</text:span><text:span text:style-name="T17">i</text:span><text:span text:style-name="T17">-</text:span><text:span text:style-name="T17">T</text:span><text:span text:style-name="T17">u</text:span><text:span text:style-name="T17">r</text:span><text:span text:style-name="T17">n</text:span><text:span text:style-name="T17"> </text:span><text:span text:style-name="T17">A</text:span><text:span text:style-name="T17">g</text:span><text:span text:style-name="T17">e</text:span><text:span text:style-name="T17">n</text:span><text:span text:style-name="T17">t</text:span><text:span text:style-name="T17">i</text:span><text:span text:style-name="T17">c</text:span><text:span text:style-name="T17"> </text:span><text:span text:style-name="T17">R</text:span><text:span text:style-name="T17">A</text:span><text:span text:style-name="T17">G</text:span><text:span text:style-name="T17"> </text:span><text:span text:style-name="T17">S</text:span><text:span text:style-name="T17">y</text:span><text:span text:style-name="T17">s</text:span><text:span text:style-name="T17">t</text:span><text:span text:style-name="T17">e</text:span><text:span text:style-name="T17">m</text:span><text:span text:style-name="T17">s</text:span><text:span text:style-name="T17"> </text:span><text:span text:style-name="T17">(</text:span><text:span text:style-name="T17">I</text:span><text:span text:style-name="T17">n</text:span><text:span text:style-name="T17"> </text:span><text:span text:style-name="T17">c</text:span><text:span text:style-name="T17">o</text:span><text:span text:style-name="T17">l</text:span><text:span text:style-name="T17">l</text:span><text:span text:style-name="T17">a</text:span><text:span text:style-name="T17">b</text:span><text:span text:style-name="T17">o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w</text:span><text:span text:style-name="T17">i</text:span><text:span text:style-name="T17">t</text:span><text:span text:style-name="T17">h</text:span><text:span text:style-name="T17"> </text:span><text:span text:style-name="T17">B</text:span><text:span text:style-name="T17">M</text:span><text:span text:style-name="T17">W</text:span><text:span text:style-name="T17"> </text:span><text:span text:style-name="T17">&amp;</text:span><text:span text:style-name="T17"> </text:span><text:span text:style-name="T17">D</text:span><text:span text:style-name="T17">F</text:span><text:span text:style-name="T17">K</text:span><text:span text:style-name="T17">I</text:span><text:span text:style-name="T17">)</text:span><text:span text:style-name="T17">.</text:span></text:p>
                <text:p text:style-name="P9"><text:span text:style-name="T18"/></text:p>
              </text:list-item>
            </text:list>
            <text:p text:style-name="P8"><text:span text:style-name="T9">BSc</text:span><text:span text:style-name="T9">. </text:span><text:span text:style-name="T9">Co</text:span><text:span text:style-name="T9">mp</text:span><text:span text:style-name="T9">ute</text:span><text:span text:style-name="T9">r </text:span><text:span text:style-name="T9">Sci</text:span><text:span text:style-name="T9">enc</text:span><text:span text:style-name="T9">e </text:span><text:span text:style-name="T10">Tecn</text:span><text:span text:style-name="T10">ológ</text:span><text:span text:style-name="T10">ico </text:span><text:span text:style-name="T10">de </text:span><text:span text:style-name="T10">Mon</text:span><text:span text:style-name="T10">terr</text:span><text:span text:style-name="T10">ey </text:span><text:span text:style-name="T10">GDL</text:span><text:span text:style-name="T11"><text:tab/></text:span><text:span text:style-name="T11"><text:tab/></text:span><text:span text:style-name="T11"><text:tab/></text:span><text:span text:style-name="T11"><text:tab/></text:span><text:span text:style-name="T12">08/2</text:span><text:span text:style-name="T12">019 </text:span><text:span text:style-name="T12">– </text:span><text:span text:style-name="T12">12/2</text:span><text:span text:style-name="T12">023</text:span><text:span text:style-name="T12"><text:tab/></text:span><text:span text:style-name="T12">Gua</text:span><text:span text:style-name="T12">dalaj</text:span><text:span text:style-name="T12">ara, </text:span><text:span text:style-name="T12">Mexi</text:span><text:span text:style-name="T12">co</text:span><text:span text:style-name="T13"> </text:span></text:p>
            <text:list text:continue-numbering="true" text:style-name="L1">
              <text:list-item>
                <text:p text:style-name="P9"><text:span text:style-name="T14">G</text:span><text:span text:style-name="T14">r</text:span><text:span text:style-name="T14">a</text:span><text:span text:style-name="T14">d</text:span><text:span text:style-name="T14">e</text:span><text:span text:style-name="T14">:</text:span><text:span text:style-name="T14"> </text:span><text:span text:style-name="T14">9</text:span><text:span text:style-name="T14">4</text:span><text:span text:style-name="T14">.</text:span><text:span text:style-name="T14">6</text:span><text:span text:style-name="T14"> </text:span><text:span text:style-name="T14">/</text:span><text:span text:style-name="T14"> </text:span><text:span text:style-name="T14">1</text:span><text:span text:style-name="T14">0</text:span><text:span text:style-name="T14">0</text:span><text:span text:style-name="T14">.</text:span><text:span text:style-name="T14"> </text:span><text:span text:style-name="T14">F</text:span><text:span text:style-name="T14">i</text:span><text:span text:style-name="T14">v</text:span><text:span text:style-name="T14">e</text:span><text:span text:style-name="T14"> </text:span><text:span text:style-name="T14">t</text:span><text:span text:style-name="T14">i</text:span><text:span text:style-name="T14">m</text:span><text:span text:style-name="T14">e</text:span><text:span text:style-name="T14">s</text:span><text:span text:style-name="T14"> </text:span><text:span text:style-name="T14">b</text:span><text:span text:style-name="T14">e</text:span><text:span text:style-name="T14">s</text:span><text:span text:style-name="T14">t</text:span><text:span text:style-name="T14"> </text:span><text:span text:style-name="T14">s</text:span><text:span text:style-name="T14">o</text:span><text:span text:style-name="T14">f</text:span><text:span text:style-name="T14">t</text:span><text:span text:style-name="T14">w</text:span><text:span text:style-name="T14">a</text:span><text:span text:style-name="T14">r</text:span><text:span text:style-name="T14">e</text:span><text:span text:style-name="T14"> </text:span><text:span text:style-name="T14">e</text:span><text:span text:style-name="T14">n</text:span><text:span text:style-name="T14">g</text:span><text:span text:style-name="T14">i</text:span><text:span text:style-name="T14">n</text:span><text:span text:style-name="T14">e</text:span><text:span text:style-name="T14">e</text:span><text:span text:style-name="T14">r</text:span><text:span text:style-name="T14">i</text:span><text:span text:style-name="T14">n</text:span><text:span text:style-name="T14">g</text:span><text:span text:style-name="T14"> </text:span><text:span text:style-name="T14">G</text:span><text:span text:style-name="T14">P</text:span><text:span text:style-name="T14">A</text:span><text:span text:style-name="T14">.</text:span><text:span text:style-name="T14"> </text:span><text:span text:style-name="T19">6</text:span><text:span text:style-name="T19">0</text:span><text:span text:style-name="T19">%</text:span><text:span text:style-name="T19"> </text:span><text:span text:style-name="T19">t</text:span><text:span text:style-name="T19">u</text:span><text:span text:style-name="T19">i</text:span><text:span text:style-name="T19">t</text:span><text:span text:style-name="T19">i</text:span><text:span text:style-name="T19">o</text:span><text:span text:style-name="T19">n</text:span><text:span text:style-name="T19"> </text:span><text:span text:style-name="T14">s</text:span><text:span text:style-name="T14">c</text:span><text:span text:style-name="T14">h</text:span><text:span text:style-name="T14">o</text:span><text:span text:style-name="T14">l</text:span><text:span text:style-name="T14">a</text:span><text:span text:style-name="T14">r</text:span><text:span text:style-name="T14">s</text:span><text:span text:style-name="T14">h</text:span><text:span text:style-name="T14">i</text:span><text:span text:style-name="T14">p</text:span><text:span text:style-name="T14"> </text:span><text:span text:style-name="T14">d</text:span><text:span text:style-name="T14">u</text:span><text:span text:style-name="T14">e</text:span><text:span text:style-name="T14"> </text:span><text:span text:style-name="T14">t</text:span><text:span text:style-name="T14">o</text:span><text:span text:style-name="T14"> </text:span><text:span text:style-name="T14">a</text:span><text:span text:style-name="T14">c</text:span><text:span text:style-name="T14">a</text:span><text:span text:style-name="T14">d</text:span><text:span text:style-name="T14">e</text:span><text:span text:style-name="T14">m</text:span><text:span text:style-name="T14">i</text:span><text:span text:style-name="T14">c</text:span><text:span text:style-name="T14"> </text:span><text:span text:style-name="T14">m</text:span><text:span text:style-name="T14">e</text:span><text:span text:style-name="T14">r</text:span><text:span text:style-name="T14">i</text:span><text:span text:style-name="T14">t</text:span><text:span text:style-name="T14">.</text:span></text:p>
              </text:list-item>
              <text:list-item>
                <text:p text:style-name="P9"><text:span text:style-name="T20">M</text:span><text:span text:style-name="T20">L</text:span><text:span text:style-name="T20"> </text:span><text:span text:style-name="T20">|</text:span><text:span text:style-name="T20"> </text:span><text:span text:style-name="T20">T</text:span><text:span text:style-name="T20">i</text:span><text:span text:style-name="T20">m</text:span><text:span text:style-name="T20">e</text:span><text:span text:style-name="T20"> </text:span><text:span text:style-name="T20">s</text:span><text:span text:style-name="T20">e</text:span><text:span text:style-name="T20">r</text:span><text:span text:style-name="T20">i</text:span><text:span text:style-name="T20">e</text:span><text:span text:style-name="T20">s</text:span><text:span text:style-name="T20"> </text:span><text:span text:style-name="T20">|</text:span><text:span text:style-name="T20"> </text:span><text:span text:style-name="T20">A</text:span><text:span text:style-name="T20">l</text:span><text:span text:style-name="T20">g</text:span><text:span text:style-name="T20">o</text:span><text:span text:style-name="T20">r</text:span><text:span text:style-name="T20">i</text:span><text:span text:style-name="T20">t</text:span><text:span text:style-name="T20">h</text:span><text:span text:style-name="T20">m</text:span><text:span text:style-name="T20">s</text:span><text:span text:style-name="T20"> </text:span><text:span text:style-name="T20">&amp;</text:span><text:span text:style-name="T20"> </text:span><text:span text:style-name="T20">O</text:span><text:span text:style-name="T20">p</text:span><text:span text:style-name="T20">t</text:span><text:span text:style-name="T20">i</text:span><text:span text:style-name="T20">m</text:span><text:span text:style-name="T20">i</text:span><text:span text:style-name="T20">z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|</text:span><text:span text:style-name="T20"> </text:span><text:span text:style-name="T20">C</text:span><text:span text:style-name="T20">l</text:span><text:span text:style-name="T20">o</text:span><text:span text:style-name="T20">u</text:span><text:span text:style-name="T20">d</text:span><text:span text:style-name="T20"> </text:span><text:span text:style-name="T20">C</text:span><text:span text:style-name="T20">o</text:span><text:span text:style-name="T20">m</text:span><text:span text:style-name="T20">p</text:span><text:span text:style-name="T20">u</text:span><text:span text:style-name="T20">t</text:span><text:span text:style-name="T20">i</text:span><text:span text:style-name="T20">n</text:span><text:span text:style-name="T20">g</text:span><text:span text:style-name="T20"> </text:span><text:span text:style-name="T20">&amp;</text:span><text:span text:style-name="T20"> </text:span><text:span text:style-name="T20">D</text:span><text:span text:style-name="T20">i</text:span><text:span text:style-name="T20">s</text:span><text:span text:style-name="T20">t</text:span><text:span text:style-name="T20">r</text:span><text:span text:style-name="T20">i</text:span><text:span text:style-name="T20">b</text:span><text:span text:style-name="T20">u</text:span><text:span text:style-name="T20">t</text:span><text:span text:style-name="T20">e</text:span><text:span text:style-name="T20">d</text:span><text:span text:style-name="T20"> </text:span><text:span text:style-name="T20">|</text:span><text:span text:style-name="T20"> </text:span><text:span text:style-name="T20">V</text:span><text:span text:style-name="T20">e</text:span><text:span text:style-name="T20">h</text:span><text:span text:style-name="T20">i</text:span><text:span text:style-name="T20">c</text:span><text:span text:style-name="T20">l</text:span><text:span text:style-name="T20">e</text:span><text:span text:style-name="T20"> </text:span><text:span text:style-name="T20">U</text:span><text:span text:style-name="T20">s</text:span><text:span text:style-name="T20">e</text:span><text:span text:style-name="T20">r</text:span><text:span text:style-name="T20"> </text:span><text:span text:style-name="T20">I</text:span><text:span text:style-name="T20">n</text:span><text:span text:style-name="T20">t</text:span><text:span text:style-name="T20">e</text:span><text:span text:style-name="T20">r</text:span><text:span text:style-name="T20">f</text:span><text:span text:style-name="T20">a</text:span><text:span text:style-name="T20">c</text:span><text:span text:style-name="T20">e</text:span><text:span text:style-name="T20">s</text:span><text:span text:style-name="T20"> </text:span><text:span text:style-name="T20">|</text:span><text:span text:style-name="T20"> </text:span><text:span text:style-name="T15">P</text:span><text:span text:style-name="T15">L</text:span><text:span text:style-name="T15">C</text:span><text:span text:style-name="T15">.</text:span></text:p>
              </text:list-item>
            </text:list>
            <text:p text:style-name="P10"><text:span text:style-name="T21"/></text:p>
            <text:p text:style-name="P8"><text:span text:style-name="T9">Co</text:span><text:span text:style-name="T9">mp</text:span><text:span text:style-name="T9">ute</text:span><text:span text:style-name="T9">r </text:span><text:span text:style-name="T9">Sci</text:span><text:span text:style-name="T9">enc</text:span><text:span text:style-name="T9">e </text:span><text:span text:style-name="T9">Exc</text:span><text:span text:style-name="T9">ha</text:span><text:span text:style-name="T9">ng</text:span><text:span text:style-name="T9">e </text:span><text:span text:style-name="T9">Stu</text:span><text:span text:style-name="T9">de</text:span><text:span text:style-name="T9">nt </text:span><text:span text:style-name="T10">Univ</text:span><text:span text:style-name="T10">ersit</text:span><text:span text:style-name="T10">ät </text:span><text:span text:style-name="T10">Ulm</text:span><text:span text:style-name="T11"><text:tab/></text:span><text:span text:style-name="T11"><text:tab/></text:span><text:span text:style-name="T11"><text:tab/></text:span><text:span text:style-name="T11"><text:tab/></text:span><text:span text:style-name="T12">10/2</text:span><text:span text:style-name="T12">022 </text:span><text:span text:style-name="T12">– </text:span><text:span text:style-name="T12">09/2</text:span><text:span text:style-name="T12">023</text:span><text:span text:style-name="T12"><text:tab/></text:span><text:span text:style-name="T12">Ulm, </text:span><text:span text:style-name="T12">Ger</text:span><text:span text:style-name="T12">man</text:span><text:span text:style-name="T12">y</text:span><text:span text:style-name="T13"> </text:span></text:p>
            <text:list text:continue-numbering="true" text:style-name="L1">
              <text:list-item>
                <text:p text:style-name="P9"><text:span text:style-name="T19">F</text:span><text:span text:style-name="T19">u</text:span><text:span text:style-name="T19">l</text:span><text:span text:style-name="T19">l</text:span><text:span text:style-name="T19"> </text:span><text:span text:style-name="T19">s</text:span><text:span text:style-name="T19">c</text:span><text:span text:style-name="T19">h</text:span><text:span text:style-name="T19">o</text:span><text:span text:style-name="T19">l</text:span><text:span text:style-name="T19">a</text:span><text:span text:style-name="T19">r</text:span><text:span text:style-name="T19">s</text:span><text:span text:style-name="T19">h</text:span><text:span text:style-name="T19">i</text:span><text:span text:style-name="T19">p</text:span><text:span text:style-name="T19"> </text:span><text:span text:style-name="T14">r</text:span><text:span text:style-name="T14">e</text:span><text:span text:style-name="T14">c</text:span><text:span text:style-name="T14">i</text:span><text:span text:style-name="T14">p</text:span><text:span text:style-name="T14">i</text:span><text:span text:style-name="T14">e</text:span><text:span text:style-name="T14">n</text:span><text:span text:style-name="T14">t</text:span><text:span text:style-name="T19"> </text:span><text:span text:style-name="T14">f</text:span><text:span text:style-name="T14">r</text:span><text:span text:style-name="T14">o</text:span><text:span text:style-name="T14">m</text:span><text:span text:style-name="T14"> </text:span><text:span text:style-name="T19">D</text:span><text:span text:style-name="T19">A</text:span><text:span text:style-name="T19">A</text:span><text:span text:style-name="T19">D</text:span><text:span text:style-name="T14">.</text:span><text:span text:style-name="T14"> </text:span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</text:span><text:span text:style-name="T15">r</text:span><text:span text:style-name="T15"> </text:span><text:span text:style-name="T15">V</text:span><text:span text:style-name="T15">i</text:span><text:span text:style-name="T15">s</text:span><text:span text:style-name="T15">i</text:span><text:span text:style-name="T15">o</text:span><text:span text:style-name="T15">n</text:span><text:span text:style-name="T15"> </text:span><text:span text:style-name="T15">I</text:span><text:span text:style-name="T15">I</text:span><text:span text:style-name="T15"> </text:span><text:span text:style-name="T15">|</text:span><text:span text:style-name="T15"> </text:span><text:span text:style-name="T15">A</text:span><text:span text:style-name="T15">u</text:span><text:span text:style-name="T15">t</text:span><text:span text:style-name="T15">o</text:span><text:span text:style-name="T15">n</text:span><text:span text:style-name="T15">o</text:span><text:span text:style-name="T15">m</text:span><text:span text:style-name="T15">o</text:span><text:span text:style-name="T15">u</text:span><text:span text:style-name="T15">s</text:span><text:span text:style-name="T15"> </text:span><text:span text:style-name="T15">D</text:span><text:span text:style-name="T15">r</text:span><text:span text:style-name="T15">i</text:span><text:span text:style-name="T15">v</text:span><text:span text:style-name="T15">i</text:span><text:span text:style-name="T15">n</text:span><text:span text:style-name="T15">g</text:span><text:span text:style-name="T15"> </text:span><text:span text:style-name="T15">a</text:span><text:span text:style-name="T15">n</text:span><text:span text:style-name="T15">d</text:span><text:span text:style-name="T15"> </text:span><text:span text:style-name="T15">A</text:span><text:span text:style-name="T15">s</text:span><text:span text:style-name="T15">s</text:span><text:span text:style-name="T15">i</text:span><text:span text:style-name="T15">s</text:span><text:span text:style-name="T15">t</text:span><text:span text:style-name="T15">a</text:span><text:span text:style-name="T15">n</text:span><text:span text:style-name="T15">c</text:span><text:span text:style-name="T15">e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s</text:span><text:span text:style-name="T15"> </text:span><text:span text:style-name="T15">|</text:span><text:span text:style-name="T15"> </text:span><text:span text:style-name="T15">S</text:span><text:span text:style-name="T15">t</text:span><text:span text:style-name="T15">a</text:span><text:span text:style-name="T15">t</text:span><text:span text:style-name="T15">i</text:span><text:span text:style-name="T15">s</text:span><text:span text:style-name="T15">t</text:span><text:span text:style-name="T15">i</text:span><text:span text:style-name="T15">c</text:span><text:span text:style-name="T15">s</text:span><text:span text:style-name="T15">.</text:span></text:p>
              </text:list-item>
            </text:list>
            <text:p text:style-name="P10"><text:span text:style-name="T22"/></text:p>
            <text:p text:style-name="P10"><text:span text:style-name="T23"/></text:p>
            <text:p text:style-name="P8"><text:span text:style-name="T9">Tec</text:span><text:span text:style-name="T9">hn</text:span><text:span text:style-name="T9">olo</text:span><text:span text:style-name="T9">gist </text:span><text:span text:style-name="T9">De</text:span><text:span text:style-name="T9">gre</text:span><text:span text:style-name="T9">e </text:span><text:span text:style-name="T9">in </text:span><text:span text:style-name="T9">Au</text:span><text:span text:style-name="T9">to</text:span><text:span text:style-name="T9">ma</text:span><text:span text:style-name="T9">tio</text:span><text:span text:style-name="T9">n </text:span><text:span text:style-name="T9">an</text:span><text:span text:style-name="T9">d </text:span><text:span text:style-name="T9">Ro</text:span><text:span text:style-name="T9">bot</text:span><text:span text:style-name="T9">ics </text:span><text:span text:style-name="T10">CETI </text:span><text:span text:style-name="T10">Colo</text:span><text:span text:style-name="T10">mos</text:span><text:span text:style-name="T11"><text:tab/></text:span><text:span text:style-name="T11"><text:tab/></text:span><text:span text:style-name="T12">08/2</text:span><text:span text:style-name="T12">015 </text:span><text:span text:style-name="T12">– </text:span><text:span text:style-name="T12">06/2</text:span><text:span text:style-name="T12">019</text:span><text:span text:style-name="T12"><text:tab/></text:span><text:span text:style-name="T12">Gua</text:span><text:span text:style-name="T12">dalaj</text:span><text:span text:style-name="T12">ara, </text:span><text:span text:style-name="T12">Mexi</text:span><text:span text:style-name="T12">co</text:span><text:span text:style-name="T14"> </text:span></text:p>
            <text:list text:continue-numbering="true" text:style-name="L1">
              <text:list-item>
                <text:p text:style-name="P9"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text:span text:style-name="T15"> </text:span><text:span text:style-name="T15">L</text:span><text:span text:style-name="T15">a</text:span><text:span text:style-name="T15">b</text:span><text:span text:style-name="T15">o</text:span><text:span text:style-name="T15">r</text:span><text:span text:style-name="T15">a</text:span><text:span text:style-name="T15">t</text:span><text:span text:style-name="T15">o</text:span><text:span text:style-name="T15">r</text:span><text:span text:style-name="T15">y</text:span><text:span text:style-name="T15"> </text:span><text:span text:style-name="T15">(</text:span><text:span text:style-name="T15">I</text:span><text:span text:style-name="T15"> </text:span><text:span text:style-name="T15">&amp;</text:span><text:span text:style-name="T15"> </text:span><text:span text:style-name="T15">I</text:span><text:span text:style-name="T15">I</text:span><text:span text:style-name="T15">)</text:span><text:span text:style-name="T15"> </text:span><text:span text:style-name="T15">|</text:span><text:span text:style-name="T15"> </text:span><text:span text:style-name="T15">I</text:span><text:span text:style-name="T15">n</text:span><text:span text:style-name="T15">d</text:span><text:span text:style-name="T15">u</text:span><text:span text:style-name="T15">s</text:span><text:span text:style-name="T15">t</text:span><text:span text:style-name="T15">r</text:span><text:span text:style-name="T15">i</text:span><text:span text:style-name="T15">a</text:span><text:span text:style-name="T15">l</text:span><text:span text:style-name="T15"> </text:span><text:span text:style-name="T15">R</text:span><text:span text:style-name="T15">o</text:span><text:span text:style-name="T15">b</text:span><text:span text:style-name="T15">o</text:span><text:span text:style-name="T15">t</text:span><text:span text:style-name="T15">i</text:span><text:span text:style-name="T15">c</text:span><text:span text:style-name="T15">s</text:span><text:span text:style-name="T15"> </text:span><text:span text:style-name="T15">|</text:span><text:span text:style-name="T15"> </text:span><text:span text:style-name="T15">P</text:span><text:span text:style-name="T15">L</text:span><text:span text:style-name="T15">C</text:span><text:span text:style-name="T15">s</text:span><text:span text:style-name="T15"> </text:span><text:span text:style-name="T15">|</text:span><text:span text:style-name="T15"> </text:span><text:span text:style-name="T15">D</text:span><text:span text:style-name="T15">i</text:span><text:span text:style-name="T15">g</text:span><text:span text:style-name="T15">i</text:span><text:span text:style-name="T15">t</text:span><text:span text:style-name="T15">a</text:span><text:span text:style-name="T15">l</text:span><text:span text:style-name="T15"> </text:span><text:span text:style-name="T15">E</text:span><text:span text:style-name="T15">l</text:span><text:span text:style-name="T15">e</text:span><text:span text:style-name="T15">c</text:span><text:span text:style-name="T15">t</text:span><text:span text:style-name="T15">r</text:span><text:span text:style-name="T15">o</text:span><text:span text:style-name="T15">n</text:span><text:span text:style-name="T15">i</text:span><text:span text:style-name="T15">c</text:span><text:span text:style-name="T15">s</text:span><text:span text:style-name="T15"> </text:span><text:span text:style-name="T15">|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text:span text:style-name="T15">l</text:span><text:span text:style-name="T15">e</text:span><text:span text:style-name="T15">r</text:span><text:span text:style-name="T15">s</text:span><text:span text:style-name="T15"> </text:span><text:span text:style-name="T15">L</text:span><text:span text:style-name="T15">a</text:span><text:span text:style-name="T15">b</text:span><text:span text:style-name="T15">o</text:span><text:span text:style-name="T15">r</text:span><text:span text:style-name="T15">a</text:span><text:span text:style-name="T15">t</text:span><text:span text:style-name="T15">o</text:span><text:span text:style-name="T15">r</text:span><text:span text:style-name="T15">y</text:span><text:span text:style-name="T15"> </text:span><text:span text:style-name="T15">|</text:span><text:span text:style-name="T15"> </text:span><text:span text:style-name="T15">S</text:span><text:span text:style-name="T15">e</text:span><text:span text:style-name="T15">n</text:span><text:span text:style-name="T15">s</text:span><text:span text:style-name="T15">o</text:span><text:span text:style-name="T15">r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s</text:span></text:p>
              </text:list-item>
            </text:list>
          </draw:text-box>
        </draw:frame>
        <draw:frame draw:style-name="gr11" draw:text-style-name="P11" draw:layer="layout" svg:width="18.491cm" svg:height="11.834cm" svg:x="1.234cm" svg:y="10.661cm">
          <draw:text-box>
            <text:p text:style-name="P12"><text:span text:style-name="T9">Data </text:span><text:span text:style-name="T9">Scientist </text:span><text:span text:style-name="T9">Masterarb</text:span><text:span text:style-name="T9">eit </text:span><text:span text:style-name="T10">BMW &amp; </text:span><text:span text:style-name="T10">Deutsches </text:span><text:span text:style-name="T10">Forschungszen</text:span><text:span text:style-name="T10">trum für KI </text:span><text:span text:style-name="T10">(DFKI)</text:span><text:span text:style-name="T10"><text:tab/></text:span><text:span text:style-name="T24">03/2026 – </text:span><text:span text:style-name="T24">09/2026</text:span><text:span text:style-name="T24"><text:tab/></text:span><text:span text:style-name="T24">Munich, </text:span><text:span text:style-name="T24">Germany</text:span><text:span text:style-name="T25"> </text:span></text:p>
            <text:list text:style-name="L1">
              <text:list-item>
                <text:p text:style-name="P13"><text:span text:style-name="T26">Topic:</text:span><text:span text:style-name="T27"> </text:span><text:span text:style-name="T28">Evalu</text:span><text:span text:style-name="T28">ating </text:span><text:span text:style-name="T28">Multi</text:span><text:span text:style-name="T28">-Turn </text:span><text:span text:style-name="T28">Agen</text:span><text:span text:style-name="T28">tic </text:span><text:span text:style-name="T28">RAG </text:span><text:span text:style-name="T28">Syste</text:span><text:span text:style-name="T28">ms: A </text:span><text:span text:style-name="T28">Synth</text:span><text:span text:style-name="T28">etic </text:span><text:span text:style-name="T28">Benc</text:span><text:span text:style-name="T28">hmar</text:span><text:span text:style-name="T28">k </text:span><text:span text:style-name="T28">Gene</text:span><text:span text:style-name="T28">ratio</text:span><text:span text:style-name="T28">n </text:span><text:span text:style-name="T28">Appr</text:span><text:span text:style-name="T28">oach.</text:span></text:p>
              </text:list-item>
              <text:list-item>
                <text:p text:style-name="P13"><text:span text:style-name="T29">Architect</text:span><text:span text:style-name="T29">ed a </text:span><text:span text:style-name="T29">mod</text:span><text:span text:style-name="T29">ular </text:span><text:span text:style-name="T29">evalu</text:span><text:span text:style-name="T29">ation </text:span><text:span text:style-name="T29">fram</text:span><text:span text:style-name="T29">ewor</text:span><text:span text:style-name="T29">k for </text:span><text:span text:style-name="T19">tool-</text:span><text:span text:style-name="T19">using </text:span><text:span text:style-name="T19">Agen</text:span><text:span text:style-name="T19">tic </text:span><text:span text:style-name="T19">RAG</text:span><text:span text:style-name="T29"> </text:span><text:span text:style-name="T29">syste</text:span><text:span text:style-name="T29">ms to </text:span><text:span text:style-name="T29">enabl</text:span><text:span text:style-name="T29">e </text:span><text:span text:style-name="T29">fine-</text:span><text:span text:style-name="T29">grain</text:span><text:span text:style-name="T29">ed </text:span><text:span text:style-name="T29">failur</text:span><text:span text:style-name="T29">e </text:span><text:span text:style-name="T29">locali</text:span><text:span text:style-name="T29">zatio</text:span><text:span text:style-name="T29">n.</text:span></text:p>
              </text:list-item>
              <text:list-item>
                <text:p text:style-name="P13"><text:span text:style-name="T29">Built a </text:span><text:span text:style-name="T19">multi</text:span><text:span text:style-name="T19">-turn </text:span><text:span text:style-name="T19">synth</text:span><text:span text:style-name="T19">etic </text:span><text:span text:style-name="T19">benc</text:span><text:span text:style-name="T19">hmar</text:span><text:span text:style-name="T19">k </text:span><text:span text:style-name="T29">that </text:span><text:span text:style-name="T29">comb</text:span><text:span text:style-name="T29">ines </text:span><text:span text:style-name="T29">deter</text:span><text:span text:style-name="T29">minis</text:span><text:span text:style-name="T29">tic </text:span><text:span text:style-name="T19">task </text:span><text:span text:style-name="T19">plan</text:span><text:span text:style-name="T19">ning </text:span><text:span text:style-name="T29">with </text:span><text:span text:style-name="T29">diver</text:span><text:span text:style-name="T29">se </text:span><text:span text:style-name="T29">user </text:span><text:span text:style-name="T19">pers</text:span><text:span text:style-name="T19">onas</text:span><text:span text:style-name="T29">.</text:span></text:p>
              </text:list-item>
              <text:list-item>
                <text:p text:style-name="P13"><text:span text:style-name="T29">Engineere</text:span><text:span text:style-name="T29">d an </text:span><text:span text:style-name="T19">unsu</text:span><text:span text:style-name="T19">pervi</text:span><text:span text:style-name="T19">sed </text:span><text:span text:style-name="T19">retri</text:span><text:span text:style-name="T19">eval </text:span><text:span text:style-name="T19">engi</text:span><text:span text:style-name="T19">ne </text:span><text:span text:style-name="T29">to </text:span><text:span text:style-name="T29">audit </text:span><text:span text:style-name="T29">a </text:span><text:span text:style-name="T19">RAG </text:span><text:span text:style-name="T19">syste</text:span><text:span text:style-name="T19">m </text:span><text:span text:style-name="T29">over </text:span><text:span text:style-name="T19">4M </text:span><text:span text:style-name="T19">unan</text:span><text:span text:style-name="T19">notat</text:span><text:span text:style-name="T19">ed </text:span><text:span text:style-name="T29">corp</text:span><text:span text:style-name="T29">orate </text:span><text:span text:style-name="T29">recor</text:span><text:span text:style-name="T29">ds.</text:span></text:p>
              </text:list-item>
            </text:list>
            <text:p text:style-name="P14"><text:span text:style-name="T30"/></text:p>
            <text:p text:style-name="P8"><text:span text:style-name="T9">Data </text:span><text:span text:style-name="T9">Scientist </text:span><text:span text:style-name="T9">Werkstude</text:span><text:span text:style-name="T9">nt </text:span><text:span text:style-name="T10">August-</text:span><text:span text:style-name="T10">Wilhelm </text:span><text:span text:style-name="T10">Scheer </text:span><text:span text:style-name="T10">Institute</text:span><text:span text:style-name="T10"><text:tab/></text:span><text:span text:style-name="T10"><text:tab/></text:span><text:span text:style-name="T10"><text:tab/></text:span><text:span text:style-name="T12">10/2024 – </text:span><text:span text:style-name="T12">02/2026</text:span><text:span text:style-name="T12"><text:tab/></text:span><text:span text:style-name="T12">Saarbrücken, </text:span><text:span text:style-name="T12">Germany</text:span><text:span text:style-name="T13"> </text:span></text:p>
            <text:list text:continue-numbering="true" text:style-name="L1">
              <text:list-item>
                <text:p text:style-name="P9"><text:span text:style-name="T31">Designed </text:span><text:span text:style-name="T31">a </text:span><text:span text:style-name="T26">KG-</text:span><text:span text:style-name="T26">RAG </text:span><text:span text:style-name="T31">over </text:span><text:span text:style-name="T31">unstr</text:span><text:span text:style-name="T31">uctur</text:span><text:span text:style-name="T31">ed </text:span><text:span text:style-name="T31">tech</text:span><text:span text:style-name="T31">nical </text:span><text:span text:style-name="T31">docu</text:span><text:span text:style-name="T31">ment</text:span><text:span text:style-name="T31">ation </text:span><text:span text:style-name="T31">and a </text:span><text:span text:style-name="T26">Plan</text:span><text:span text:style-name="T26">ning </text:span><text:span text:style-name="T26">Agen</text:span><text:span text:style-name="T26">t</text:span><text:span text:style-name="T31">, </text:span><text:span text:style-name="T31">using </text:span><text:span text:style-name="T26">Lang</text:span><text:span text:style-name="T26">Chai</text:span><text:span text:style-name="T26">n</text:span><text:span text:style-name="T31"> </text:span><text:span text:style-name="T31">and </text:span><text:span text:style-name="T26">Hugg</text:span><text:span text:style-name="T26">ingFa</text:span><text:span text:style-name="T26">ce</text:span><text:span text:style-name="T31">.</text:span></text:p>
              </text:list-item>
              <text:list-item>
                <text:p text:style-name="P9"><text:span text:style-name="T14">Develope</text:span><text:span text:style-name="T14">d an </text:span><text:span text:style-name="T19">Auto</text:span><text:span text:style-name="T19">enco</text:span><text:span text:style-name="T19">der</text:span><text:span text:style-name="T14"> </text:span><text:span text:style-name="T14">mod</text:span><text:span text:style-name="T14">el for </text:span><text:span text:style-name="T14">real-</text:span><text:span text:style-name="T14">time </text:span><text:span text:style-name="T19">ano</text:span><text:span text:style-name="T19">maly </text:span><text:span text:style-name="T19">dete</text:span><text:span text:style-name="T19">ction</text:span><text:span text:style-name="T14"> </text:span><text:span text:style-name="T14">acros</text:span><text:span text:style-name="T14">s </text:span><text:span text:style-name="T19">distri</text:span><text:span text:style-name="T19">bute</text:span><text:span text:style-name="T19">d </text:span><text:span text:style-name="T19">edge </text:span><text:span text:style-name="T19">devic</text:span><text:span text:style-name="T19">es</text:span><text:span text:style-name="T14"> </text:span><text:span text:style-name="T14">via </text:span><text:span text:style-name="T19">Fede</text:span><text:span text:style-name="T19">rated </text:span><text:span text:style-name="T19">Lear</text:span><text:span text:style-name="T19">ning</text:span><text:span text:style-name="T14">.</text:span></text:p>
              </text:list-item>
            </text:list>
            <text:p text:style-name="P10"><text:span text:style-name="T21"/></text:p>
            <text:p text:style-name="P8"><text:span text:style-name="T9">Cloud </text:span><text:span text:style-name="T9">Software </text:span><text:span text:style-name="T9">Engineer </text:span><text:span text:style-name="T10">Oracle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1/2023 – </text:span><text:span text:style-name="T12">10/2024</text:span><text:span text:style-name="T12"><text:tab/></text:span><text:span text:style-name="T12">Guadalajara, </text:span><text:span text:style-name="T12">Mexico</text:span><text:span text:style-name="T13"> </text:span></text:p>
            <text:list text:continue-numbering="true" text:style-name="L1">
              <text:list-item>
                <text:p text:style-name="P9"><text:span text:style-name="T33">Worked </text:span><text:span text:style-name="T33">on </text:span><text:span text:style-name="T33">the </text:span><text:span text:style-name="T34">Oracl</text:span><text:span text:style-name="T34">e </text:span><text:span text:style-name="T34">Clou</text:span><text:span text:style-name="T34">d </text:span><text:span text:style-name="T34">Infra</text:span><text:span text:style-name="T34">struc</text:span><text:span text:style-name="T34">ture </text:span><text:span text:style-name="T33">in </text:span><text:span text:style-name="T33">the </text:span><text:span text:style-name="T33">team </text:span><text:span text:style-name="T33">of </text:span><text:span text:style-name="T34">Big </text:span><text:span text:style-name="T34">Data </text:span><text:span text:style-name="T34">Servi</text:span><text:span text:style-name="T34">ce</text:span><text:span text:style-name="T33"> in </text:span><text:span text:style-name="T34">Oracl</text:span><text:span text:style-name="T34">e </text:span><text:span text:style-name="T34">Anal</text:span><text:span text:style-name="T34">ytics</text:span><text:span text:style-name="T33">.</text:span><text:span text:style-name="T14"> </text:span></text:p>
              </text:list-item>
              <text:list-item>
                <text:p text:style-name="P9"><text:span text:style-name="T31">Built, </text:span><text:span text:style-name="T31">opti</text:span><text:span text:style-name="T31">mize</text:span><text:span text:style-name="T31">d, </text:span><text:span text:style-name="T31">and </text:span><text:span text:style-name="T31">main</text:span><text:span text:style-name="T31">taine</text:span><text:span text:style-name="T31">d </text:span><text:span text:style-name="T31">auto</text:span><text:span text:style-name="T31">mate</text:span><text:span text:style-name="T31">d </text:span><text:span text:style-name="T26">CI/C</text:span><text:span text:style-name="T26">D </text:span><text:span text:style-name="T26">testi</text:span><text:span text:style-name="T26">ng </text:span><text:span text:style-name="T26">pipel</text:span><text:span text:style-name="T26">ines</text:span><text:span text:style-name="T31"> </text:span><text:span text:style-name="T31">and </text:span><text:span text:style-name="T26">tools</text:span><text:span text:style-name="T31"> </text:span><text:span text:style-name="T31">for </text:span><text:span text:style-name="T31">depl</text:span><text:span text:style-name="T31">oying </text:span><text:span text:style-name="T26">large</text:span><text:span text:style-name="T26">-</text:span><text:span text:style-name="T26">scale </text:span><text:span text:style-name="T26">big </text:span><text:span text:style-name="T26">data </text:span><text:span text:style-name="T26">clust</text:span><text:span text:style-name="T26">ers.</text:span></text:p>
              </text:list-item>
            </text:list>
            <text:p text:style-name="P10"><text:span text:style-name="T21"/></text:p>
            <text:p text:style-name="P8"><text:span text:style-name="T9">Data </text:span><text:span text:style-name="T9">Analyst </text:span><text:span text:style-name="T9">Intern </text:span><text:span text:style-name="T10">BMW </text:span><text:span text:style-name="T10">Group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03/2023 – </text:span><text:span text:style-name="T12">09/2023</text:span><text:span text:style-name="T12"><text:tab/></text:span><text:span text:style-name="T12">Munich, </text:span><text:span text:style-name="T12">Germany</text:span><text:span text:style-name="T13"> </text:span></text:p>
            <text:list text:continue-numbering="true" text:style-name="L1">
              <text:list-item>
                <text:p text:style-name="P9"><text:span text:style-name="T31">Develope</text:span><text:span text:style-name="T31">d a </text:span><text:span text:style-name="T31">high-</text:span><text:span text:style-name="T31">accur</text:span><text:span text:style-name="T31">acy </text:span><text:span text:style-name="T26">ano</text:span><text:span text:style-name="T26">maly </text:span><text:span text:style-name="T26">dete</text:span><text:span text:style-name="T26">ction </text:span><text:span text:style-name="T26">algor</text:span><text:span text:style-name="T26">ithm</text:span><text:span text:style-name="T31"> </text:span><text:span text:style-name="T31">speci</text:span><text:span text:style-name="T31">alize</text:span><text:span text:style-name="T31">d in </text:span><text:span text:style-name="T31">ident</text:span><text:span text:style-name="T31">ifying </text:span><text:span text:style-name="T26">exter</text:span><text:span text:style-name="T26">nal </text:span><text:span text:style-name="T26">batte</text:span><text:span text:style-name="T26">ry </text:span><text:span text:style-name="T26">repla</text:span><text:span text:style-name="T26">ceme</text:span><text:span text:style-name="T26">nts</text:span><text:span text:style-name="T31">.</text:span></text:p>
              </text:list-item>
              <text:list-item>
                <text:p text:style-name="P9"><text:span text:style-name="T31">Engineere</text:span><text:span text:style-name="T31">d </text:span><text:span text:style-name="T26">time-</text:span><text:span text:style-name="T26">serie</text:span><text:span text:style-name="T26">s </text:span><text:span text:style-name="T26">data </text:span><text:span text:style-name="T26">pipel</text:span><text:span text:style-name="T26">ines</text:span><text:span text:style-name="T31"> </text:span><text:span text:style-name="T31">using </text:span><text:span text:style-name="T26">PySp</text:span><text:span text:style-name="T26">ark</text:span><text:span text:style-name="T31"> </text:span><text:span text:style-name="T31">to </text:span><text:span text:style-name="T31">proc</text:span><text:span text:style-name="T31">ess </text:span><text:span text:style-name="T31">raw </text:span><text:span text:style-name="T31">vehic</text:span><text:span text:style-name="T31">le </text:span><text:span text:style-name="T31">tele</text:span><text:span text:style-name="T31">metr</text:span><text:span text:style-name="T31">y and </text:span><text:span text:style-name="T31">cloud </text:span><text:span text:style-name="T31">logs.</text:span></text:p>
              </text:list-item>
              <text:list-item>
                <text:p text:style-name="P9"><text:span text:style-name="T31">Optimize</text:span><text:span text:style-name="T31">d </text:span><text:span text:style-name="T31">data </text:span><text:span text:style-name="T31">flows</text:span><text:span text:style-name="T31">, </text:span><text:span text:style-name="T31">resol</text:span><text:span text:style-name="T31">ving </text:span><text:span text:style-name="T31">missi</text:span><text:span text:style-name="T31">ng </text:span><text:span text:style-name="T31">data</text:span><text:span text:style-name="T31">base </text:span><text:span text:style-name="T31">value</text:span><text:span text:style-name="T31">s to </text:span><text:span text:style-name="T31">incre</text:span><text:span text:style-name="T31">ase </text:span><text:span text:style-name="T31">data </text:span><text:span text:style-name="T31">relia</text:span><text:span text:style-name="T31">bility </text:span><text:span text:style-name="T31">and a </text:span><text:span text:style-name="T26">62% </text:span><text:span text:style-name="T26">incre</text:span><text:span text:style-name="T26">ase </text:span><text:span text:style-name="T26">in </text:span><text:span text:style-name="T26">servi</text:span><text:span text:style-name="T26">ce </text:span><text:span text:style-name="T26">utiliz</text:span><text:span text:style-name="T26">ation</text:span><text:span text:style-name="T31">.</text:span></text:p>
              </text:list-item>
              <text:list-item>
                <text:p text:style-name="P9"><text:span text:style-name="T33">Allowed </text:span><text:span text:style-name="T33">adjus</text:span><text:span text:style-name="T33">ting </text:span><text:span text:style-name="T33">predi</text:span><text:span text:style-name="T33">ctive </text:span><text:span text:style-name="T33">mod</text:span><text:span text:style-name="T33">el </text:span><text:span text:style-name="T33">para</text:span><text:span text:style-name="T33">mete</text:span><text:span text:style-name="T33">rs </text:span><text:span text:style-name="T33">and </text:span><text:span text:style-name="T33">recei</text:span><text:span text:style-name="T33">ve </text:span><text:span text:style-name="T34">real-</text:span><text:span text:style-name="T34">time </text:span><text:span text:style-name="T34">syste</text:span><text:span text:style-name="T34">m </text:span><text:span text:style-name="T34">perfo</text:span><text:span text:style-name="T34">rman</text:span><text:span text:style-name="T34">ce</text:span><text:span text:style-name="T33"> </text:span><text:span text:style-name="T33">outp</text:span><text:span text:style-name="T33">uts in </text:span><text:span text:style-name="T33">unde</text:span><text:span text:style-name="T33">r 8 </text:span><text:span text:style-name="T33">seco</text:span><text:span text:style-name="T33">nds.</text:span></text:p>
              </text:list-item>
            </text:list>
            <text:p text:style-name="P10"><text:span text:style-name="T21"/></text:p>
            <text:p text:style-name="P8"><text:span text:style-name="T9">Site </text:span><text:span text:style-name="T9">Reliability </text:span><text:span text:style-name="T9">Engineer </text:span><text:span text:style-name="T10">Xira</text:span><text:span text:style-name="T35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01/2022 – </text:span><text:span text:style-name="T12">04/2022</text:span><text:span text:style-name="T12"><text:tab/></text:span><text:span text:style-name="T12">Mexico City, </text:span><text:span text:style-name="T12">Mexico</text:span><text:span text:style-name="T13"> </text:span></text:p>
            <text:list text:continue-numbering="true" text:style-name="L1">
              <text:list-item>
                <text:p text:style-name="P9"><text:span text:style-name="T19">Managed </text:span><text:span text:style-name="T14">over </text:span><text:span text:style-name="T14">10 </text:span><text:span text:style-name="T14">serve</text:span><text:span text:style-name="T14">rs, </text:span><text:span text:style-name="T19">moni</text:span><text:span text:style-name="T19">tored </text:span><text:span text:style-name="T14">servi</text:span><text:span text:style-name="T14">ces </text:span><text:span text:style-name="T14">and </text:span><text:span text:style-name="T19">enha</text:span><text:span text:style-name="T19">nced </text:span><text:span text:style-name="T14">engin</text:span><text:span text:style-name="T14">eerin</text:span><text:span text:style-name="T14">g </text:span><text:span text:style-name="T14">proc</text:span><text:span text:style-name="T14">esses</text:span><text:span text:style-name="T14">. </text:span></text:p>
              </text:list-item>
              <text:list-item>
                <text:p text:style-name="P9"><text:span text:style-name="T14">Built a </text:span><text:span text:style-name="T19">platf</text:span><text:span text:style-name="T19">orm </text:span><text:span text:style-name="T14">to </text:span><text:span text:style-name="T14">man</text:span><text:span text:style-name="T14">age </text:span><text:span text:style-name="T14">client </text:span><text:span text:style-name="T19">APIs</text:span><text:span text:style-name="T14">, </text:span><text:span text:style-name="T14">integ</text:span><text:span text:style-name="T14">ratin</text:span><text:span text:style-name="T14">g </text:span><text:span text:style-name="T14">paym</text:span><text:span text:style-name="T14">ents </text:span><text:span text:style-name="T14">and </text:span><text:span text:style-name="T14">subsc</text:span><text:span text:style-name="T14">riptio</text:span><text:span text:style-name="T14">n </text:span><text:span text:style-name="T14">syste</text:span><text:span text:style-name="T14">ms </text:span><text:span text:style-name="T14">using </text:span><text:span text:style-name="T19">Next</text:span><text:span text:style-name="T19">JS</text:span><text:span text:style-name="T14">, </text:span><text:span text:style-name="T19">Strip</text:span><text:span text:style-name="T19">e </text:span><text:span text:style-name="T14">and </text:span><text:span text:style-name="T19">Dock</text:span><text:span text:style-name="T19">er</text:span><text:span text:style-name="T14">. </text:span></text:p>
              </text:list-item>
            </text:list>
            <text:p text:style-name="P10"><text:span text:style-name="T21"/></text:p>
            <text:p text:style-name="P8"><text:span text:style-name="T36">Production </text:span><text:span text:style-name="T36">Engineer </text:span><text:span text:style-name="T9">Fellow </text:span><text:span text:style-name="T10">Major League </text:span><text:span text:style-name="T10">Hacking &amp; </text:span><text:span text:style-name="T10">Meta</text:span><text:span text:style-name="T32"><text:tab/></text:span><text:span text:style-name="T11"><text:tab/></text:span><text:span text:style-name="T11"><text:tab/></text:span><text:span text:style-name="T12">06/2021 – </text:span><text:span text:style-name="T12">09/2021</text:span><text:span text:style-name="T12"><text:tab/></text:span><text:span text:style-name="T12">New </text:span><text:span text:style-name="T12">York, USA</text:span><text:span text:style-name="T14"> </text:span></text:p>
            <text:list text:continue-numbering="true" text:style-name="L1">
              <text:list-item>
                <text:p text:style-name="P13"><text:span text:style-name="T37">Selected </text:span><text:span text:style-name="T37">amo</text:span><text:span text:style-name="T37">ng </text:span><text:span text:style-name="T37">120 </text:span><text:span text:style-name="T37">out </text:span><text:span text:style-name="T37">of </text:span><text:span text:style-name="T37">20,00</text:span><text:span text:style-name="T37">0 </text:span><text:span text:style-name="T37">appli</text:span><text:span text:style-name="T37">cants</text:span><text:span text:style-name="T37">. </text:span><text:span text:style-name="T38">Impl</text:span><text:span text:style-name="T38">eme</text:span><text:span text:style-name="T38">nted </text:span><text:span text:style-name="T38">moni</text:span><text:span text:style-name="T38">torin</text:span><text:span text:style-name="T38">g </text:span><text:span text:style-name="T38">with</text:span><text:span text:style-name="T14"> </text:span><text:span text:style-name="T19">Prom</text:span><text:span text:style-name="T19">ethe</text:span><text:span text:style-name="T19">us </text:span><text:span text:style-name="T14">and </text:span><text:span text:style-name="T19">Grafa</text:span><text:span text:style-name="T19">na</text:span><text:span text:style-name="T14">.</text:span><text:span text:style-name="T21"> </text:span></text:p>
              </text:list-item>
              <text:list-item>
                <text:p text:style-name="P9"><text:span text:style-name="T14">Automate</text:span><text:span text:style-name="T14">d </text:span><text:span text:style-name="T19">CI/C</text:span><text:span text:style-name="T19">D </text:span><text:span text:style-name="T14">work</text:span><text:span text:style-name="T14">flow </text:span><text:span text:style-name="T38">for </text:span><text:span text:style-name="T38">effici</text:span><text:span text:style-name="T38">ent </text:span><text:span text:style-name="T38">depl</text:span><text:span text:style-name="T38">oyme</text:span><text:span text:style-name="T38">nt <text:s/>to </text:span><text:span text:style-name="T38">a </text:span><text:span text:style-name="T38">prod</text:span><text:span text:style-name="T38">uctio</text:span><text:span text:style-name="T38">n </text:span><text:span text:style-name="T38">serve</text:span><text:span text:style-name="T38">r </text:span><text:span text:style-name="T38">using </text:span><text:span text:style-name="T38">Dock</text:span><text:span text:style-name="T38">er in </text:span><text:span text:style-name="T38">an </text:span><text:span text:style-name="T39">AWS </text:span><text:span text:style-name="T39">EC2 </text:span><text:span text:style-name="T38">insta</text:span><text:span text:style-name="T38">nce</text:span></text:p>
              </text:list-item>
            </text:list>
            <text:p text:style-name="P10"><text:span text:style-name="T21"/></text:p>
            <text:p text:style-name="P8"><text:span text:style-name="T9">Full Stack </text:span><text:span text:style-name="T9">&amp; Data </text:span><text:span text:style-name="T9">Engineer <text:s/></text:span><text:span text:style-name="T10">Jiit </text:span><text:span text:style-name="T10">Technologies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0/2020 – </text:span><text:span text:style-name="T12">06/2021</text:span><text:span text:style-name="T12"><text:tab/></text:span><text:span text:style-name="T12">Guadalajara, </text:span><text:span text:style-name="T12">Mexico</text:span><text:span text:style-name="T13"> </text:span></text:p>
            <text:list text:continue-numbering="true" text:style-name="L1">
              <text:list-item>
                <text:p text:style-name="P9"><text:span text:style-name="T38">Designed </text:span><text:span text:style-name="T38">a </text:span><text:span text:style-name="T38">custo</text:span><text:span text:style-name="T38">m </text:span><text:span text:style-name="T38">sales </text:span><text:span text:style-name="T38">data </text:span><text:span text:style-name="T38">analy</text:span><text:span text:style-name="T38">sis </text:span><text:span text:style-name="T38">pipeli</text:span><text:span text:style-name="T38">ne </text:span><text:span text:style-name="T38">API </text:span><text:span text:style-name="T38">using </text:span><text:span text:style-name="T19">Flask</text:span><text:span text:style-name="T14">, </text:span><text:span text:style-name="T19">SciPy </text:span><text:span text:style-name="T14">and </text:span><text:span text:style-name="T19">Prop</text:span><text:span text:style-name="T19">het</text:span><text:span text:style-name="T14">.</text:span><text:span text:style-name="T21"> </text:span></text:p>
              </text:list-item>
              <text:list-item>
                <text:p text:style-name="P9"><text:span text:style-name="T14">Built an </text:span><text:span text:style-name="T19">ERP </text:span><text:span text:style-name="T14">platf</text:span><text:span text:style-name="T14">orm </text:span><text:span text:style-name="T14">from </text:span><text:span text:style-name="T14">scrat</text:span><text:span text:style-name="T14">ch to </text:span><text:span text:style-name="T14">man</text:span><text:span text:style-name="T14">age </text:span><text:span text:style-name="T14">inven</text:span><text:span text:style-name="T14">tory, </text:span><text:span text:style-name="T14">hum</text:span><text:span text:style-name="T14">an </text:span><text:span text:style-name="T14">resou</text:span><text:span text:style-name="T14">rces, </text:span><text:span text:style-name="T14">ship</text:span><text:span text:style-name="T14">ment</text:span><text:span text:style-name="T14">s, </text:span><text:span text:style-name="T14">inco</text:span><text:span text:style-name="T14">me </text:span><text:span text:style-name="T14">and </text:span><text:span text:style-name="T14">expe</text:span><text:span text:style-name="T14">nses. </text:span><text:span text:style-name="T19">Angu</text:span><text:span text:style-name="T19">lar</text:span><text:span text:style-name="T14">. </text:span></text:p>
              </text:list-item>
            </text:list>
          </draw:text-box>
        </draw:frame>
        <draw:frame draw:style-name="gr12" draw:text-style-name="P17" draw:layer="layout" svg:width="18.452cm" svg:height="4.052cm" svg:x="1.239cm" svg:y="23.092cm">
          <draw:text-box>
            <text:p text:style-name="P14"><text:span text:style-name="T40">VectorDri</text:span><text:span text:style-name="T40">ve-</text:span><text:span text:style-name="T40">Route: </text:span><text:span text:style-name="T40">Autonom</text:span><text:span text:style-name="T40">ous BEV </text:span><text:span text:style-name="T40">Trajector</text:span><text:span text:style-name="T40">y </text:span><text:span text:style-name="T40">Planning</text:span><text:span text:style-name="T41"><text:tab/></text:span></text:p>
            <text:list text:style-name="L1">
              <text:list-item>
                <text:p text:style-name="P15"><text:span text:style-name="T42">Built a </text:span><text:span text:style-name="T43">Py</text:span><text:span text:style-name="T43">To</text:span><text:span text:style-name="T43">rc</text:span><text:span text:style-name="T43">h</text:span><text:span text:style-name="T42"> </text:span><text:span text:style-name="T42">pi</text:span><text:span text:style-name="T42">pel</text:span><text:span text:style-name="T42">ine </text:span><text:span text:style-name="T42">usi</text:span><text:span text:style-name="T42">ng </text:span><text:span text:style-name="T43">nu</text:span><text:span text:style-name="T43">Sc</text:span><text:span text:style-name="T43">en</text:span><text:span text:style-name="T43">es</text:span><text:span text:style-name="T42">, </text:span><text:span text:style-name="T43">Re</text:span><text:span text:style-name="T43">sN</text:span><text:span text:style-name="T43">et</text:span><text:span text:style-name="T42"> </text:span><text:span text:style-name="T42">an</text:span><text:span text:style-name="T42">d </text:span><text:span text:style-name="T43">de</text:span><text:span text:style-name="T43">pt</text:span><text:span text:style-name="T43">h </text:span><text:span text:style-name="T43">lift</text:span><text:span text:style-name="T43">in</text:span><text:span text:style-name="T43">g</text:span><text:span text:style-name="T42"> </text:span><text:span text:style-name="T42">to </text:span><text:span text:style-name="T42">m</text:span><text:span text:style-name="T42">ap </text:span><text:span text:style-name="T42">m</text:span><text:span text:style-name="T42">ult</text:span><text:span text:style-name="T42">i-</text:span><text:span text:style-name="T42">ca</text:span><text:span text:style-name="T42">m</text:span><text:span text:style-name="T42">er</text:span><text:span text:style-name="T42">a </text:span><text:span text:style-name="T42">fe</text:span><text:span text:style-name="T42">ed</text:span><text:span text:style-name="T42">s </text:span><text:span text:style-name="T42">int</text:span><text:span text:style-name="T42">o a </text:span><text:span text:style-name="T43">Bir</text:span><text:span text:style-name="T43">d’s</text:span><text:span text:style-name="T43">-</text:span><text:span text:style-name="T43">Ey</text:span><text:span text:style-name="T43">e-</text:span><text:span text:style-name="T43">Vi</text:span><text:span text:style-name="T43">ew</text:span><text:span text:style-name="T42"> </text:span><text:span text:style-name="T42">gri</text:span><text:span text:style-name="T42">d.</text:span></text:p>
              </text:list-item>
              <text:list-item>
                <text:p text:style-name="P15"><text:span text:style-name="T42">Design</text:span><text:span text:style-name="T42">ed </text:span><text:span text:style-name="T42">a </text:span><text:span text:style-name="T43">te</text:span><text:span text:style-name="T43">m</text:span><text:span text:style-name="T43">po</text:span><text:span text:style-name="T43">ral </text:span><text:span text:style-name="T43">m</text:span><text:span text:style-name="T43">oti</text:span><text:span text:style-name="T43">on </text:span><text:span text:style-name="T43">pl</text:span><text:span text:style-name="T43">an</text:span><text:span text:style-name="T43">ni</text:span><text:span text:style-name="T43">ng </text:span><text:span text:style-name="T43">he</text:span><text:span text:style-name="T43">ad</text:span><text:span text:style-name="T42"> </text:span><text:span text:style-name="T42">wi</text:span><text:span text:style-name="T42">th </text:span><text:span text:style-name="T43">dri</text:span><text:span text:style-name="T43">va</text:span><text:span text:style-name="T43">bl</text:span><text:span text:style-name="T43">e-</text:span><text:span text:style-name="T43">ar</text:span><text:span text:style-name="T43">ea </text:span><text:span text:style-name="T43">an</text:span><text:span text:style-name="T43">d </text:span><text:span text:style-name="T43">oc</text:span><text:span text:style-name="T43">cu</text:span><text:span text:style-name="T43">pa</text:span><text:span text:style-name="T43">nc</text:span><text:span text:style-name="T43">y </text:span><text:span text:style-name="T43">de</text:span><text:span text:style-name="T43">co</text:span><text:span text:style-name="T43">de</text:span><text:span text:style-name="T43">rs</text:span><text:span text:style-name="T42"> </text:span><text:span text:style-name="T42">to </text:span><text:span text:style-name="T42">ge</text:span><text:span text:style-name="T42">ne</text:span><text:span text:style-name="T42">rat</text:span><text:span text:style-name="T42">e </text:span><text:span text:style-name="T42">saf</text:span><text:span text:style-name="T42">e </text:span><text:span text:style-name="T42">pa</text:span><text:span text:style-name="T42">ths</text:span><text:span text:style-name="T42">. </text:span></text:p>
                <text:p text:style-name="P15"><text:span text:style-name="T44"/></text:p>
              </text:list-item>
            </text:list>
            <text:p text:style-name="P14"><text:span text:style-name="T40">Daten-</text:span><text:span text:style-name="T40">Mapping</text:span><text:span text:style-name="T40">-</text:span><text:span text:style-name="T40">Framewo</text:span><text:span text:style-name="T40">rk für die </text:span><text:span text:style-name="T40">AAS</text:span><text:span text:style-name="T40"><text:tab/></text:span><text:span text:style-name="T40"><text:tab/></text:span><text:span text:style-name="T40"><text:tab/></text:span><text:span text:style-name="T40"><text:tab/></text:span><text:span text:style-name="T45"><text:a xlink:href="https://doi.org/10.17560/atp.v68i5.2836" xlink:type="simple">DOI: 10.17560/atp.v68i5.2836	</text:a></text:span><text:span text:style-name="T46"><text:tab/></text:span><text:span text:style-name="T46"><text:tab/></text:span></text:p>
            <text:list text:continue-numbering="true" text:style-name="L1">
              <text:list-item>
                <text:p text:style-name="P15"><text:span text:style-name="T47">Develo</text:span><text:span text:style-name="T47">pe</text:span><text:span text:style-name="T47">d a </text:span><text:span text:style-name="T47">m</text:span><text:span text:style-name="T47">ap</text:span><text:span text:style-name="T47">pi</text:span><text:span text:style-name="T47">ng </text:span><text:span text:style-name="T48">fra</text:span><text:span text:style-name="T48">m</text:span><text:span text:style-name="T48">ew</text:span><text:span text:style-name="T48">or</text:span><text:span text:style-name="T48">k</text:span><text:span text:style-name="T47"> </text:span><text:span text:style-name="T47">fro</text:span><text:span text:style-name="T47">m </text:span><text:span text:style-name="T47">sc</text:span><text:span text:style-name="T47">he</text:span><text:span text:style-name="T47">m</text:span><text:span text:style-name="T47">as </text:span><text:span text:style-name="T47">to </text:span><text:span text:style-name="T48">As</text:span><text:span text:style-name="T48">set </text:span><text:span text:style-name="T48">Ad</text:span><text:span text:style-name="T48">mi</text:span><text:span text:style-name="T48">nis</text:span><text:span text:style-name="T48">tra</text:span><text:span text:style-name="T48">tio</text:span><text:span text:style-name="T48">n </text:span><text:span text:style-name="T48">Sh</text:span><text:span text:style-name="T48">ell </text:span><text:span text:style-name="T47">to </text:span><text:span text:style-name="T47">ac</text:span><text:span text:style-name="T47">hie</text:span><text:span text:style-name="T47">ve </text:span><text:span text:style-name="T47">int</text:span><text:span text:style-name="T47">er</text:span><text:span text:style-name="T47">op</text:span><text:span text:style-name="T47">er</text:span><text:span text:style-name="T47">abi</text:span><text:span text:style-name="T47">lity </text:span><text:span text:style-name="T47">in </text:span><text:span text:style-name="T48">In</text:span><text:span text:style-name="T48">du</text:span><text:span text:style-name="T48">str</text:span><text:span text:style-name="T48">y </text:span><text:span text:style-name="T48">4.</text:span><text:span text:style-name="T48">0</text:span><text:span text:style-name="T47">.</text:span></text:p>
              </text:list-item>
              <text:list-item>
                <text:p text:style-name="P15"><text:span text:style-name="T47">Design</text:span><text:span text:style-name="T47">ed </text:span><text:span text:style-name="T47">a </text:span><text:span text:style-name="T47">du</text:span><text:span text:style-name="T47">al </text:span><text:span text:style-name="T47">ali</text:span><text:span text:style-name="T47">gn</text:span><text:span text:style-name="T47">m</text:span><text:span text:style-name="T47">en</text:span><text:span text:style-name="T47">t </text:span><text:span text:style-name="T47">str</text:span><text:span text:style-name="T47">at</text:span><text:span text:style-name="T47">eg</text:span><text:span text:style-name="T47">y </text:span><text:span text:style-name="T47">se</text:span><text:span text:style-name="T47">pa</text:span><text:span text:style-name="T47">rat</text:span><text:span text:style-name="T47">ing </text:span><text:span text:style-name="T47">sta</text:span><text:span text:style-name="T47">nd</text:span><text:span text:style-name="T47">ar</text:span><text:span text:style-name="T47">d </text:span><text:span text:style-name="T48">rel</text:span><text:span text:style-name="T48">ati</text:span><text:span text:style-name="T48">on</text:span><text:span text:style-name="T48">al</text:span><text:span text:style-name="T47"> </text:span><text:span text:style-name="T47">ta</text:span><text:span text:style-name="T47">ble</text:span><text:span text:style-name="T47">s </text:span><text:span text:style-name="T47">fro</text:span><text:span text:style-name="T47">m </text:span><text:span text:style-name="T48">hi</text:span><text:span text:style-name="T48">er</text:span><text:span text:style-name="T48">ar</text:span><text:span text:style-name="T48">chi</text:span><text:span text:style-name="T48">cal</text:span><text:span text:style-name="T47"> </text:span><text:span text:style-name="T47"><text:s/></text:span><text:span text:style-name="T47">as</text:span><text:span text:style-name="T47">set</text:span><text:span text:style-name="T47">s.</text:span></text:p>
                <text:p text:style-name="P15"><text:span text:style-name="T49"/></text:p>
              </text:list-item>
            </text:list>
            <text:p text:style-name="P10"><text:span text:style-name="T50">See Your </text:span><text:span text:style-name="T50">World</text:span></text:p>
            <text:list text:continue-numbering="true" text:style-name="L1">
              <text:list-item>
                <text:p text:style-name="P16"><text:span text:style-name="T14">Crafted </text:span><text:span text:style-name="T14">a </text:span><text:span text:style-name="T14">ha</text:span><text:span text:style-name="T14">ck</text:span><text:span text:style-name="T14">at</text:span><text:span text:style-name="T14">ho</text:span><text:span text:style-name="T14">n </text:span><text:span text:style-name="T19">aw</text:span><text:span text:style-name="T19">ar</text:span><text:span text:style-name="T19">d-</text:span><text:span text:style-name="T19">wi</text:span><text:span text:style-name="T19">nn</text:span><text:span text:style-name="T19">in</text:span><text:span text:style-name="T19">g</text:span><text:span text:style-name="T14"> </text:span><text:span text:style-name="T14">ap</text:span><text:span text:style-name="T14">p </text:span><text:span text:style-name="T14">for </text:span><text:span text:style-name="T14">th</text:span><text:span text:style-name="T14">e </text:span><text:span text:style-name="T19">vis</text:span><text:span text:style-name="T19">ua</text:span><text:span text:style-name="T19">lly </text:span><text:span text:style-name="T19">im</text:span><text:span text:style-name="T19">pa</text:span><text:span text:style-name="T19">ire</text:span><text:span text:style-name="T19">d</text:span><text:span text:style-name="T14">, </text:span><text:span text:style-name="T14">su</text:span><text:span text:style-name="T14">pp</text:span><text:span text:style-name="T14">ort</text:span><text:span text:style-name="T14">ing </text:span><text:span text:style-name="T19">11 </text:span><text:span text:style-name="T19">la</text:span><text:span text:style-name="T19">ng</text:span><text:span text:style-name="T19">ua</text:span><text:span text:style-name="T19">ge</text:span><text:span text:style-name="T19">s</text:span><text:span text:style-name="T14">.</text:span><text:span text:style-name="T51"> </text:span></text:p>
              </text:list-item>
              <text:list-item>
                <text:p text:style-name="P16"><text:span text:style-name="T14">Engine</text:span><text:span text:style-name="T14">er</text:span><text:span text:style-name="T14">ed </text:span><text:span text:style-name="T19">Im</text:span><text:span text:style-name="T19">ag</text:span><text:span text:style-name="T19">e </text:span><text:span text:style-name="T19">Ca</text:span><text:span text:style-name="T19">pti</text:span><text:span text:style-name="T19">on</text:span><text:span text:style-name="T19">in</text:span><text:span text:style-name="T19">g </text:span><text:span text:style-name="T14">DL </text:span><text:span text:style-name="T14">m</text:span><text:span text:style-name="T14">od</text:span><text:span text:style-name="T14">el </text:span><text:span text:style-name="T14">wi</text:span><text:span text:style-name="T14">th </text:span><text:span text:style-name="T19">Te</text:span><text:span text:style-name="T19">ns</text:span><text:span text:style-name="T19">or</text:span><text:span text:style-name="T19">Flo</text:span><text:span text:style-name="T19">w</text:span><text:span text:style-name="T14">, </text:span><text:span text:style-name="T14">de</text:span><text:span text:style-name="T14">pl</text:span><text:span text:style-name="T14">oy</text:span><text:span text:style-name="T14">ed </text:span><text:span text:style-name="T14">usi</text:span><text:span text:style-name="T14">ng </text:span><text:span text:style-name="T19">Fla</text:span><text:span text:style-name="T19">sk, </text:span><text:span text:style-name="T19">Do</text:span><text:span text:style-name="T19">ck</text:span><text:span text:style-name="T19">er, </text:span><text:span text:style-name="T14">an</text:span><text:span text:style-name="T14">d </text:span><text:span text:style-name="T19">Go</text:span><text:span text:style-name="T19">og</text:span><text:span text:style-name="T19">le </text:span><text:span text:style-name="T19">Cl</text:span><text:span text:style-name="T19">ou</text:span><text:span text:style-name="T19">d </text:span><text:span text:style-name="T19">V</text:span><text:span text:style-name="T19">M</text:span><text:span text:style-name="T14">.</text:span></text:p>
              </text:list-item>
            </text:list>
          </draw:text-box>
        </draw:frame>
        <draw:frame draw:style-name="gr9" draw:text-style-name="P3" draw:layer="layout" svg:width="6.019cm" svg:height="0.971cm" svg:x="1.256cm" svg:y="9.899cm">
          <draw:text-box>
            <text:p text:style-name="P2"><text:span text:style-name="T8">W</text:span><text:span text:style-name="T8">O</text:span><text:span text:style-name="T8">R</text:span><text:span text:style-name="T8">K</text:span><text:span text:style-name="T8"> </text:span><text:span text:style-name="T8">E</text:span><text:span text:style-name="T8">X</text:span><text:span text:style-name="T8">P</text:span><text:span text:style-name="T8">E</text:span><text:span text:style-name="T8">R</text:span><text:span text:style-name="T8">I</text:span><text:span text:style-name="T8">E</text:span><text:span text:style-name="T8">N</text:span><text:span text:style-name="T8">C</text:span><text:span text:style-name="T8">E</text:span><text:span text:style-name="T8"> </text:span></text:p>
          </draw:text-box>
        </draw:frame>
        <draw:frame draw:style-name="gr9" draw:text-style-name="P17" draw:layer="layout" svg:width="6.019cm" svg:height="0.971cm" svg:x="1.26cm" svg:y="22.33cm">
          <draw:text-box>
            <text:p text:style-name="P2"><text:span text:style-name="T8">PROJE</text:span><text:span text:style-name="T8">CTS </text:span></text:p>
          </draw:text-box>
        </draw:frame>
        <draw:frame draw:style-name="gr9" draw:text-style-name="P3" draw:layer="layout" svg:width="2.2cm" svg:height="0.971cm" svg:x="1.292cm" svg:y="7.297cm">
          <draw:text-box>
            <text:p text:style-name="P2"><text:span text:style-name="T8">SKILLS </text:span></text:p>
          </draw:text-box>
        </draw:frame>
        <draw:g draw:style-name="gr13">
          <draw:path draw:style-name="gr14" draw:text-style-name="P18" draw:layer="layout" svg:width="2.375cm" svg:height="0.534cm" svg:x="8.627cm" svg:y="8.071cm" svg:viewBox="0 0 2376 535" svg:d="M108 0c-54 0-108 44-108 88v358c0 45 54 89 108 89h2158c55 0 110-44 110-89v-358c0-44-55-88-110-88zM108 0z">
            <text:p/>
          </draw:path>
          <draw:frame draw:style-name="gr15" draw:text-style-name="P20" draw:layer="layout" svg:width="2.375cm" svg:height="0.863cm" svg:x="8.627cm" svg:y="8.071cm">
            <draw:text-box>
              <text:p text:style-name="P19"><text:span text:style-name="T52">Hug</text:span><text:span text:style-name="T52">ging</text:span><text:span text:style-name="T52">Face </text:span></text:p>
            </draw:text-box>
          </draw:frame>
        </draw:g>
        <draw:g draw:style-name="gr13">
          <draw:path draw:style-name="gr14" draw:text-style-name="P18" draw:layer="layout" svg:width="2cm" svg:height="0.534cm" svg:x="4.575cm" svg:y="8.071cm" svg:viewBox="0 0 2001 535" svg:d="M88 0c-44 0-88 44-88 88v358c0 45 44 89 88 89h1825c44 0 88-44 88-89v-358c0-44-44-88-88-88zM88 0z">
            <text:p/>
          </draw:path>
          <draw:frame draw:style-name="gr15" draw:text-style-name="P20" draw:layer="layout" svg:width="2cm" svg:height="0.863cm" svg:x="4.575cm" svg:y="8.071cm">
            <draw:text-box>
              <text:p text:style-name="P19"><text:span text:style-name="T52">LangChain </text:span></text:p>
            </draw:text-box>
          </draw:frame>
        </draw:g>
        <draw:g draw:style-name="gr13">
          <draw:path draw:style-name="gr14" draw:text-style-name="P18" draw:layer="layout" svg:width="2.145cm" svg:height="0.534cm" svg:x="13.94cm" svg:y="8.072cm" svg:viewBox="0 0 2146 535" svg:d="M126 0c-63 0-126 44-126 88v358c0 45 63 89 126 89h1894c63 0 126-44 126-89v-358c0-44-63-88-126-88zM126 0z">
            <text:p/>
          </draw:path>
          <draw:frame draw:style-name="gr16" draw:text-style-name="P20" draw:layer="layout" svg:width="2.145cm" svg:height="0.534cm" svg:x="13.94cm" svg:y="8.072cm">
            <draw:text-box>
              <text:p text:style-name="P19"><text:span text:style-name="T52">Tenso</text:span><text:span text:style-name="T52">rFlow </text:span></text:p>
            </draw:text-box>
          </draw:frame>
        </draw:g>
        <draw:g draw:style-name="gr13">
          <draw:path draw:style-name="gr14" draw:text-style-name="P18" draw:layer="layout" svg:width="1.962cm" svg:height="0.534cm" svg:x="6.622cm" svg:y="8.059cm" svg:viewBox="0 0 1963 535" svg:d="M101 0c-50 0-101 44-101 88v358c0 45 51 89 101 89h1761c50 0 101-44 101-89v-358c0-44-51-88-101-88zM101 0z">
            <text:p/>
          </draw:path>
          <draw:frame draw:style-name="gr16" draw:text-style-name="P20" draw:layer="layout" svg:width="1.962cm" svg:height="0.534cm" svg:x="6.622cm" svg:y="8.059cm">
            <draw:text-box>
              <text:p text:style-name="P19"><text:span text:style-name="T52">LangGra</text:span><text:span text:style-name="T52">ph</text:span></text:p>
            </draw:text-box>
          </draw:frame>
        </draw:g>
        <draw:g draw:style-name="gr13">
          <draw:path draw:style-name="gr14" draw:text-style-name="P18" draw:layer="layout" svg:width="0.5cm" svg:height="0.534cm" svg:x="12.322cm" svg:y="8.071cm" svg:viewBox="0 0 501 535" svg:d="M83 0c-42 0-83 41-83 83v369c0 42 41 83 83 83h335c42 0 83-41 83-83v-369c0-42-41-83-83-83zM83 0z">
            <text:p/>
          </draw:path>
          <draw:frame draw:style-name="gr16" draw:text-style-name="P20" draw:layer="layout" svg:width="0.5cm" svg:height="0.534cm" svg:x="12.322cm" svg:y="8.071cm">
            <draw:text-box>
              <text:p text:style-name="P19"><text:span text:style-name="T52">R </text:span></text:p>
            </draw:text-box>
          </draw:frame>
        </draw:g>
        <draw:frame draw:style-name="gr17" draw:text-style-name="P3" draw:layer="layout" svg:width="1.901cm" svg:height="0.658cm" svg:x="1.274cm" svg:y="8.059cm">
          <draw:text-box>
            <text:p text:style-name="P2"><text:span text:style-name="T53">Data </text:span></text:p>
          </draw:text-box>
        </draw:frame>
        <draw:g draw:style-name="gr13">
          <draw:path draw:style-name="gr18" draw:text-style-name="P21" draw:layer="layout" svg:width="1.6cm" svg:height="0.534cm" svg:x="11.823cm" svg:y="8.71cm" svg:viewBox="0 0 1601 535" svg:d="M88 0c-44 0-88 44-88 88v358c0 45 44 89 88 89h1425c44 0 88-44 88-89v-358c0-44-44-88-88-88zM88 0z">
            <text:p/>
          </draw:path>
          <draw:frame draw:style-name="gr16" draw:text-style-name="P20" draw:layer="layout" svg:width="1.6cm" svg:height="0.534cm" svg:x="11.823cm" svg:y="8.71cm">
            <draw:text-box>
              <text:p text:style-name="P19"><text:span text:style-name="T52">Angular </text:span></text:p>
            </draw:text-box>
          </draw:frame>
        </draw:g>
        <draw:g draw:style-name="gr13">
          <draw:path draw:style-name="gr18" draw:text-style-name="P21" draw:layer="layout" svg:width="1.2cm" svg:height="0.534cm" svg:x="10.572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0.572cm" svg:y="8.71cm">
            <draw:text-box>
              <text:p text:style-name="P19"><text:span text:style-name="T52">React </text:span></text:p>
            </draw:text-box>
          </draw:frame>
        </draw:g>
        <draw:g draw:style-name="gr13">
          <draw:path draw:style-name="gr18" draw:text-style-name="P21" draw:layer="layout" svg:width="1.1cm" svg:height="0.534cm" svg:x="13.519cm" svg:y="8.71cm" svg:viewBox="0 0 1101 535" svg:d="M88 0c-44 0-88 44-88 88v358c0 45 44 89 88 89h924c44 0 89-44 89-89v-358c0-44-45-88-89-88zM88 0z">
            <text:p/>
          </draw:path>
          <draw:frame draw:style-name="gr15" draw:text-style-name="P20" draw:layer="layout" svg:width="1.1cm" svg:height="0.863cm" svg:x="13.519cm" svg:y="8.71cm">
            <draw:text-box>
              <text:p text:style-name="P19"><text:span text:style-name="T52">Flask </text:span></text:p>
            </draw:text-box>
          </draw:frame>
        </draw:g>
        <draw:frame draw:style-name="gr19" draw:text-style-name="P3" draw:layer="layout" svg:width="2.222cm" svg:height="0.641cm" svg:x="1.27cm" svg:y="8.724cm">
          <draw:text-box>
            <text:p text:style-name="P2"><text:span text:style-name="T53">Software</text:span></text:p>
          </draw:text-box>
        </draw:frame>
        <draw:g draw:style-name="gr13">
          <draw:path draw:style-name="gr18" draw:text-style-name="P21" draw:layer="layout" svg:width="1.2cm" svg:height="0.534cm" svg:x="14.666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4.666cm" svg:y="8.71cm">
            <draw:text-box>
              <text:p text:style-name="P19"><text:span text:style-name="T52">Node </text:span></text:p>
            </draw:text-box>
          </draw:frame>
        </draw:g>
        <draw:frame draw:style-name="gr17" draw:text-style-name="P3" draw:layer="layout" svg:width="2.222cm" svg:height="0.658cm" svg:x="1.27cm" svg:y="9.377cm">
          <draw:text-box>
            <text:p text:style-name="P2"><text:span text:style-name="T53">Systems</text:span></text:p>
          </draw:text-box>
        </draw:frame>
        <draw:g draw:style-name="gr13">
          <draw:path draw:style-name="gr20" draw:text-style-name="P18" draw:layer="layout" svg:width="1.2cm" svg:height="0.534cm" svg:x="9.764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9.764cm" svg:y="9.345cm">
            <draw:text-box>
              <text:p text:style-name="P19"><text:span text:style-name="T52">CI/CD </text:span></text:p>
            </draw:text-box>
          </draw:frame>
        </draw:g>
        <draw:g draw:style-name="gr13">
          <draw:path draw:style-name="gr14" draw:text-style-name="P18" draw:layer="layout" svg:width="1cm" svg:height="0.534cm" svg:x="12.914cm" svg:y="8.059cm" svg:viewBox="0 0 1001 535" svg:d="M88 0c-44 0-88 44-88 88v358c0 45 44 89 88 89h824c44 0 89-44 89-89v-358c0-44-45-88-89-88zM88 0z">
            <text:p/>
          </draw:path>
          <draw:frame draw:style-name="gr16" draw:text-style-name="P20" draw:layer="layout" svg:width="1cm" svg:height="0.534cm" svg:x="12.914cm" svg:y="8.059cm">
            <draw:text-box>
              <text:p text:style-name="P19"><text:span text:style-name="T52">SQL </text:span></text:p>
            </draw:text-box>
          </draw:frame>
        </draw:g>
        <draw:g draw:style-name="gr13">
          <draw:path draw:style-name="gr20" draw:text-style-name="P18" draw:layer="layout" svg:width="1.2cm" svg:height="0.534cm" svg:x="3.572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3.572cm" svg:y="9.345cm">
            <draw:text-box>
              <text:p text:style-name="P19"><text:span text:style-name="T52">Linux </text:span></text:p>
            </draw:text-box>
          </draw:frame>
        </draw:g>
        <draw:g draw:style-name="gr13">
          <draw:path draw:style-name="gr18" draw:text-style-name="P21" draw:layer="layout" svg:width="1.869cm" svg:height="0.534cm" svg:x="3.562cm" svg:y="8.707cm" svg:viewBox="0 0 1870 535" svg:d="M118 0c-59 0-118 44-118 88v358c0 45 59 89 118 89h1633c59 0 119-44 119-89v-358c0-44-60-88-119-88zM118 0z">
            <text:p/>
          </draw:path>
          <draw:frame draw:style-name="gr22" draw:text-style-name="P23" draw:layer="layout" svg:width="1.869cm" svg:height="0.534cm" svg:x="3.562cm" svg:y="8.707cm">
            <draw:text-box>
              <text:p text:style-name="P22"><text:span text:style-name="T52">JavaScript</text:span></text:p>
            </draw:text-box>
          </draw:frame>
        </draw:g>
        <draw:frame draw:style-name="gr23" draw:text-style-name="P25" draw:layer="layout" svg:width="2.443cm" svg:height="1.902cm" svg:x="15.153cm" svg:y="27.646cm">
          <draw:text-box>
            <text:p text:style-name="P24"><text:span text:style-name="T54">Spanish <text:s text:c="2"/></text:span><text:span text:style-name="T55">Native</text:span><text:span text:style-name="T56"> </text:span></text:p>
            <text:p text:style-name="P24"><text:span text:style-name="T54">English <text:s text:c="3"/></text:span><text:span text:style-name="T55">C1</text:span><text:span text:style-name="T56"> </text:span></text:p>
            <text:p text:style-name="P24"><text:span text:style-name="T54">German <text:s/></text:span><text:span text:style-name="T55">C1</text:span><text:span text:style-name="T56"> </text:span></text:p>
          </draw:text-box>
        </draw:frame>
        <draw:g draw:style-name="gr24">
          <draw:g draw:style-name="gr13">
            <draw:path draw:style-name="gr25" draw:text-style-name="P26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g draw:style-name="gr24">
          <draw:g draw:style-name="gr13">
            <draw:path draw:style-name="gr27" draw:text-style-name="P2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frame draw:style-name="gr9" draw:text-style-name="P17" draw:layer="layout" svg:width="4.062cm" svg:height="0.971cm" svg:x="15.153cm" svg:y="26.884cm">
          <draw:text-box>
            <text:p text:style-name="P2"><text:span text:style-name="T8">LANGUAGES </text:span></text:p>
          </draw:text-box>
        </draw:frame>
        <draw:frame draw:style-name="gr29" draw:text-style-name="P11" draw:layer="layout" svg:width="13.113cm" svg:height="2.038cm" svg:x="1.292cm" svg:y="27.649cm">
          <draw:text-box>
            <text:list text:style-name="L1">
              <text:list-item>
                <text:p text:style-name="P9"><text:span text:style-name="T14">Mathematics for Data Science Specialization <text:s text:c="2"/></text:span><text:span text:style-name="T14"><text:tab/></text:span><text:span text:style-name="T57">Higher School of Economics <text:s/>- <text:s/>2021</text:span><text:span text:style-name="T14"> </text:span></text:p>
              </text:list-item>
              <text:list-item>
                <text:p text:style-name="P9"><text:span text:style-name="T14">Data Science Professional Certificate</text:span><text:span text:style-name="T14"><text:tab/></text:span><text:span text:style-name="T14"> <text:s text:c="3"/></text:span><text:span text:style-name="T14"><text:tab/></text:span><text:span text:style-name="T57">Harvard <text:s/>- <text:s/>2020</text:span><text:span text:style-name="T14"> </text:span></text:p>
              </text:list-item>
              <text:list-item>
                <text:p text:style-name="P9"><text:span text:style-name="T14">Python Data Science Professional Certificate <text:s/></text:span><text:span text:style-name="T14"><text:tab/></text:span><text:span text:style-name="T57">IBM <text:s/>- 2020</text:span><text:span text:style-name="T14"> </text:span></text:p>
              </text:list-item>
              <text:list-item>
                <text:p text:style-name="P9"><text:span text:style-name="T14">Deep Learning <text:s/>Professional Certificate</text:span><text:span text:style-name="T14"><text:tab/></text:span><text:span text:style-name="T14"> <text:s text:c="3"/></text:span><text:span text:style-name="T14"><text:tab/></text:span><text:span text:style-name="T57">IBM <text:s/>- <text:s/>2020</text:span><text:span text:style-name="T14"> </text:span></text:p>
              </text:list-item>
            </text:list>
          </draw:text-box>
        </draw:frame>
        <draw:frame draw:style-name="gr9" draw:text-style-name="P17" draw:layer="layout" svg:width="6.019cm" svg:height="0.971cm" svg:x="1.26cm" svg:y="26.887cm">
          <draw:text-box>
            <text:p text:style-name="P2"><text:span text:style-name="T8">CERTIFICATIONS </text:span></text:p>
          </draw:text-box>
        </draw:frame>
        <draw:g draw:style-name="gr13">
          <draw:path draw:style-name="gr18" draw:text-style-name="P21" draw:layer="layout" svg:width="2.049cm" svg:height="0.534cm" svg:x="15.92cm" svg:y="8.71cm" svg:viewBox="0 0 2050 535" svg:d="M78 0c-39 0-78 44-78 88v358c0 45 39 89 78 89h1893c39 0 79-44 79-89v-358c0-44-40-88-79-88zM78 0z">
            <text:p/>
          </draw:path>
          <draw:frame draw:style-name="gr15" draw:text-style-name="P20" draw:layer="layout" svg:width="2.049cm" svg:height="0.863cm" svg:x="15.92cm" svg:y="8.71cm">
            <draw:text-box>
              <text:p text:style-name="P19"><text:span text:style-name="T52">Ionic/Tauri</text:span></text:p>
            </draw:text-box>
          </draw:frame>
        </draw:g>
        <draw:g draw:style-name="gr13">
          <draw:path draw:style-name="gr20" draw:text-style-name="P18" draw:layer="layout" svg:width="1.5cm" svg:height="0.534cm" svg:x="4.85cm" svg:y="9.345cm" svg:viewBox="0 0 1501 535" svg:d="M88 0c-44 0-88 44-88 88v358c0 45 44 89 88 89h1325c44 0 88-44 88-89v-358c0-44-44-88-88-88zM88 0z">
            <text:p/>
          </draw:path>
          <draw:frame draw:style-name="gr21" draw:text-style-name="P20" draw:layer="layout" svg:width="1.5cm" svg:height="0.534cm" svg:x="4.85cm" svg:y="9.345cm">
            <draw:text-box>
              <text:p text:style-name="P19"><text:span text:style-name="T52">Docker </text:span></text:p>
            </draw:text-box>
          </draw:frame>
        </draw:g>
        <draw:g draw:style-name="gr24">
          <draw:g draw:style-name="gr13">
            <draw:path draw:style-name="gr25" draw:text-style-name="P26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30" draw:text-style-name="P28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M188 89z">
              <text:p/>
            </draw:path>
            <draw:path draw:style-name="gr31" draw:text-style-name="P17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">
              <text:p/>
            </draw:path>
          </draw:g>
          <draw:g draw:style-name="gr13">
            <draw:path draw:style-name="gr25" draw:text-style-name="P26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</draw:g>
        <draw:g draw:style-name="gr13">
          <draw:path draw:style-name="gr20" draw:text-style-name="P18" draw:layer="layout" svg:width="1.016cm" svg:height="0.534cm" svg:x="8.67cm" svg:y="9.345cm" svg:viewBox="0 0 1017 535" svg:d="M88 0c-44 0-88 44-88 88v358c0 45 44 89 88 89h841c44 0 88-44 88-89v-358c0-44-44-88-88-88zM88 0z">
            <text:p/>
          </draw:path>
          <draw:frame draw:style-name="gr21" draw:text-style-name="P20" draw:layer="layout" svg:width="1.016cm" svg:height="0.534cm" svg:x="8.67cm" svg:y="9.345cm">
            <draw:text-box>
              <text:p text:style-name="P19"><text:span text:style-name="T52">AWS </text:span></text:p>
            </draw:text-box>
          </draw:frame>
        </draw:g>
        <draw:g draw:style-name="gr13">
          <draw:path draw:style-name="gr20" draw:text-style-name="P18" draw:layer="layout" svg:width="1.575cm" svg:height="0.534cm" svg:x="15.12cm" svg:y="9.345cm" svg:viewBox="0 0 1576 535" svg:d="M88 0c-44 0-88 44-88 88v358c0 45 44 89 88 89h1399c45 0 89-44 89-89v-358c0-44-44-88-89-88zM88 0z">
            <text:p/>
          </draw:path>
          <draw:frame draw:style-name="gr21" draw:text-style-name="P20" draw:layer="layout" svg:width="1.575cm" svg:height="0.534cm" svg:x="15.12cm" svg:y="9.345cm">
            <draw:text-box>
              <text:p text:style-name="P19"><text:span text:style-name="T52">Arduino </text:span></text:p>
            </draw:text-box>
          </draw:frame>
        </draw:g>
        <draw:g draw:style-name="gr13">
          <draw:path draw:style-name="gr20" draw:text-style-name="P18" draw:layer="layout" svg:width="1.465cm" svg:height="0.534cm" svg:x="11.082cm" svg:y="9.345cm" svg:viewBox="0 0 1466 535" svg:d="M61 0c-30 0-61 44-61 88v358c0 45 31 89 61 89h1343c31 0 62-44 62-89v-358c0-44-31-88-62-88zM61 0z">
            <text:p/>
          </draw:path>
          <draw:frame draw:style-name="gr21" draw:text-style-name="P20" draw:layer="layout" svg:width="1.465cm" svg:height="0.534cm" svg:x="11.082cm" svg:y="9.345cm">
            <draw:text-box>
              <text:p text:style-name="P19"><text:span text:style-name="T52">Grafana</text:span></text:p>
            </draw:text-box>
          </draw:frame>
        </draw:g>
        <draw:g draw:style-name="gr13">
          <draw:path draw:style-name="gr20" draw:text-style-name="P18" draw:layer="layout" svg:width="1.269cm" svg:height="0.534cm" svg:x="12.67cm" svg:y="9.345cm" svg:viewBox="0 0 1270 535" svg:d="M53 0c-26 0-53 44-53 88v358c0 45 27 89 53 89h1163c27 0 54-44 54-89v-358c0-44-27-88-54-88zM53 0z">
            <text:p/>
          </draw:path>
          <draw:frame draw:style-name="gr21" draw:text-style-name="P20" draw:layer="layout" svg:width="1.269cm" svg:height="0.534cm" svg:x="12.67cm" svg:y="9.345cm">
            <draw:text-box>
              <text:p text:style-name="P19"><text:span text:style-name="T52">MQTT</text:span></text:p>
            </draw:text-box>
          </draw:frame>
        </draw:g>
        <draw:g draw:style-name="gr13">
          <draw:path draw:style-name="gr20" draw:text-style-name="P18" draw:layer="layout" svg:width="0.952cm" svg:height="0.534cm" svg:x="14.057cm" svg:y="9.345cm" svg:viewBox="0 0 953 535" svg:d="M40 0c-20 0-40 44-40 88v358c0 45 20 89 40 89h873c20 0 40-44 40-89v-358c0-44-20-88-40-88zM40 0z">
            <text:p/>
          </draw:path>
          <draw:frame draw:style-name="gr21" draw:text-style-name="P20" draw:layer="layout" svg:width="0.952cm" svg:height="0.534cm" svg:x="14.057cm" svg:y="9.345cm">
            <draw:text-box>
              <text:p text:style-name="P19"><text:span text:style-name="T52">PLC</text:span></text:p>
            </draw:text-box>
          </draw:frame>
        </draw:g>
        <draw:g draw:style-name="gr13">
          <draw:path draw:style-name="gr20" draw:text-style-name="P18" draw:layer="layout" svg:width="2.1cm" svg:height="0.534cm" svg:x="6.424cm" svg:y="9.345cm" svg:viewBox="0 0 2101 535" svg:d="M88 0c-44 0-88 44-88 88v358c0 45 44 89 88 89h1924c44 0 89-44 89-89v-358c0-44-45-88-89-88zM88 0z">
            <text:p/>
          </draw:path>
          <draw:frame draw:style-name="gr21" draw:text-style-name="P20" draw:layer="layout" svg:width="2.1cm" svg:height="0.534cm" svg:x="6.424cm" svg:y="9.345cm">
            <draw:text-box>
              <text:p text:style-name="P19"><text:span text:style-name="T52">Kubernetes </text:span></text:p>
            </draw:text-box>
          </draw:frame>
        </draw:g>
        <draw:g draw:style-name="gr13">
          <draw:path draw:style-name="gr18" draw:text-style-name="P21" draw:layer="layout" svg:width="1.904cm" svg:height="0.534cm" svg:x="5.485cm" svg:y="8.707cm" svg:viewBox="0 0 1905 535" svg:d="M120 0c-60 0-120 44-120 88v358c0 45 60 89 120 89h1664c60 0 121-44 121-89v-358c0-44-61-88-121-88zM120 0z">
            <text:p/>
          </draw:path>
          <draw:frame draw:style-name="gr16" draw:text-style-name="P20" draw:layer="layout" svg:width="1.904cm" svg:height="0.534cm" svg:x="5.485cm" svg:y="8.707cm">
            <draw:text-box>
              <text:p text:style-name="P19"><text:span text:style-name="T52">TypeScript</text:span></text:p>
            </draw:text-box>
          </draw:frame>
        </draw:g>
        <draw:g draw:style-name="gr13">
          <draw:path draw:style-name="gr18" draw:text-style-name="P21" draw:layer="layout" svg:width="1.438cm" svg:height="0.534cm" svg:x="7.486cm" svg:y="8.708cm" svg:viewBox="0 0 1439 535" svg:d="M91 0c-46 0-91 44-91 88v358c0 45 45 89 91 89h1256c46 0 92-44 92-89v-358c0-44-46-88-92-88zM91 0z">
            <text:p/>
          </draw:path>
          <draw:frame draw:style-name="gr16" draw:text-style-name="P20" draw:layer="layout" svg:width="1.438cm" svg:height="0.534cm" svg:x="7.486cm" svg:y="8.708cm">
            <draw:text-box>
              <text:p text:style-name="P19"><text:span text:style-name="T52">Python</text:span></text:p>
            </draw:text-box>
          </draw:frame>
        </draw:g>
        <draw:g draw:style-name="gr13">
          <draw:path draw:style-name="gr18" draw:text-style-name="P21" draw:layer="layout" svg:width="0.572cm" svg:height="0.534cm" svg:x="8.987cm" svg:y="8.709cm" svg:viewBox="0 0 573 535" svg:d="M36 0c-18 0-36 44-36 88v358c0 45 18 89 36 89h501c18 0 36-44 36-89v-358c0-44-18-88-36-88zM36 0z">
            <text:p/>
          </draw:path>
          <draw:frame draw:style-name="gr16" draw:text-style-name="P20" draw:layer="layout" svg:width="0.573cm" svg:height="0.534cm" svg:x="8.987cm" svg:y="8.709cm">
            <draw:text-box>
              <text:p text:style-name="P19"><text:span text:style-name="T52">C</text:span></text:p>
            </draw:text-box>
          </draw:frame>
        </draw:g>
        <draw:g draw:style-name="gr13">
          <draw:path draw:style-name="gr18" draw:text-style-name="P21" draw:layer="layout" svg:width="0.823cm" svg:height="0.534cm" svg:x="9.688cm" svg:y="8.71cm" svg:viewBox="0 0 824 535" svg:d="M52 0c-26 0-52 44-52 88v358c0 45 26 89 52 89h720c25 0 52-44 52-89v-358c0-44-27-88-52-88zM52 0z">
            <text:p/>
          </draw:path>
          <draw:frame draw:style-name="gr16" draw:text-style-name="P20" draw:layer="layout" svg:width="0.824cm" svg:height="0.534cm" svg:x="9.688cm" svg:y="8.71cm">
            <draw:text-box>
              <text:p text:style-name="P19"><text:span text:style-name="T52">C++</text:span></text:p>
            </draw:text-box>
          </draw:frame>
        </draw:g>
        <draw:g draw:style-name="gr13">
          <draw:path draw:style-name="gr14" draw:text-style-name="P18" draw:layer="layout" svg:width="0.914cm" svg:height="0.534cm" svg:x="3.527cm" svg:y="8.072cm" svg:viewBox="0 0 915 535" svg:d="M40 0c-20 0-40 44-40 88v358c0 45 20 89 40 89h835c20 0 40-44 40-89v-358c0-44-20-88-40-88zM40 0z">
            <text:p/>
          </draw:path>
          <draw:frame draw:style-name="gr15" draw:text-style-name="P20" draw:layer="layout" svg:width="0.915cm" svg:height="0.863cm" svg:x="3.527cm" svg:y="8.072cm">
            <draw:text-box>
              <text:p text:style-name="P19"><text:span text:style-name="T52">RAG</text:span></text:p>
            </draw:text-box>
          </draw:frame>
        </draw:g>
        <draw:g draw:style-name="gr13">
          <draw:path draw:style-name="gr14" draw:text-style-name="P18" draw:layer="layout" svg:width="1.093cm" svg:height="0.534cm" svg:x="11.101cm" svg:y="8.072cm" svg:viewBox="0 0 1094 535" svg:d="M57 0c-29 0-57 44-57 88v358c0 45 28 89 57 89h980c29 0 57-44 57-89v-358c0-44-28-88-57-88zM57 0z">
            <text:p/>
          </draw:path>
          <draw:frame draw:style-name="gr16" draw:text-style-name="P20" draw:layer="layout" svg:width="1.093cm" svg:height="0.534cm" svg:x="11.101cm" svg:y="8.072cm">
            <draw:text-box>
              <text:p text:style-name="P19"><text:span text:style-name="T52">MCP </text:span></text:p>
            </draw:text-box>
          </draw:frame>
        </draw:g>
        <draw:g draw:style-name="gr13">
          <draw:path draw:style-name="gr14" draw:text-style-name="P18" draw:layer="layout" svg:width="3.244cm" svg:height="0.534cm" svg:x="16.14cm" svg:y="8.073cm" svg:viewBox="0 0 3245 535" svg:d="M190 0c-95 0-190 44-190 88v358c0 45 95 89 190 89h2865c95 0 190-44 190-89v-358c0-44-95-88-190-88zM190 0z">
            <text:p/>
          </draw:path>
          <draw:frame draw:style-name="gr16" draw:text-style-name="P20" draw:layer="layout" svg:width="3.244cm" svg:height="0.534cm" svg:x="16.14cm" svg:y="8.073cm">
            <draw:text-box>
              <text:p text:style-name="P19"><text:span text:style-name="T52">Knowledge Graphs</text:span></text:p>
            </draw:text-box>
          </draw:frame>
        </draw:g>
        <draw:g draw:style-name="gr13">
          <draw:path draw:style-name="gr32" draw:text-style-name="P17" draw:layer="layout" svg:width="1.601cm" svg:height="0.286cm" svg:x="4.447cm" svg:y="25.958cm" svg:viewBox="0 0 1602 287" svg:d="M118 0c-60 0-118 23-118 47v192c0 24 58 48 118 48h1364c60 0 120-24 120-48v-192c0-24-60-47-120-47z">
            <text:p/>
          </draw:path>
          <draw:frame draw:style-name="gr33" draw:text-style-name="P30" draw:layer="layout" svg:width="1.599cm" svg:height="0.873cm" svg:x="4.439cm" svg:y="25.668cm">
            <draw:text-box>
              <text:p text:style-name="P29"><text:span text:style-name="T58">Tensorflow </text:span></text:p>
            </draw:text-box>
          </draw:frame>
        </draw:g>
        <draw:g draw:style-name="gr13">
          <draw:path draw:style-name="gr32" draw:text-style-name="P17" draw:layer="layout" svg:width="1.838cm" svg:height="0.286cm" svg:x="6.148cm" svg:y="25.959cm" svg:viewBox="0 0 1839 287" svg:d="M136 0c-69 0-136 23-136 47v192c0 24 67 48 136 48h1565c69 0 138-24 138-48v-192c0-24-69-47-138-47z">
            <text:p/>
          </draw:path>
          <draw:frame draw:style-name="gr34" draw:text-style-name="P30" draw:layer="layout" svg:width="1.835cm" svg:height="0.873cm" svg:x="6.139cm" svg:y="25.669cm">
            <draw:text-box>
              <text:p text:style-name="P29"><text:span text:style-name="T58">Google Cloud </text:span></text:p>
            </draw:text-box>
          </draw:frame>
        </draw:g>
        <draw:g draw:style-name="gr13">
          <draw:path draw:style-name="gr32" draw:text-style-name="P17" draw:layer="layout" svg:width="0.866cm" svg:height="0.286cm" svg:x="8.143cm" svg:y="25.959cm" svg:viewBox="0 0 867 287" svg:d="M64 0c-32 0-64 23-64 47v192c0 24 32 48 64 48h738c32 0 65-24 65-48v-192c0-24-33-47-65-47z">
            <text:p/>
          </draw:path>
          <draw:frame draw:style-name="gr35" draw:text-style-name="P30" draw:layer="layout" svg:width="0.865cm" svg:height="0.873cm" svg:x="8.139cm" svg:y="25.669cm">
            <draw:text-box>
              <text:p text:style-name="P29"><text:span text:style-name="T58">Flask </text:span></text:p>
            </draw:text-box>
          </draw:frame>
        </draw:g>
        <draw:g draw:style-name="gr13">
          <draw:path draw:style-name="gr32" draw:text-style-name="P17" draw:layer="layout" svg:width="0.742cm" svg:height="0.286cm" svg:x="8.802cm" svg:y="24.62cm" svg:viewBox="0 0 743 287" svg:d="M55 0c-28 0-55 23-55 47v192c0 24 27 48 55 48h633c27 0 55-24 55-48v-192c0-24-28-47-55-47z">
            <text:p/>
          </draw:path>
          <draw:frame draw:style-name="gr36" draw:text-style-name="P30" draw:layer="layout" svg:width="0.742cm" svg:height="0.873cm" svg:x="8.798cm" svg:y="24.33cm">
            <draw:text-box>
              <text:p text:style-name="P29"><text:span text:style-name="T58">AAS </text:span></text:p>
            </draw:text-box>
          </draw:frame>
        </draw:g>
        <draw:g draw:style-name="gr13">
          <draw:path draw:style-name="gr32" draw:text-style-name="P17" draw:layer="layout" svg:width="1.683cm" svg:height="0.286cm" svg:x="9.708cm" svg:y="24.621cm" svg:viewBox="0 0 1684 287" svg:d="M124 0c-63 0-124 23-124 47v192c0 24 61 48 124 48h1434c63 0 126-24 126-48v-192c0-24-63-47-126-47z">
            <text:p/>
          </draw:path>
          <draw:frame draw:style-name="gr37" draw:text-style-name="P30" draw:layer="layout" svg:width="1.682cm" svg:height="1.541cm" svg:x="9.699cm" svg:y="23.997cm">
            <draw:text-box>
              <text:p text:style-name="P29"><text:span text:style-name="T58">Industry 4.0</text:span></text:p>
            </draw:text-box>
          </draw:frame>
        </draw:g>
        <draw:g draw:style-name="gr13">
          <draw:path draw:style-name="gr32" draw:text-style-name="P17" draw:layer="layout" svg:width="0.748cm" svg:height="0.286cm" svg:x="11.504cm" svg:y="24.622cm" svg:viewBox="0 0 749 287" svg:d="M55 0c-28 0-55 23-55 47v192c0 24 27 48 55 48h638c28 0 56-24 56-48v-192c0-24-28-47-56-47z">
            <text:p/>
          </draw:path>
          <draw:frame draw:style-name="gr38" draw:text-style-name="P30" draw:layer="layout" svg:width="0.748cm" svg:height="1.541cm" svg:x="11.5cm" svg:y="23.998cm">
            <draw:text-box>
              <text:p text:style-name="P29"><text:span text:style-name="T58">LLM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9.239cm" svg:y="25.98cm" svg:viewBox="0 0 1351 287" svg:d="M100 0c-51 0-100 23-100 47v192c0 24 49 48 100 48h1150c50 0 101-24 101-48v-192c0-24-51-47-101-47z">
              <text:p/>
            </draw:path>
            <draw:frame draw:style-name="gr40" draw:text-style-name="P30" draw:layer="layout" svg:width="1.348cm" svg:height="1.207cm" svg:x="9.232cm" svg:y="25.523cm">
              <draw:text-box>
                <text:p text:style-name="P29"><text:span text:style-name="T59"><text:s text:c="4"/></text:span><text:span text:style-name="T59"><text:a xlink:href="https://github.com/LaloVene/Image-Captioning-Project" xlink:type="simple">Github</text:a></text:span></text:p>
              </draw:text-box>
            </draw:frame>
          </draw:g>
          <draw:frame draw:style-name="gr41" draw:text-style-name="P32" draw:layer="layout" svg:width="0.273cm" svg:height="0.26cm" svg:x="9.302cm" svg:y="25.995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frame draw:style-name="gr41" draw:text-style-name="P32" draw:layer="layout" svg:width="0.547cm" svg:height="0.547cm" svg:x="10.507cm" svg:y="1.268cm">
          <draw:image xlink:href="Pictures/100000010000006400000064C10219C4.png" xlink:type="simple" xlink:show="embed" xlink:actuate="onLoad" draw:mime-type="image/png">
            <text:p/>
          </draw:image>
        </draw:frame>
        <draw:frame draw:style-name="gr41" draw:text-style-name="P32" draw:layer="layout" svg:width="0.46cm" svg:height="0.46cm" svg:x="10.537cm" svg:y="0.694cm">
          <draw:image xlink:href="Pictures/1000000100000064000000647E7E347F.png" xlink:type="simple" xlink:show="embed" xlink:actuate="onLoad" draw:mime-type="image/png">
            <text:p/>
          </draw:image>
        </draw:frame>
        <draw:frame draw:style-name="gr41" draw:text-style-name="P32" draw:layer="layout" svg:width="0.442cm" svg:height="0.442cm" svg:x="10.565cm" svg:y="0.153cm">
          <draw:image xlink:href="Pictures/100000010000006400000064C40BEBAE.png" xlink:type="simple" xlink:show="embed" xlink:actuate="onLoad" draw:mime-type="image/png">
            <text:p/>
          </draw:image>
        </draw:frame>
        <draw:frame draw:style-name="gr41" draw:text-style-name="P32" draw:layer="layout" svg:width="0.467cm" svg:height="0.467cm" svg:x="14.51cm" svg:y="0.137cm">
          <draw:image xlink:href="Pictures/100000010000006400000064BC6DCE55.png" xlink:type="simple" xlink:show="embed" xlink:actuate="onLoad" draw:mime-type="image/png">
            <text:p/>
          </draw:image>
        </draw:frame>
        <draw:g draw:style-name="gr13">
          <draw:path draw:style-name="gr18" draw:text-style-name="P21" draw:layer="layout" svg:width="1.336cm" svg:height="0.534cm" svg:x="18.024cm" svg:y="8.711cm" svg:viewBox="0 0 1337 535" svg:d="M73 0c-36 0-73 44-73 88v358c0 45 37 89 73 89h1191c36 0 73-44 73-89v-358c0-44-37-88-73-88zM73 0z">
            <text:p/>
          </draw:path>
          <draw:frame draw:style-name="gr16" draw:text-style-name="P20" draw:layer="layout" svg:width="1.336cm" svg:height="0.534cm" svg:x="18.024cm" svg:y="8.711cm">
            <draw:text-box>
              <text:p text:style-name="P19"><text:span text:style-name="T52">Matlab 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16.83cm" svg:y="23.333cm" svg:viewBox="0 0 1351 287" svg:d="M100 0c-51 0-100 23-100 47v192c0 24 49 48 100 48h1150c50 0 101-24 101-48v-192c0-24-51-47-101-47z">
              <text:p/>
            </draw:path>
            <draw:frame draw:style-name="gr42" draw:text-style-name="P30" draw:layer="layout" svg:width="1.348cm" svg:height="1.207cm" svg:x="16.823cm" svg:y="22.876cm">
              <draw:text-box>
                <text:p text:style-name="P29"><text:span text:style-name="T59"><text:s text:c="4"/></text:span><text:span text:style-name="T59"><text:a xlink:href="https://github.com/LaloVene/vectordrive-route" xlink:type="simple">Github</text:a></text:span></text:p>
              </draw:text-box>
            </draw:frame>
          </draw:g>
          <draw:frame draw:style-name="gr41" draw:text-style-name="P32" draw:layer="layout" svg:width="0.273cm" svg:height="0.26cm" svg:x="16.893cm" svg:y="23.348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g draw:style-name="gr13">
          <draw:path draw:style-name="gr32" draw:text-style-name="P17" draw:layer="layout" svg:width="1.214cm" svg:height="0.286cm" svg:x="11.838cm" svg:y="23.328cm" svg:viewBox="0 0 1215 287" svg:d="M89 0c-45 0-89 23-89 47v192c0 24 44 48 89 48h1035c45 0 91-24 91-48v-192c0-24-46-47-91-47z">
            <text:p/>
          </draw:path>
          <draw:frame draw:style-name="gr43" draw:text-style-name="P30" draw:layer="layout" svg:width="1.213cm" svg:height="1.541cm" svg:x="11.832cm" svg:y="22.704cm">
            <draw:text-box>
              <text:p text:style-name="P29"><text:span text:style-name="T58">PyTorch</text:span></text:p>
            </draw:text-box>
          </draw:frame>
        </draw:g>
        <draw:g draw:style-name="gr13">
          <draw:path draw:style-name="gr32" draw:text-style-name="P17" draw:layer="layout" svg:width="1.131cm" svg:height="0.286cm" svg:x="13.139cm" svg:y="23.329cm" svg:viewBox="0 0 1132 287" svg:d="M83 0c-42 0-83 23-83 47v192c0 24 41 48 83 48h964c43 0 85-24 85-48v-192c0-24-42-47-85-47z">
            <text:p/>
          </draw:path>
          <draw:frame draw:style-name="gr44" draw:text-style-name="P30" draw:layer="layout" svg:width="1.131cm" svg:height="1.541cm" svg:x="13.133cm" svg:y="22.705cm">
            <draw:text-box>
              <text:p text:style-name="P29"><text:span text:style-name="T58">ResNet</text:span></text:p>
            </draw:text-box>
          </draw:frame>
        </draw:g>
        <draw:g draw:style-name="gr13">
          <draw:path draw:style-name="gr32" draw:text-style-name="P17" draw:layer="layout" svg:width="2.249cm" svg:height="0.286cm" svg:x="14.345cm" svg:y="23.33cm" svg:viewBox="0 0 2250 287" svg:d="M166 0c-84 0-166 23-166 47v192c0 24 82 48 166 48h1916c84 0 168-24 168-48v-192c0-24-84-47-168-47z">
            <text:p/>
          </draw:path>
          <draw:frame draw:style-name="gr45" draw:text-style-name="P30" draw:layer="layout" svg:width="2.248cm" svg:height="1.541cm" svg:x="14.333cm" svg:y="22.706cm">
            <draw:text-box>
              <text:p text:style-name="P29"><text:span text:style-name="T58">Computer Vision</text:span></text:p>
            </draw:text-box>
          </draw:frame>
        </draw:g>
        <draw:frame draw:style-name="gr41" draw:text-style-name="P32" draw:layer="layout" svg:width="2.758cm" svg:height="3.671cm" svg:x="18.059cm" svg:y="0.158cm">
          <draw:image xlink:href="Pictures/100000010000043F000005A7B970142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1" draw:display-name="Bitmap_1" xlink:href="Pictures/100000010000003000000030C27FB9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4T14:29:55.144972603</dc:date>
    <meta:creation-date>2025-07-18T15:54:30Z</meta:creation-date>
    <meta:generator>LibreOffice/26.2.4.2$Linux_X86_64 LibreOffice_project/620$Build-2</meta:generator>
    <meta:editing-duration>PT3H38S</meta:editing-duration>
    <meta:editing-cycles>62</meta:editing-cycles>
    <meta:print-date>2026-06-09T15:23:31.829795023</meta:print-date>
    <meta:printed-by>PDF files</meta:printed-by>
    <meta:document-statistic meta:object-count="200"/>
  </office:meta>
</office:document-meta>
</file>