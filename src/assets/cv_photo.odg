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06400000064C10219C4.png" manifest:media-type="image/png"/>
  <manifest:file-entry manifest:full-path="Pictures/100000010000006400000064BC6DCE55.png" manifest:media-type="image/png"/>
  <manifest:file-entry manifest:full-path="Pictures/10000000000007C000000A5028CD7EB6.jpg" manifest:media-type="image/jpe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none" draw:fill="bitmap" draw:fill-image-name="Bitmap_5f_5" style:repeat="stretch" draw:fill-image-ref-point="top-left" draw:shadow="visible" draw:shadow-offset-x="0cm" draw:shadow-offset-y="0cm" draw:shadow-color="#000000" draw:shadow-opacity="40%" loext:decorative="false"/>
    </style:style>
    <style:style style:name="gr33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0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1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  <style:text-properties fo:font-size="9pt" style:font-size-asian="9pt" style:font-size-complex="9p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loext:graphic-properties draw:fill="bitmap" draw:fill-image-name="Bitmap_5f_5" style:repeat="stretch" draw:fill-image-ref-point="top-lef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text-properties style:use-window-font-color="true" loext:opacity="0%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7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0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2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3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4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5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6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7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8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rdo Veneg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AI Enginee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h, German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9"><text:span text:style-name="T14">Coursing. </text:span><text:span text:style-name="T15">Statistics | ML Cybersecurity | NLP | Machine Translation | Image Processing &amp; Computer Vision.</text:span></text:p>
              </text:list-item>
              <text:list-item>
                <text:p text:style-name="P9"><text:span text:style-name="T16">Thesis (Seminar Grade 1.0):</text:span><text:span text:style-name="T17"> Evaluating Multi-Turn Agentic RAG Systems (In collaboration with BMW &amp; DFKI).</text:span></text:p>
                <text:p text:style-name="P9"><text:span text:style-name="T18"/></text:p>
              </text:list-item>
            </text:list>
            <text:p text:style-name="P8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9"><text:span text:style-name="T20">ML | Time series | Algorithms &amp; Optimization | Cloud Computing &amp; Distributed | Vehicle User Interfaces | </text:span><text:span text:style-name="T15">PLC.</text:span></text:p>
              </text:list-item>
            </text:list>
            <text:p text:style-name="P10"><text:span text:style-name="T21"/></text:p>
            <text:p text:style-name="P8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9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nologist in Automation and Robotics </text:span><text:span text:style-name="T10">CETI Colomos</text:span><text:span text:style-name="T11"><text:tab/>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9"><text:span text:style-name="T19">Thesis:</text:span><text:span text:style-name="T14"> Automated Tennis Machine integrating </text:span><text:span text:style-name="T19">PID control</text:span><text:span text:style-name="T14">. </text:span><text:span text:style-name="T15">Electronics | Robotics | Industrial Automation | Electricity | PLC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Scientist Masterarbeit </text:span><text:span text:style-name="T10">BMW &amp; Deutsches Forschungszentrum für KI 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Agentic RAG Systems: A Synthetic Benchmark Generation Approach.</text:span></text:p>
              </text:list-item>
              <text:list-item>
                <text:p text:style-name="P13"><text:span text:style-name="T29">Architected a modular evaluation framework for </text:span><text:span text:style-name="T19">tool-using Agentic RAG</text:span><text:span text:style-name="T29"> systems to enable fine-grained failure localization.</text:span></text:p>
              </text:list-item>
              <text:list-item>
                <text:p text:style-name="P13"><text:span text:style-name="T29">Built a </text:span><text:span text:style-name="T19">multi-turn synthetic benchmark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to audit a </text:span><text:span text:style-name="T19">RAG system </text:span><text:span text:style-name="T29">over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Data Scientist Werkstudent </text:span><text:span text:style-name="T10">August-Wilhelm Scheer Institute</text:span><text:span text:style-name="T10"><text:tab/></text:span><text:span text:style-name="T10"><text:tab/>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veloped a </text:span><text:span text:style-name="T26">KG-RAG </text:span><text:span text:style-name="T31">over unstructured technical documentation and a </text:span><text:span text:style-name="T26">Planning Agent</text:span><text:span text:style-name="T31">,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Implemented an </text:span><text:span text:style-name="T19">Autoencoder</text:span><text:span text:style-name="T14"> model for </text:span><text:span text:style-name="T19">Anomaly Detection</text:span><text:span text:style-name="T14"> via </text:span><text:span text:style-name="T19">Federated Learning </text:span><text:span text:style-name="T14">across edge devices.</text:span></text:p>
              </text:list-item>
            </text:list>
            <text:p text:style-name="P10"><text:span text:style-name="T21"/></text:p>
            <text:p text:style-name="P8"><text:span text:style-name="T9">Cloud Software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3">Worked on the </text:span><text:span text:style-name="T34">Oracle Cloud Infrastructure </text:span><text:span text:style-name="T33">in the team of </text:span><text:span text:style-name="T34">Big Data Service</text:span><text:span text:style-name="T33"> in </text:span><text:span text:style-name="T34">Oracle Analytics</text:span><text:span text:style-name="T33">.</text:span><text:span text:style-name="T14"> </text:span></text:p>
              </text:list-item>
              <text:list-item>
                <text:p text:style-name="P9"><text:span text:style-name="T33">Developed tools for managing and deploying </text:span><text:span text:style-name="T34">big data clusters</text:span><text:span text:style-name="T33">. Implemented </text:span><text:span text:style-name="T34">pipelines </text:span><text:span text:style-name="T33">for automation and testing.</text:span><text:span text:style-name="T14"> </text:span></text:p>
              </text:list-item>
            </text:list>
            <text:p text:style-name="P10"><text:span text:style-name="T21"/></text:p>
            <text:p text:style-name="P8"><text:span text:style-name="T9">Data Analyst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3">Developed a high-accuracy algorithm for </text:span><text:span text:style-name="T34">detecting external battery replacements</text:span><text:span text:style-name="T33">.</text:span><text:span text:style-name="T14"> </text:span></text:p>
              </text:list-item>
              <text:list-item>
                <text:p text:style-name="P9"><text:span text:style-name="T33">Identified </text:span><text:span text:style-name="T34">root cause</text:span><text:span text:style-name="T33"> of </text:span><text:span text:style-name="T34">missing db values </text:span><text:span text:style-name="T33">and created a new processing pipeline, </text:span><text:span text:style-name="T34">increasing service demand by 62%</text:span><text:span text:style-name="T33">.</text:span><text:span text:style-name="T14"> </text:span></text:p>
              </text:list-item>
              <text:list-item>
                <text:p text:style-name="P9"><text:span text:style-name="T33">Designed a </text:span><text:span text:style-name="T34">Streamlit dashboard </text:span><text:span text:style-name="T33">for adjusting prediction model parameters and obtaining a </text:span><text:span text:style-name="T34">real-time output (&lt;8 seconds</text:span><text:span text:style-name="T33">).</text:span><text:span text:style-name="T14"> </text:span></text:p>
              </text:list-item>
              <text:list-item>
                <text:p text:style-name="P9"><text:span text:style-name="T33">Configured </text:span><text:span text:style-name="T34">cloud-based environments </text:span><text:span text:style-name="T33">for working with </text:span><text:span text:style-name="T34">PySpark</text:span><text:span text:style-name="T33">. </text:span></text:p>
              </text:list-item>
            </text:list>
            <text:p text:style-name="P10"><text:span text:style-name="T21"/></text:p>
            <text:p text:style-name="P8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10 servers, </text:span><text:span text:style-name="T19">monitored </text:span><text:span text:style-name="T14">services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 </text:span><text:span text:style-name="T19">platform </text:span><text:span text:style-name="T14">to manage client </text:span><text:span text:style-name="T19">APIs</text:span><text:span text:style-name="T14">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among 120 out of 20,000 applicants. </text:span><text:span text:style-name="T38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8">for efficient deployment <text:s/>to a production server using Docker in an </text:span><text:span text:style-name="T39">AWS EC2 </text:span><text:span text:style-name="T38">instance</text:span></text:p>
              </text:list-item>
            </text:list>
            <text:p text:style-name="P10"><text:span text:style-name="T21"/></text:p>
            <text:p text:style-name="P8"><text:span text:style-name="T9">Full Stack &amp; Data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8">Designed a custom sales data analysis pipeline API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manage inventory, human resources, shipments, income and expenses.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0">VectorDrive-Route: Autonomous BEV Trajectory Planning</text:span><text:span text:style-name="T41"><text:tab/></text:span></text:p>
            <text:list text:style-name="L1">
              <text:list-item>
                <text:p text:style-name="P15"><text:span text:style-name="T42">Built a </text:span><text:span text:style-name="T43">PyTorch</text:span><text:span text:style-name="T42"> pipeline using </text:span><text:span text:style-name="T43">nuScenes</text:span><text:span text:style-name="T42">, </text:span><text:span text:style-name="T43">ResNet</text:span><text:span text:style-name="T42"> and </text:span><text:span text:style-name="T43">depth lifting</text:span><text:span text:style-name="T42"> to map multi-camera feeds into a </text:span><text:span text:style-name="T43">Bird’s-Eye-View</text:span><text:span text:style-name="T42"> grid.</text:span></text:p>
              </text:list-item>
              <text:list-item>
                <text:p text:style-name="P15"><text:span text:style-name="T42">Designed a </text:span><text:span text:style-name="T43">temporal motion planning head</text:span><text:span text:style-name="T42"> with </text:span><text:span text:style-name="T43">drivable-area and occupancy decoders</text:span><text:span text:style-name="T42"> to generate safe paths. </text:span></text:p>
                <text:p text:style-name="P15"><text:span text:style-name="T44"/></text:p>
              </text:list-item>
            </text:list>
            <text:p text:style-name="P14"><text:span text:style-name="T40">Daten-Mapping-Framework für die AAS</text:span><text:span text:style-name="T40"><text:tab/></text:span><text:span text:style-name="T40"><text:tab/></text:span><text:span text:style-name="T40"><text:tab/></text:span><text:span text:style-name="T40"><text:tab/></text:span><text:span text:style-name="T45"><text:a xlink:href="https://doi.org/10.17560/atp.v68i5.2836" xlink:type="simple">DOI: 10.17560/atp.v68i5.2836	</text:a></text:span><text:span text:style-name="T46"><text:tab/></text:span><text:span text:style-name="T46"><text:tab/></text:span></text:p>
            <text:list text:continue-numbering="true" text:style-name="L1">
              <text:list-item>
                <text:p text:style-name="P15"><text:span text:style-name="T47">Developed a mapping </text:span><text:span text:style-name="T48">framework</text:span><text:span text:style-name="T47"> from schemas to </text:span><text:span text:style-name="T48">Asset Administration Shell </text:span><text:span text:style-name="T47">to achieve interoperability in </text:span><text:span text:style-name="T48">Industry 4.0</text:span><text:span text:style-name="T47">.</text:span></text:p>
              </text:list-item>
              <text:list-item>
                <text:p text:style-name="P15"><text:span text:style-name="T47">Designed a dual alignment strategy separating standard </text:span><text:span text:style-name="T48">relational</text:span><text:span text:style-name="T47"> tables from </text:span><text:span text:style-name="T48">hierarchical</text:span><text:span text:style-name="T47"> <text:s/>assets.</text:span></text:p>
                <text:p text:style-name="P15"><text:span text:style-name="T49"/></text:p>
              </text:list-item>
            </text:list>
            <text:p text:style-name="P10"><text:span text:style-name="T50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app for the </text:span><text:span text:style-name="T19">visually impaired</text:span><text:span text:style-name="T14">, supporting </text:span><text:span text:style-name="T19">11 languages</text:span><text:span text:style-name="T14">.</text:span><text:span text:style-name="T51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model with </text:span><text:span text:style-name="T19">TensorFlow</text:span><text:span text:style-name="T14">, deployed using </text:span><text:span text:style-name="T19">Flask, Docker, </text:span><text:span text:style-name="T14">and </text:span><text:span text:style-name="T19">Google Cloud V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2">Hugging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2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2">Tenso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2">LangGra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2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3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2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2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2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3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2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3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2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2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2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2">JavaS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4">Spanish <text:s text:c="2"/></text:span><text:span text:style-name="T55">Native</text:span><text:span text:style-name="T56"> </text:span></text:p>
            <text:p text:style-name="P24"><text:span text:style-name="T54">English <text:s text:c="3"/></text:span><text:span text:style-name="T55">C1</text:span><text:span text:style-name="T56"> </text:span></text:p>
            <text:p text:style-name="P24"><text:span text:style-name="T54">German <text:s/></text:span><text:span text:style-name="T55">C1</text:span><text:span text:style-name="T56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7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7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7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7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2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2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2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2">Arduino </text:span></text:p>
            </draw:text-box>
          </draw:frame>
        </draw:g>
        <draw:polygon draw:style-name="gr32" draw:text-style-name="P29" draw:layer="layout" svg:width="2.778cm" svg:height="3.682cm" svg:x="18.058cm" svg:y="0.128cm" svg:viewBox="0 0 2779 3683" draw:points="0,0 2779,0 2779,3683 0,3683">
          <text:p/>
        </draw:polygon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2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2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2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2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2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2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2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2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2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2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2">Knowledge Graphs</text:span></text:p>
            </draw:text-box>
          </draw:frame>
        </draw:g>
        <draw:g draw:style-name="gr13">
          <draw:path draw:style-name="gr33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4" draw:text-style-name="P31" draw:layer="layout" svg:width="1.599cm" svg:height="0.873cm" svg:x="4.439cm" svg:y="25.668cm">
            <draw:text-box>
              <text:p text:style-name="P30"><text:span text:style-name="T58">Tensorflow </text:span></text:p>
            </draw:text-box>
          </draw:frame>
        </draw:g>
        <draw:g draw:style-name="gr13">
          <draw:path draw:style-name="gr33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5" draw:text-style-name="P31" draw:layer="layout" svg:width="1.835cm" svg:height="0.873cm" svg:x="6.139cm" svg:y="25.669cm">
            <draw:text-box>
              <text:p text:style-name="P30"><text:span text:style-name="T58">Google Cloud </text:span></text:p>
            </draw:text-box>
          </draw:frame>
        </draw:g>
        <draw:g draw:style-name="gr13">
          <draw:path draw:style-name="gr33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6" draw:text-style-name="P31" draw:layer="layout" svg:width="0.865cm" svg:height="0.873cm" svg:x="8.139cm" svg:y="25.669cm">
            <draw:text-box>
              <text:p text:style-name="P30"><text:span text:style-name="T58">Flask </text:span></text:p>
            </draw:text-box>
          </draw:frame>
        </draw:g>
        <draw:g draw:style-name="gr13">
          <draw:path draw:style-name="gr33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7" draw:text-style-name="P31" draw:layer="layout" svg:width="0.742cm" svg:height="0.873cm" svg:x="8.798cm" svg:y="24.33cm">
            <draw:text-box>
              <text:p text:style-name="P30"><text:span text:style-name="T58">AAS </text:span></text:p>
            </draw:text-box>
          </draw:frame>
        </draw:g>
        <draw:g draw:style-name="gr13">
          <draw:path draw:style-name="gr33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8" draw:text-style-name="P31" draw:layer="layout" svg:width="1.682cm" svg:height="1.541cm" svg:x="9.699cm" svg:y="23.997cm">
            <draw:text-box>
              <text:p text:style-name="P30"><text:span text:style-name="T58">Industry 4.0</text:span></text:p>
            </draw:text-box>
          </draw:frame>
        </draw:g>
        <draw:g draw:style-name="gr13">
          <draw:path draw:style-name="gr33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9" draw:text-style-name="P31" draw:layer="layout" svg:width="0.748cm" svg:height="1.541cm" svg:x="11.5cm" svg:y="23.998cm">
            <draw:text-box>
              <text:p text:style-name="P30"><text:span text:style-name="T58">LLM</text:span></text:p>
            </draw:text-box>
          </draw:frame>
        </draw:g>
        <draw:g draw:style-name="gr24">
          <draw:g draw:style-name="gr13">
            <draw:path draw:style-name="gr40" draw:text-style-name="P32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1" draw:text-style-name="P31" draw:layer="layout" svg:width="1.348cm" svg:height="1.207cm" svg:x="9.232cm" svg:y="25.523cm">
              <draw:text-box>
                <text:p text:style-name="P30"><text:span text:style-name="T59"><text:s text:c="4"/></text:span><text:span text:style-name="T59"><text:a xlink:href="https://github.com/LaloVene/Image-Captioning-Project" xlink:type="simple">Github</text:a></text:span></text:p>
              </draw:text-box>
            </draw:frame>
          </draw:g>
          <draw:frame draw:style-name="gr42" draw:text-style-name="P33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2" draw:text-style-name="P33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2" draw:text-style-name="P33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2" draw:text-style-name="P33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2" draw:text-style-name="P33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2">Matlab </text:span></text:p>
            </draw:text-box>
          </draw:frame>
        </draw:g>
        <draw:g draw:style-name="gr24">
          <draw:g draw:style-name="gr13">
            <draw:path draw:style-name="gr40" draw:text-style-name="P32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3" draw:text-style-name="P31" draw:layer="layout" svg:width="1.348cm" svg:height="1.207cm" svg:x="16.823cm" svg:y="22.876cm">
              <draw:text-box>
                <text:p text:style-name="P30"><text:span text:style-name="T59"><text:s text:c="4"/></text:span><text:span text:style-name="T59"><text:a xlink:href="https://github.com/LaloVene/vectordrive-route" xlink:type="simple">Github</text:a></text:span></text:p>
              </draw:text-box>
            </draw:frame>
          </draw:g>
          <draw:frame draw:style-name="gr42" draw:text-style-name="P33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3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4" draw:text-style-name="P31" draw:layer="layout" svg:width="1.213cm" svg:height="1.541cm" svg:x="11.832cm" svg:y="22.704cm">
            <draw:text-box>
              <text:p text:style-name="P30"><text:span text:style-name="T58">PyTorch</text:span></text:p>
            </draw:text-box>
          </draw:frame>
        </draw:g>
        <draw:g draw:style-name="gr13">
          <draw:path draw:style-name="gr33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5" draw:text-style-name="P31" draw:layer="layout" svg:width="1.131cm" svg:height="1.541cm" svg:x="13.133cm" svg:y="22.705cm">
            <draw:text-box>
              <text:p text:style-name="P30"><text:span text:style-name="T58">ResNet</text:span></text:p>
            </draw:text-box>
          </draw:frame>
        </draw:g>
        <draw:g draw:style-name="gr13">
          <draw:path draw:style-name="gr33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6" draw:text-style-name="P31" draw:layer="layout" svg:width="2.248cm" svg:height="1.541cm" svg:x="14.333cm" svg:y="22.706cm">
            <draw:text-box>
              <text:p text:style-name="P30"><text:span text:style-name="T58">Computer Vis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fill-image draw:name="Bitmap_5f_5" draw:display-name="Bitmap_5" xlink:href="Pictures/10000000000007C000000A5028CD7E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9T15:40:46.833356932</dc:date>
    <meta:creation-date>2025-07-18T15:54:30Z</meta:creation-date>
    <meta:generator>LibreOffice/26.2.3.2$Linux_X86_64 LibreOffice_project/620$Build-2</meta:generator>
    <meta:editing-duration>PT2H39M13S</meta:editing-duration>
    <meta:editing-cycles>57</meta:editing-cycles>
    <meta:print-date>2026-06-09T15:23:31.829795023</meta:print-date>
    <meta:printed-by>PDF files</meta:printed-by>
    <meta:document-statistic meta:object-count="200"/>
  </office:meta>
</office:document-meta>
</file>