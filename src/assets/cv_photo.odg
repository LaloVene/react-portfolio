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400000064C40BEBAE.png" manifest:media-type="image/png"/>
  <manifest:file-entry manifest:full-path="Pictures/1000000100000064000000647E7E347F.png" manifest:media-type="image/png"/>
  <manifest:file-entry manifest:full-path="Pictures/100000000000043F000005A7A95B12DD.png" manifest:media-type="image/png"/>
  <manifest:file-entry manifest:full-path="Pictures/100000010000006400000064C10219C4.png" manifest:media-type="image/png"/>
  <manifest:file-entry manifest:full-path="Pictures/100000010000006400000064BC6DCE55.png" manifest:media-type="image/png"/>
  <manifest:file-entry manifest:full-path="Pictures/10000000000007C000000A5028CD7EB6.jpg" manifest:media-type="image/jpeg"/>
  <manifest:file-entry manifest:full-path="Pictures/100000010000003000000030C27FB9E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venir Next LT Pro" svg:font-family="'Avenir Next LT Pro'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be1e1" draw:opacity="100%" draw:shadow="hidden" loext:decorative="false"/>
    </style:style>
    <style:style style:name="gr2" style:family="graphic" style:parent-style-name="standard">
      <style:graphic-properties draw:stroke="none" draw:fill="none" fo:min-height="1.03cm" fo:min-width="2.54cm" fo:padding-top="0.102cm" fo:padding-bottom="0.102cm" fo:padding-left="0.102cm" fo:padding-right="0.102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475cm" fo:min-width="2.54cm" fo:padding-top="0.102cm" fo:padding-bottom="0.102cm" fo:padding-left="0.102cm" fo:padding-right="0.102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385cm" fo:min-width="2.54cm" fo:padding-top="0.102cm" fo:padding-bottom="0.102cm" fo:padding-left="0.102cm" fo:padding-right="0.102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319cm" fo:min-width="2.54cm" fo:padding-top="0.102cm" fo:padding-bottom="0.102cm" fo:padding-left="0.102cm" fo:padding-right="0.102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412cm" fo:min-width="2.54cm" fo:padding-top="0.102cm" fo:padding-bottom="0.102cm" fo:padding-left="0.102cm" fo:padding-right="0.102cm" loext:decorative="false"/>
      <style:paragraph-properties style:writing-mode="lr-tb"/>
    </style:style>
    <style:style style:name="gr7" style:family="graphic" style:parent-style-name="standard">
      <style:graphic-properties draw:stroke="none" draw:fill="bitmap" draw:fill-image-name="Bitmap_5f_1" style:repeat="stretch" draw:fill-image-ref-point="top-left" draw:shadow="hidden" loext:decorative="false"/>
    </style:style>
    <style:style style:name="gr8" style:family="graphic" style:parent-style-name="standard">
      <style:graphic-properties draw:stroke="none" draw:fill="none" fo:min-height="0.439cm" fo:min-width="2.54cm" fo:padding-top="0.102cm" fo:padding-bottom="0.102cm" fo:padding-left="0.102cm" fo:padding-right="0.102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767cm" fo:min-width="2.54cm" fo:padding-top="0.102cm" fo:padding-bottom="0.102cm" fo:padding-left="0.102cm" fo:padding-right="0.102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4.889cm" fo:min-width="2.54cm" fo:padding-top="0.102cm" fo:padding-bottom="0.102cm" fo:padding-left="0.102cm" fo:padding-right="0.102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1.63cm" fo:min-width="2.54cm" fo:padding-top="0.102cm" fo:padding-bottom="0.102cm" fo:padding-left="0.102cm" fo:padding-right="0.102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3.848cm" fo:min-width="2.54cm" fo:padding-top="0.102cm" fo:padding-bottom="0.102cm" fo:padding-left="0.102cm" fo:padding-right="0.102cm" loext:decorative="false"/>
      <style:paragraph-properties style:writing-mode="lr-tb"/>
    </style:style>
    <style:style style:name="gr13" style:family="graphic">
      <style:graphic-properties loext:decorative="false"/>
    </style:style>
    <style:style style:name="gr14" style:family="graphic" style:parent-style-name="standard">
      <style:graphic-properties draw:stroke="none" draw:fill="solid" draw:fill-color="#c6d3d7" draw:opacity="100%" draw:shadow="hidden" loext:decorative="false"/>
    </style:style>
    <style:style style:name="gr15" style:family="graphic" style:parent-style-name="standard">
      <style:graphic-properties draw:stroke="none" draw:fill="none" fo:min-height="0.659cm" fo:min-width="2.54cm" fo:padding-top="0.102cm" fo:padding-bottom="0.102cm" fo:padding-left="0.102cm" fo:padding-right="0.102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33cm" fo:min-width="2.54cm" fo:padding-top="0.102cm" fo:padding-bottom="0.102cm" fo:padding-left="0.102cm" fo:padding-right="0.102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454cm" fo:min-width="2.54cm" fo:padding-top="0.102cm" fo:padding-bottom="0.102cm" fo:padding-left="0.102cm" fo:padding-right="0.102cm" loext:decorative="false"/>
      <style:paragraph-properties style:writing-mode="lr-tb"/>
    </style:style>
    <style:style style:name="gr18" style:family="graphic" style:parent-style-name="standard">
      <style:graphic-properties draw:stroke="none" draw:fill="solid" draw:fill-color="#e0e6e6" draw:opacity="100%" draw:shadow="hidden" loext:decorative="false"/>
    </style:style>
    <style:style style:name="gr19" style:family="graphic" style:parent-style-name="standard">
      <style:graphic-properties draw:stroke="none" draw:fill="none" fo:min-height="0.437cm" fo:min-width="2.54cm" fo:padding-top="0.102cm" fo:padding-bottom="0.102cm" fo:padding-left="0.102cm" fo:padding-right="0.102cm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c6d3d7" draw:opacity="100%" draw:textarea-vertical-align="middle" draw:shadow="hidden" loext:decorative="false"/>
    </style:style>
    <style:style style:name="gr21" style:family="graphic" style:parent-style-name="standard">
      <style:graphic-properties draw:stroke="none" draw:fill="none" draw:textarea-vertical-align="middle" fo:min-height="0.33cm" fo:min-width="2.54cm" fo:padding-top="0.102cm" fo:padding-bottom="0.102cm" fo:padding-left="0.102cm" fo:padding-right="0.10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0.33cm" fo:min-width="2.54cm" fo:padding-top="0.102cm" fo:padding-bottom="0.102cm" fo:padding-left="0.102cm" fo:padding-right="0.102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1.698cm" fo:min-width="2.54cm" fo:padding-top="0.102cm" fo:padding-bottom="0.102cm" fo:padding-left="0.102cm" fo:padding-right="0.102cm" loext:decorative="false"/>
      <style:paragraph-properties style:writing-mode="lr-tb"/>
    </style:style>
    <style:style style:name="gr24" style:family="graphic">
      <style:graphic-properties style:writing-mode="lr-tb" loext:decorative="false"/>
    </style:style>
    <style:style style:name="gr25" style:family="graphic" style:parent-style-name="standard">
      <style:graphic-properties draw:stroke="none" draw:fill="solid" draw:fill-color="#7d9aaa" draw:opacity="100%" draw:shadow="hidden" loext:decorative="false"/>
    </style:style>
    <style:style style:name="gr26" style:family="graphic" style:parent-style-name="standard">
      <style:graphic-properties draw:stroke="solid" svg:stroke-width="0.071cm" svg:stroke-color="#7d9aaa" draw:fill="none" fo:padding-top="0.16cm" fo:padding-bottom="0.16cm" fo:padding-left="0.285cm" fo:padding-right="0.285cm" loext:decorative="false"/>
    </style:style>
    <style:style style:name="gr27" style:family="graphic" style:parent-style-name="standard">
      <style:graphic-properties draw:stroke="none" draw:fill="solid" draw:fill-color="#a6bcc6" draw:opacity="100%" draw:shadow="hidden" loext:decorative="false"/>
    </style:style>
    <style:style style:name="gr28" style:family="graphic" style:parent-style-name="standard">
      <style:graphic-properties draw:stroke="solid" svg:stroke-width="0.071cm" svg:stroke-color="#a6bcc6" draw:fill="none" fo:padding-top="0.16cm" fo:padding-bottom="0.16cm" fo:padding-left="0.285cm" fo:padding-right="0.285cm" loext:decorative="false"/>
    </style:style>
    <style:style style:name="gr29" style:family="graphic" style:parent-style-name="standard">
      <style:graphic-properties draw:stroke="none" draw:fill="none" fo:min-height="1.834cm" fo:min-width="2.54cm" fo:padding-top="0.102cm" fo:padding-bottom="0.102cm" fo:padding-left="0.102cm" fo:padding-right="0.102cm" loext:decorative="false"/>
      <style:paragraph-properties style:writing-mode="lr-tb"/>
    </style:style>
    <style:style style:name="gr30" style:family="graphic" style:parent-style-name="standard">
      <style:graphic-properties draw:stroke="none" draw:fill="solid" draw:fill-color="#ffffff" draw:opacity="100%" draw:shadow="hidden" loext:decorative="false"/>
    </style:style>
    <style:style style:name="gr31" style:family="graphic" style:parent-style-name="standard">
      <style:graphic-properties draw:stroke="solid" svg:stroke-width="0.035cm" svg:stroke-color="#7d9aaa" draw:fill="none" fo:padding-top="0.142cm" fo:padding-bottom="0.142cm" fo:padding-left="0.267cm" fo:padding-right="0.267cm" loext:decorative="false"/>
    </style:style>
    <style:style style:name="gr32" style:family="graphic" style:parent-style-name="standard">
      <style:graphic-properties draw:stroke="solid" svg:stroke-width="0.035cm" svg:stroke-color="#a6bcc6" draw:fill="none" fo:padding-top="0.142cm" fo:padding-bottom="0.142cm" fo:padding-left="0.267cm" fo:padding-right="0.267cm" loext:decorative="false"/>
    </style:style>
    <style:style style:name="gr33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39" style:family="graphic" style:parent-style-name="standard">
      <style:graphic-properties draw:stroke="solid" svg:stroke-width="0.035cm" svg:stroke-color="#333333" draw:fill="none" fo:padding-top="0.142cm" fo:padding-bottom="0.142cm" fo:padding-left="0.267cm" fo:padding-right="0.267cm" loext:decorative="false"/>
    </style:style>
    <style:style style:name="gr40" style:family="graphic" style:parent-style-name="standard" style:list-style-name="L1">
      <style:graphic-properties draw:stroke="none" svg:stroke-color="#333333" draw:fill="none" draw:textarea-horizontal-align="center" draw:textarea-vertical-align="middle" fo:min-height="1.003cm" fo:min-width="2.54cm" fo:padding-top="0.102cm" fo:padding-bottom="0.102cm" fo:padding-left="0.102cm" fo:padding-right="0.102cm" loext:decorative="false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 style:parent-style-name="standard" style:list-style-name="L1">
      <style:graphic-properties draw:stroke="none" svg:stroke-color="#333333" draw:fill="none" draw:textarea-horizontal-align="center" draw:textarea-vertical-align="middle" fo:min-height="1.003cm" fo:min-width="2.54cm" fo:padding-top="0.102cm" fo:padding-bottom="0.102cm" fo:padding-left="0.102cm" fo:padding-right="0.102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dbe1e1" draw:opacity="100%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</style:style>
    <style:style style:name="P4" style:family="paragraph">
      <loext:graphic-properties draw:fill="none"/>
      <style:paragraph-properties fo:text-align="start"/>
      <style:text-properties fo:color="#3465a4" loext:opacity="100%"/>
    </style:style>
    <style:style style:name="P5" style:family="paragraph">
      <loext:graphic-properties draw:fill="none"/>
      <style:paragraph-properties fo:text-align="start"/>
      <style:text-properties fo:color="#666666" loext:opacity="100%"/>
    </style:style>
    <style:style style:name="P6" style:family="paragraph">
      <loext:graphic-properties draw:fill="none"/>
      <style:text-properties style:text-underline-style="none"/>
    </style:style>
    <style:style style:name="P7" style:family="paragraph">
      <loext:graphic-properties draw:fill="bitmap" draw:fill-image-name="Bitmap_5f_1" style:repeat="stretch" draw:fill-image-ref-point="top-left"/>
    </style:style>
    <style:style style:name="P8" style:family="paragraph">
      <style:paragraph-properties fo:line-height="115%" fo:text-align="start"/>
    </style:style>
    <style:style style:name="P9" style:family="paragraph">
      <style:paragraph-properties fo:margin-left="0.635cm" fo:margin-right="0cm" fo:line-height="115%" fo:text-align="justify" fo:text-indent="-0.635cm"/>
    </style:style>
    <style:style style:name="P10" style:family="paragraph">
      <style:paragraph-properties fo:line-height="115%" fo:text-align="justify"/>
    </style:style>
    <style:style style:name="P11" style:family="paragraph">
      <loext:graphic-properties draw:fill="none"/>
      <style:paragraph-properties fo:line-height="115%"/>
    </style:style>
    <style:style style:name="P12" style:family="paragraph">
      <style:paragraph-properties fo:margin-left="0cm" fo:margin-right="0cm" fo:margin-top="0cm" fo:margin-bottom="0cm" fo:line-height="115%" fo:text-align="start" fo:text-indent="0cm"/>
    </style:style>
    <style:style style:name="P13" style:family="paragraph">
      <style:paragraph-properties fo:margin-left="0.635cm" fo:margin-right="0cm" fo:margin-top="0cm" fo:margin-bottom="0cm" fo:line-height="115%" fo:text-align="justify" fo:text-indent="-0.635cm"/>
    </style:style>
    <style:style style:name="P14" style:family="paragraph">
      <style:paragraph-properties fo:margin-left="0cm" fo:margin-right="0cm" fo:margin-top="0cm" fo:margin-bottom="0cm" fo:line-height="115%" fo:text-align="justify" fo:text-indent="0cm"/>
    </style:style>
    <style:style style:name="P15" style:family="paragraph">
      <style:paragraph-properties fo:margin-left="0.635cm" fo:margin-right="0cm" fo:margin-top="0cm" fo:margin-bottom="0cm" fo:line-height="100%" fo:text-align="justify" fo:text-indent="-0.635cm"/>
    </style:style>
    <style:style style:name="P16" style:family="paragraph">
      <style:paragraph-properties fo:margin-left="0.635cm" fo:margin-right="0cm" fo:text-align="justify" fo:text-indent="-0.635cm"/>
    </style:style>
    <style:style style:name="P17" style:family="paragraph">
      <loext:graphic-properties draw:fill="none"/>
    </style:style>
    <style:style style:name="P18" style:family="paragraph">
      <loext:graphic-properties draw:fill="solid" draw:fill-color="#c6d3d7" draw:opacity="100%"/>
      <style:paragraph-properties fo:text-align="center"/>
    </style:style>
    <style:style style:name="P19" style:family="paragraph">
      <style:paragraph-properties fo:line-height="80%" fo:text-align="center"/>
    </style:style>
    <style:style style:name="P20" style:family="paragraph">
      <loext:graphic-properties draw:fill="none"/>
      <style:paragraph-properties fo:line-height="80%" fo:text-align="center"/>
    </style:style>
    <style:style style:name="P21" style:family="paragraph">
      <loext:graphic-properties draw:fill="solid" draw:fill-color="#e0e6e6" draw:opacity="100%"/>
      <style:paragraph-properties fo:text-align="center"/>
    </style:style>
    <style:style style:name="P22" style:family="paragraph">
      <style:paragraph-properties fo:margin-left="0cm" fo:margin-right="0cm" fo:margin-top="0cm" fo:margin-bottom="0cm" fo:line-height="80%" fo:text-align="center" fo:text-indent="0cm"/>
    </style:style>
    <style:style style:name="P23" style:family="paragraph">
      <loext:graphic-properties draw:fill="none"/>
      <style:paragraph-properties fo:margin-left="0cm" fo:margin-right="0cm" fo:margin-top="0cm" fo:margin-bottom="0cm" fo:line-height="80%" fo:text-align="center" fo:text-indent="0cm"/>
    </style:style>
    <style:style style:name="P24" style:family="paragraph">
      <style:paragraph-properties fo:margin-top="0cm" fo:margin-bottom="0.035cm" fo:line-height="100%" fo:text-align="start"/>
    </style:style>
    <style:style style:name="P25" style:family="paragraph">
      <loext:graphic-properties draw:fill="none"/>
      <style:paragraph-properties fo:line-height="100%"/>
      <style:text-properties fo:font-size="9pt" style:font-size-asian="9pt" style:font-size-complex="9pt"/>
    </style:style>
    <style:style style:name="P26" style:family="paragraph">
      <loext:graphic-properties draw:fill="solid" draw:fill-color="#7d9aaa" draw:opacity="100%"/>
    </style:style>
    <style:style style:name="P27" style:family="paragraph">
      <loext:graphic-properties draw:fill="solid" draw:fill-color="#a6bcc6" draw:opacity="100%"/>
    </style:style>
    <style:style style:name="P28" style:family="paragraph">
      <loext:graphic-properties draw:fill="solid" draw:fill-color="#ffffff" draw:opacity="100%"/>
    </style:style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text-properties style:use-window-font-color="true" loext:opacity="0%"/>
    </style:style>
    <style:style style:name="P32" style:family="paragraph">
      <loext:graphic-properties draw:fill="none"/>
      <style:paragraph-properties fo:text-align="center"/>
    </style:style>
    <style:style style:name="P33" style:family="paragraph">
      <style:paragraph-properties fo:text-align="center"/>
    </style:style>
    <style:style style:name="T1" style:family="text">
      <style:text-properties fo:color="#000000" loext:opacity="100%" style:font-name="Ubuntu" fo:font-size="26pt" fo:language="en" fo:country="GB" fo:font-weight="bold" style:font-name-asian="Ubuntu" style:font-size-asian="26pt" style:font-weight-asian="bold" style:font-name-complex="Ubuntu" style:font-size-complex="26pt" style:font-weight-complex="bold"/>
    </style:style>
    <style:style style:name="T2" style:family="text">
      <style:text-properties fo:color="#000000" loext:opacity="100%" style:font-name="Ubuntu" fo:font-size="12pt" fo:language="en" fo:country="GB" fo:font-weight="bold" style:font-name-asian="Ubuntu" style:font-size-asian="12pt" style:font-weight-asian="bold" style:font-name-complex="Ubuntu" style:font-size-complex="12pt" style:font-weight-complex="bold"/>
    </style:style>
    <style:style style:name="T3" style:family="text">
      <style:text-properties fo:color="#355269" loext:opacity="100%" style:font-name="Ubuntu" fo:font-size="12pt" fo:language="en" fo:country="GB" style:font-name-asian="Ubuntu" style:font-size-asian="12pt" style:font-name-complex="Ubuntu" style:font-size-complex="12pt"/>
    </style:style>
    <style:style style:name="T4" style:family="text">
      <style:text-properties fo:color="#355269" loext:opacity="100%" style:font-name="Ubuntu" fo:font-size="10pt" fo:language="en" fo:country="GB" style:font-name-asian="Ubuntu" style:font-size-asian="10pt" style:font-name-complex="Ubuntu" style:font-size-complex="10pt"/>
    </style:style>
    <style:style style:name="T5" style:family="text">
      <style:text-properties fo:color="#666666" loext:opacity="100%" style:font-name="Ubuntu" fo:font-size="8pt" fo:language="en" fo:country="GB" style:text-underline-style="solid" style:text-underline-width="auto" style:text-underline-color="font-color" fo:font-weight="bold" style:font-name-asian="Ubuntu" style:font-size-asian="8pt" style:font-weight-asian="bold" style:font-name-complex="Ubuntu" style:font-size-complex="8pt" style:font-weight-complex="bold"/>
    </style:style>
    <style:style style:name="T6" style:family="text">
      <style:text-properties fo:color="#666666" loext:opacity="100%" style:font-name="Ubuntu" fo:font-size="8pt" fo:language="en" fo:country="GB" fo:font-weight="bold" style:font-name-asian="Ubuntu" style:font-size-asian="8pt" style:font-weight-asian="bold" style:font-name-complex="Ubuntu" style:font-size-complex="8pt" style:font-weight-complex="bold"/>
    </style:style>
    <style:style style:name="T7" style:family="text">
      <style:text-properties fo:color="#666666" loext:opacity="100%" style:font-name="Ubuntu" fo:font-size="8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name-asian="Ubuntu" style:font-size-asian="8pt" style:font-weight-asian="bold" style:font-name-complex="Ubuntu" style:font-size-complex="8pt" style:font-weight-complex="bold"/>
    </style:style>
    <style:style style:name="T8" style:family="text">
      <style:text-properties fo:color="#000000" loext:opacity="100%" style:font-name="Avenir Next LT Pro" fo:font-size="16pt" fo:language="en" fo:country="GB" fo:font-weight="bold" style:font-name-asian="Avenir Next LT Pro" style:font-size-asian="16pt" style:font-weight-asian="bold" style:font-name-complex="Avenir Next LT Pro" style:font-size-complex="16pt" style:font-weight-complex="bold"/>
    </style:style>
    <style:style style:name="T9" style:family="text">
      <style:text-properties fo:color="#000000" loext:opacity="100%" style:font-name="Calibri" fo:font-size="12pt" fo:language="en" fo:country="GB" fo:font-weight="bold" style:font-name-asian="Calibri" style:font-size-asian="12pt" style:font-weight-asian="bold" style:font-name-complex="Calibri" style:font-size-complex="12pt" style:font-weight-complex="bold"/>
    </style:style>
    <style:style style:name="T10" style:family="text">
      <style:text-properties fo:color="#7f7f7f" loext:opacity="100%" style:font-name="Calibri" fo:font-size="9pt" fo:language="en" fo:country="GB" fo:font-weight="bold" style:font-name-asian="Calibri" style:font-size-asian="9pt" style:font-weight-asian="bold" style:font-name-complex="Calibri" style:font-size-complex="9pt" style:font-weight-complex="bold"/>
    </style:style>
    <style:style style:name="T11" style:family="text">
      <style:text-properties fo:color="#7f7f7f" loext:opacity="100%" style:font-name="Calibri" fo:font-size="8pt" fo:language="en" fo:country="GB" style:font-name-asian="Calibri" style:font-size-asian="8pt" style:font-name-complex="Calibri" style:font-size-complex="8pt"/>
    </style:style>
    <style:style style:name="T12" style:family="text">
      <style:text-properties fo:color="#7f7f7f" loext:opacity="100%" style:font-name="Calibri" fo:font-size="8pt" fo:language="en" fo:country="GB" fo:font-style="italic" style:font-name-asian="Calibri" style:font-size-asian="8pt" style:font-style-asian="italic" style:font-name-complex="Calibri" style:font-size-complex="8pt" style:font-style-complex="italic"/>
    </style:style>
    <style:style style:name="T13" style:family="text">
      <style:text-properties fo:color="#000000" loext:opacity="100%" style:font-name="Calibri" fo:font-size="11pt" fo:language="en" fo:country="GB" style:font-name-asian="Calibri" style:font-size-asian="11pt" style:font-name-complex="Calibri" style:font-size-complex="11pt"/>
    </style:style>
    <style:style style:name="T14" style:family="text">
      <style:text-properties fo:color="#000000" loext:opacity="100%" style:font-name="Calibri" fo:font-size="10pt" fo:language="en" fo:country="GB" style:font-name-asian="Calibri" style:font-size-asian="10pt" style:font-name-complex="Calibri" style:font-size-complex="10pt"/>
    </style:style>
    <style:style style:name="T15" style:family="text">
      <style:text-properties fo:color="#000000" loext:opacity="100%" style:font-name="Calibri" fo:font-size="10pt" fo:language="en" fo:country="GB" fo:font-style="italic" style:font-name-asian="Calibri" style:font-size-asian="10pt" style:font-style-asian="italic" style:font-name-complex="Calibri" style:font-size-complex="10pt" style:font-style-complex="italic"/>
    </style:style>
    <style:style style:name="T16" style:family="text">
      <style:text-properties fo:color="#000000" loext:opacity="100%" style:font-name="Calibri" fo:font-size="10pt" fo:language="en" fo:country="GB" fo:font-style="normal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17" style:family="text">
      <style:text-properties fo:color="#000000" loext:opacity="100%" style:font-name="Calibri" fo:font-size="10pt" fo:language="en" fo:country="GB" fo:font-style="normal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8" style:family="text">
      <style:text-properties fo:color="#000000" loext:opacity="100%" style:font-name="Calibri" fo:font-size="4pt" fo:language="en" fo:country="GB" fo:font-style="normal" fo:font-weight="normal" style:font-name-asian="Calibri" style:font-size-asian="4pt" style:font-style-asian="normal" style:font-weight-asian="normal" style:font-name-complex="Calibri" style:font-size-complex="4pt" style:font-style-complex="normal" style:font-weight-complex="normal"/>
    </style:style>
    <style:style style:name="T19" style:family="text">
      <style:text-properties fo:color="#000000" loext:opacity="100%" style:font-name="Calibri" fo:font-size="10pt" fo:language="en" fo:country="GB" fo:font-weight="bold" style:font-name-asian="Calibri" style:font-size-asian="10pt" style:font-weight-asian="bold" style:font-name-complex="Calibri" style:font-size-complex="10pt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italic" fo:text-shadow="none" style:text-underline-style="none" fo:font-weight="normal" style:letter-kerning="true" style:font-name-asian="Calibri" style:font-size-asian="10pt" style:font-style-asian="italic" style:font-weight-asian="normal" style:font-name-complex="Calib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loext:opacity="100%" style:font-name="Calibri" fo:font-size="4pt" fo:language="en" fo:country="GB" style:font-name-asian="Calibri" style:font-size-asian="4pt" style:font-name-complex="Calibri" style:font-size-complex="4pt"/>
    </style:style>
    <style:style style:name="T22" style:family="text">
      <style:text-properties fo:color="#000000" loext:opacity="100%" style:font-name="Calibri" fo:font-size="4pt" fo:language="en" fo:country="GB" fo:font-style="italic" style:font-name-asian="Calibri" style:font-size-asian="4pt" style:font-style-asian="italic" style:font-name-complex="Calibri" style:font-size-complex="4pt" style:font-style-complex="italic"/>
    </style:style>
    <style:style style:name="T23" style:family="text">
      <style:text-properties fo:color="#000000" loext:opacity="100%" style:font-name="Calibri" fo:font-size="1pt" fo:language="en" fo:country="GB" style:font-name-asian="Calibri" style:font-size-asian="1pt" style:font-name-complex="Calibri" style:font-size-complex="1pt"/>
    </style:style>
    <style:style style:name="T24" style:family="text">
      <style:text-properties fo:color="#7f7f7f" loext:opacity="100%" style:font-name="Calibri" fo:font-size="8pt" fo:language="en" fo:country="GB" fo:font-style="italic" fo:font-weight="normal" style:font-name-asian="Calibri" style:font-size-asian="8pt" style:font-style-asian="italic" style:font-weight-asian="normal" style:font-name-complex="Calibri" style:font-size-complex="8pt" style:font-style-complex="italic" style:font-weight-complex="normal"/>
    </style:style>
    <style:style style:name="T25" style:family="text">
      <style:text-properties fo:color="#000000" loext:opacity="100%" style:font-name="Calibri" fo:font-size="11pt" fo:language="en" fo:country="GB" fo:font-weight="normal" style:font-name-asian="Calibri" style:font-size-asian="11pt" style:font-weight-asian="normal" style:font-name-complex="Calibri" style:font-size-complex="11pt" style:font-weight-complex="normal"/>
    </style:style>
    <style:style style:name="T26" style:family="text">
      <style:text-properties fo:color="#000000" loext:opacity="100%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27" style:family="text">
      <style:text-properties fo:color="#000000" loext:opacity="100%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28" style:family="text">
      <style:text-properties fo:color="#000000" loext:opacity="100%" style:font-name="Calibri" fo:font-size="10pt" fo:font-style="italic" fo:font-weight="normal" style:font-name-asian="Calibri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29" style:family="text">
      <style:text-properties fo:color="#000000" loext:opacity="100%" style:font-name="Calibri" fo:font-size="10pt" fo:language="en" fo:country="GB" fo:font-weight="normal" style:font-name-asian="Calibri" style:font-size-asian="10pt" style:font-weight-asian="normal" style:font-name-complex="Calibri" style:font-size-complex="10pt" style:font-weight-complex="normal"/>
    </style:style>
    <style:style style:name="T30" style:family="text">
      <style:text-properties fo:color="#000000" loext:opacity="100%" style:font-name="Calibri" fo:font-size="4pt" fo:language="en" fo:country="GB" fo:font-weight="bold" style:font-name-asian="Calibri" style:font-size-asian="4pt" style:font-weight-asian="bold" style:font-name-complex="Calibri" style:font-size-complex="4pt" style:font-weight-complex="bold"/>
    </style:style>
    <style:style style:name="T31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T32" style:family="text">
      <style:text-properties fo:color="#7f7f7f" loext:opacity="100%" style:font-name="Calibri" fo:font-size="9pt" fo:language="en" fo:country="GB" style:font-name-asian="Calibri" style:font-size-asian="9pt" style:font-name-complex="Calibri" style:font-size-complex="9pt"/>
    </style:style>
    <style:style style:name="T33" style:family="text">
      <style:text-properties fo:color="#000000" loext:opacity="100%" style:font-name="Calibri" fo:font-size="10pt" fo:language="es" fo:country="none" style:font-name-asian="Calibri" style:font-size-asian="10pt" style:font-name-complex="Calibri" style:font-size-complex="10pt"/>
    </style:style>
    <style:style style:name="T34" style:family="text">
      <style:text-properties fo:color="#000000" loext:opacity="100%" style:font-name="Calibri" fo:font-size="10pt" fo:language="es" fo:country="none" fo:font-weight="bold" style:font-name-asian="Calibri" style:font-size-asian="10pt" style:font-weight-asian="bold" style:font-name-complex="Calibri" style:font-size-complex="10pt" style:font-weight-complex="bold"/>
    </style:style>
    <style:style style:name="T35" style:family="text">
      <style:text-properties fo:color="#7f7f7f" loext:opacity="100%" style:font-name="Calibri" fo:font-size="8pt" fo:language="en" fo:country="GB" fo:font-weight="bold" style:font-name-asian="Calibri" style:font-size-asian="8pt" style:font-weight-asian="bold" style:font-name-complex="Calibri" style:font-size-complex="8pt" style:font-weight-complex="bold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normal" fo:text-shadow="none" style:text-underline-style="none" fo:font-weight="normal" style:letter-kerning="true" style:font-name-asian="Calibri" style:font-size-asian="10pt" style:font-style-asian="normal" style:font-weight-asian="normal" style:font-name-complex="Calib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style:font-name="Calibri" fo:font-size="10pt" fo:language="de" fo:country="DE" style:font-name-asian="Calibri" style:font-size-asian="10pt" style:font-name-complex="Calibri" style:font-size-complex="10pt"/>
    </style:style>
    <style:style style:name="T39" style:family="text">
      <style:text-properties fo:color="#000000" loext:opacity="100%" style:font-name="Calibri" fo:font-size="10pt" fo:language="de" fo:country="DE" fo:font-weight="bold" style:font-name-asian="Calibri" style:font-size-asian="10pt" style:font-weight-asian="bold" style:font-name-complex="Calibri" style:font-size-complex="10pt" style:font-weight-complex="bold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8pt" style:font-style-asian="normal" style:font-weight-asian="normal" style:font-name-complex="Calib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normal" fo:text-shadow="none" style:text-underline-style="none" style:text-underline-mode="continuous" style:text-overline-mode="continuous" style:text-line-through-mode="continuous" style:letter-kerning="true" style:font-name-asian="Calibri" style:font-size-asian="10pt" style:font-style-asian="normal" style:font-name-complex="Calibri" style:font-size-complex="10pt" style:font-style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Calibri" style:font-size-asian="10pt" style:font-style-asian="normal" style:font-weight-asian="bold" style:font-name-complex="Calibri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4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Calibri" style:font-size-asian="4pt" style:font-style-asian="normal" style:font-weight-asian="bold" style:font-name-complex="Calibri" style:font-size-complex="4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7pt" fo:language="en" fo:country="GB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Calibri" style:font-size-asian="7pt" style:font-style-asian="italic" style:font-weight-asian="bold" style:font-name-complex="Calibri" style:font-size-complex="7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color="#000000" loext:opacity="100%" style:font-name="Calibri" fo:font-size="8pt" fo:language="en" fo:country="GB" style:text-underline-style="none" fo:font-weight="normal" style:text-underline-mode="continuous" style:text-overline-mode="continuous" style:text-line-through-mode="continuous" style:font-name-asian="Calibri" style:font-size-asian="8pt" style:font-weight-asian="normal" style:font-name-complex="Calibri" style:font-size-complex="8pt" style:font-weight-complex="normal"/>
    </style:style>
    <style:style style:name="T47" style:family="text">
      <style:text-properties fo:color="#000000" loext:opacity="100%" style:font-name="Calibri" fo:font-size="10pt" fo:language="en" fo:country="GB" style:text-underline-style="none" fo:font-weight="normal" style:text-underline-mode="continuous" style:text-overline-mode="continuous" style:text-line-through-mode="continuous" style:font-name-asian="Calibri" style:font-size-asian="10pt" style:font-weight-asian="normal" style:font-name-complex="Calibri" style:font-size-complex="10pt" style:font-weight-complex="normal"/>
    </style:style>
    <style:style style:name="T48" style:family="text">
      <style:text-properties fo:color="#000000" loext:opacity="100%" style:font-name="Calibri" fo:font-size="10pt" fo:language="en" fo:country="GB" style:text-underline-style="none" fo:font-weight="bold" style:text-underline-mode="continuous" style:text-overline-mode="continuous" style:text-line-through-mode="continuous" style:font-name-asian="Calibri" style:font-size-asian="10pt" style:font-weight-asian="bold" style:font-name-complex="Calibri" style:font-size-complex="10pt" style:font-weight-complex="bold"/>
    </style:style>
    <style:style style:name="T49" style:family="text">
      <style:text-properties fo:color="#000000" loext:opacity="100%" style:font-name="Calibri" fo:font-size="4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4pt" style:font-weight-asian="bold" style:font-name-complex="Calibri" style:font-size-complex="4pt" style:font-weight-complex="bold"/>
    </style:style>
    <style:style style:name="T50" style:family="text">
      <style:text-properties fo:color="#000000" loext:opacity="100%" style:font-name="Calibri" fo:font-size="12pt" fo:language="en" fo:country="GB" style:text-underline-style="none" fo:font-weight="bold" style:text-underline-mode="continuous" style:text-overline-mode="continuous" style:text-line-through-mode="continuous" style:font-name-asian="Calibri" style:font-size-asian="12pt" style:font-weight-asian="bold" style:font-name-complex="Calibri" style:font-size-complex="12pt" style:font-weight-complex="bold"/>
    </style:style>
    <style:style style:name="T51" style:family="text">
      <style:text-properties fo:color="#000000" loext:opacity="100%" style:font-name="Calibri" fo:font-size="6pt" fo:language="en" fo:country="GB" fo:font-weight="bold" style:font-name-asian="Calibri" style:font-size-asian="6pt" style:font-weight-asian="bold" style:font-name-complex="Calibri" style:font-size-complex="6pt" style:font-weight-complex="bold"/>
    </style:style>
    <style:style style:name="T52" style:family="text">
      <style:text-properties fo:color="#595959" loext:opacity="100%" style:font-name="Ubuntu" fo:font-size="10pt" fo:language="en" fo:country="GB" style:font-name-asian="Ubuntu" style:font-size-asian="10pt" style:font-name-complex="Ubuntu" style:font-size-complex="10pt"/>
    </style:style>
    <style:style style:name="T53" style:family="text">
      <style:text-properties fo:color="#000000" loext:opacity="100%" style:font-name="Ubuntu" fo:font-size="11pt" fo:language="en" fo:country="GB" fo:font-weight="bold" style:font-name-asian="Ubuntu" style:font-size-asian="11pt" style:font-weight-asian="bold" style:font-name-complex="Ubuntu" style:font-size-complex="11pt" style:font-weight-complex="bold"/>
    </style:style>
    <style:style style:name="T54" style:family="text">
      <style:text-properties fo:color="#000000" loext:opacity="100%" style:font-name="Calibri" fo:font-size="9pt" fo:language="en" fo:country="GB" fo:font-weight="bold" style:font-name-asian="Calibri" style:font-size-asian="9pt" style:font-weight-asian="bold" style:font-name-complex="Calibri" style:font-size-complex="9pt" style:font-weight-complex="bold"/>
    </style:style>
    <style:style style:name="T55" style:family="text">
      <style:text-properties fo:color="#000000" loext:opacity="100%" style:font-name="Ubuntu" fo:font-size="9pt" fo:language="en" fo:country="GB" style:font-name-asian="Ubuntu" style:font-size-asian="9pt" style:font-name-complex="Ubuntu" style:font-size-complex="9pt"/>
    </style:style>
    <style:style style:name="T56" style:family="text">
      <style:text-properties fo:color="#000000" loext:opacity="100%" style:font-name="Calibri" fo:font-size="9pt" fo:language="en" fo:country="GB" style:font-name-asian="Calibri" style:font-size-asian="9pt" style:font-name-complex="Calibri" style:font-size-complex="9pt"/>
    </style:style>
    <style:style style:name="T57" style:family="text">
      <style:text-properties fo:color="#7c7c7c" loext:opacity="100%" style:font-name="Calibri" fo:font-size="9pt" fo:language="en" fo:country="GB" fo:font-style="italic" style:font-name-asian="Calibri" style:font-size-asian="9pt" style:font-style-asian="italic" style:font-name-complex="Calibri" style:font-size-complex="9pt" style:font-style-complex="italic"/>
    </style:style>
    <style:style style:name="T58" style:family="text">
      <style:text-properties fo:font-variant="normal" fo:text-transform="none" fo:color="#5c7f92" loext:opacity="100%" style:text-outline="false" style:text-line-through-style="none" style:text-line-through-type="none" style:font-name="Avenir Next LT Pro" fo:font-size="7pt" fo:language="en" fo:country="GB" fo:font-style="normal" fo:text-shadow="none" style:text-underline-style="none" fo:font-weight="bold" style:letter-kerning="true" style:font-name-asian="Avenir Next LT Pro" style:font-size-asian="7pt" style:font-style-asian="normal" style:font-weight-asian="bold" style:font-name-complex="Avenir Next LT Pro" style:font-size-complex="7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333333" loext:opacity="100%" style:text-outline="false" style:text-line-through-style="none" style:text-line-through-type="none" style:font-name="Avenir Next LT Pro" fo:font-size="7pt" fo:language="en" fo:country="GB" fo:font-style="normal" fo:text-shadow="none" style:text-underline-style="none" fo:font-weight="bold" style:letter-kerning="true" style:font-name-asian="Avenir Next LT Pro" style:font-size-asian="7pt" style:font-style-asian="normal" style:font-weight-asian="bold" style:font-name-complex="Avenir Next LT Pro" style:font-size-complex="7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10.7cm" svg:height="1.908cm" svg:x="10.304cm" svg:y="-0.011cm" svg:viewBox="0 0 10701 1909" draw:points="0,0 10701,0 10701,1909 0,1909">
          <text:p/>
        </draw:polygon>
        <draw:frame draw:style-name="gr2" draw:text-style-name="P3" draw:layer="layout" svg:width="7.811cm" svg:height="1.234cm" svg:x="1.206cm" svg:y="0.193cm">
          <draw:text-box>
            <text:p text:style-name="P2"><text:span text:style-name="T1">Eduardo </text:span><text:span text:style-name="T1">Venegas</text:span><text:span text:style-name="T2"> </text:span></text:p>
          </draw:text-box>
        </draw:frame>
        <draw:frame draw:style-name="gr3" draw:text-style-name="P4" draw:layer="layout" svg:width="5.539cm" svg:height="0.679cm" svg:x="1.255cm" svg:y="1.136cm">
          <draw:text-box>
            <text:p text:style-name="P2"><text:span text:style-name="T3">Da</text:span><text:span text:style-name="T3">ta </text:span><text:span text:style-name="T3">&amp; </text:span><text:span text:style-name="T3">AI </text:span><text:span text:style-name="T3">En</text:span><text:span text:style-name="T3">gin</text:span><text:span text:style-name="T3">ee</text:span><text:span text:style-name="T3">r</text:span><text:span text:style-name="T4"> </text:span></text:p>
          </draw:text-box>
        </draw:frame>
        <draw:frame draw:style-name="gr4" draw:text-style-name="P3" draw:layer="layout" svg:width="3.556cm" svg:height="0.589cm" svg:x="11.054cm" svg:y="0.126cm">
          <draw:text-box>
            <text:p text:style-name="P2"><text:span text:style-name="T5"><text:a xlink:href="mailto:lalohdez77@gmail.com" xlink:type="simple">lalohdez77@gmail.com</text:a></text:span></text:p>
          </draw:text-box>
        </draw:frame>
        <draw:frame draw:style-name="gr5" draw:text-style-name="P5" draw:layer="layout" svg:width="3.238cm" svg:height="0.523cm" svg:x="11.054cm" svg:y="0.715cm">
          <draw:text-box>
            <text:p text:style-name="P2"><text:span text:style-name="T6">Munich, </text:span><text:span text:style-name="T6">Germany</text:span></text:p>
          </draw:text-box>
        </draw:frame>
        <draw:frame draw:style-name="gr6" draw:text-style-name="P6" draw:layer="layout" svg:width="3.238cm" svg:height="0.616cm" svg:x="11.054cm" svg:y="1.3cm">
          <draw:text-box>
            <text:p text:style-name="P2"><text:span text:style-name="T7"><text:a xlink:href="https://github.com/LaloVene/" xlink:type="simple">LaloVene</text:a></text:span></text:p>
          </draw:text-box>
        </draw:frame>
        <draw:frame draw:style-name="gr4" draw:text-style-name="P3" draw:layer="layout" svg:width="2.675cm" svg:height="0.589cm" svg:x="15.015cm" svg:y="0.742cm">
          <draw:text-box>
            <text:p text:style-name="P2"><text:span text:style-name="T7"><text:a xlink:href="https://www.linkedin.com/in/eduardo-venegas/" xlink:type="simple">eduardo venegas</text:a></text:span></text:p>
          </draw:text-box>
        </draw:frame>
        <draw:polygon draw:style-name="gr7" draw:text-style-name="P7" draw:layer="layout" svg:width="0.555cm" svg:height="0.555cm" svg:x="14.46cm" svg:y="0.724cm" svg:viewBox="0 0 556 556" draw:points="0,0 556,0 556,556 0,556">
          <text:p/>
        </draw:polygon>
        <draw:frame draw:style-name="gr8" draw:text-style-name="P3" draw:layer="layout" svg:width="2.922cm" svg:height="0.643cm" svg:x="15.015cm" svg:y="0.099cm">
          <draw:text-box>
            <text:p text:style-name="P2"><text:span text:style-name="T7"><text:a xlink:href="https://lalovene.netlify.app/" xlink:type="simple">lalovene.netlify.app</text:a></text:span></text:p>
          </draw:text-box>
        </draw:frame>
        <draw:frame draw:style-name="gr9" draw:text-style-name="P3" draw:layer="layout" svg:width="3.82cm" svg:height="0.971cm" svg:x="1.26cm" svg:y="1.625cm">
          <draw:text-box>
            <text:p text:style-name="P2"><text:span text:style-name="T8">EDUCATION </text:span></text:p>
          </draw:text-box>
        </draw:frame>
        <draw:frame draw:style-name="gr10" draw:text-style-name="P11" draw:layer="layout" svg:width="18.46cm" svg:height="5.093cm" svg:x="1.291cm" svg:y="2.387cm">
          <draw:text-box>
            <text:p text:style-name="P8"><text:span text:style-name="T9">MSc. Data Science and Artificial Intelligence </text:span><text:span text:style-name="T10">Universität des Saarlandes</text:span><text:span text:style-name="T11"><text:tab/></text:span><text:span text:style-name="T12">10/2024 – 09/2026</text:span><text:span text:style-name="T12"><text:tab/></text:span><text:span text:style-name="T12">Saarbrücken, Germany</text:span><text:span text:style-name="T13"> </text:span></text:p>
            <text:list text:style-name="L1">
              <text:list-item>
                <text:p text:style-name="P9"><text:span text:style-name="T14">Coursing. </text:span><text:span text:style-name="T15">Statistics | ML Cybersecurity | NLP | Machine Translation | Image Processing &amp; Computer Vision.</text:span></text:p>
              </text:list-item>
              <text:list-item>
                <text:p text:style-name="P9"><text:span text:style-name="T16">Thesis (Seminar Grade 1.0):</text:span><text:span text:style-name="T17"> Evaluating Multi-Turn Agentic RAG Systems (In collaboration with BMW &amp; DFKI).</text:span></text:p>
                <text:p text:style-name="P9"><text:span text:style-name="T18"/></text:p>
              </text:list-item>
            </text:list>
            <text:p text:style-name="P8"><text:span text:style-name="T9">BSc. Computer Science </text:span><text:span text:style-name="T10">Tecnológico de Monterrey GDL</text:span><text:span text:style-name="T11"><text:tab/></text:span><text:span text:style-name="T11"><text:tab/></text:span><text:span text:style-name="T11"><text:tab/></text:span><text:span text:style-name="T11"><text:tab/></text:span><text:span text:style-name="T12">08/2019 – 12/2023</text:span><text:span text:style-name="T12"><text:tab/></text:span><text:span text:style-name="T12">Guadalajara, Mexico</text:span><text:span text:style-name="T13"> </text:span></text:p>
            <text:list text:continue-numbering="true" text:style-name="L1">
              <text:list-item>
                <text:p text:style-name="P9"><text:span text:style-name="T14">Grade: 94.6 / 100. Five times best software engineering GPA. </text:span><text:span text:style-name="T19">60% tuition </text:span><text:span text:style-name="T14">scholarship due to academic merit.</text:span></text:p>
              </text:list-item>
              <text:list-item>
                <text:p text:style-name="P9"><text:span text:style-name="T20">ML | Time series | Algorithms &amp; Optimization | Cloud Computing &amp; Distributed | Vehicle User Interfaces | </text:span><text:span text:style-name="T15">PLC.</text:span></text:p>
              </text:list-item>
            </text:list>
            <text:p text:style-name="P10"><text:span text:style-name="T21"/></text:p>
            <text:p text:style-name="P8"><text:span text:style-name="T9">Computer Science Exchange Student </text:span><text:span text:style-name="T10">Universität Ulm</text:span><text:span text:style-name="T11"><text:tab/></text:span><text:span text:style-name="T11"><text:tab/></text:span><text:span text:style-name="T11"><text:tab/></text:span><text:span text:style-name="T11"><text:tab/></text:span><text:span text:style-name="T12">10/2022 – 09/2023</text:span><text:span text:style-name="T12"><text:tab/></text:span><text:span text:style-name="T12">Ulm, Germany</text:span><text:span text:style-name="T13"> </text:span></text:p>
            <text:list text:continue-numbering="true" text:style-name="L1">
              <text:list-item>
                <text:p text:style-name="P9"><text:span text:style-name="T19">Full scholarship </text:span><text:span text:style-name="T14">recipient</text:span><text:span text:style-name="T19"> </text:span><text:span text:style-name="T14">from </text:span><text:span text:style-name="T19">DAAD</text:span><text:span text:style-name="T14">. </text:span><text:span text:style-name="T15">Computer Vision II | Autonomous Driving and Assistance Systems | Statistics.</text:span></text:p>
              </text:list-item>
            </text:list>
            <text:p text:style-name="P10"><text:span text:style-name="T22"/></text:p>
            <text:p text:style-name="P10"><text:span text:style-name="T23"/></text:p>
            <text:p text:style-name="P8"><text:span text:style-name="T9">Technologist in Automation and Robotics </text:span><text:span text:style-name="T10">CETI Colomos</text:span><text:span text:style-name="T11"><text:tab/></text:span><text:span text:style-name="T11"><text:tab/></text:span><text:span text:style-name="T11"><text:tab/></text:span><text:span text:style-name="T12">08/2015 – 06/2019</text:span><text:span text:style-name="T12"><text:tab/></text:span><text:span text:style-name="T12">Guadalajara, Mexico</text:span><text:span text:style-name="T14"> </text:span></text:p>
            <text:list text:continue-numbering="true" text:style-name="L1">
              <text:list-item>
                <text:p text:style-name="P9"><text:span text:style-name="T19">Thesis:</text:span><text:span text:style-name="T14"> Automated Tennis Machine integrating </text:span><text:span text:style-name="T19">PID control</text:span><text:span text:style-name="T14">. </text:span><text:span text:style-name="T15">Electronics | Robotics | Industrial Automation | Electricity | PLCs</text:span></text:p>
              </text:list-item>
            </text:list>
          </draw:text-box>
        </draw:frame>
        <draw:frame draw:style-name="gr11" draw:text-style-name="P11" draw:layer="layout" svg:width="18.491cm" svg:height="11.834cm" svg:x="1.234cm" svg:y="10.661cm">
          <draw:text-box>
            <text:p text:style-name="P12"><text:span text:style-name="T9">Data Scientist Masterarbeit </text:span><text:span text:style-name="T10">BMW &amp; Deutsches Forschungszentrum für KI (DFKI)</text:span><text:span text:style-name="T10"><text:tab/></text:span><text:span text:style-name="T24">03/2026 – 09/2026</text:span><text:span text:style-name="T24"><text:tab/></text:span><text:span text:style-name="T24">Munich, Germany</text:span><text:span text:style-name="T25"> </text:span></text:p>
            <text:list text:style-name="L1">
              <text:list-item>
                <text:p text:style-name="P13"><text:span text:style-name="T26">Topic:</text:span><text:span text:style-name="T27"> </text:span><text:span text:style-name="T28">Evaluating Multi-Turn Agentic RAG Systems: A Synthetic Benchmark Generation Approach.</text:span></text:p>
              </text:list-item>
              <text:list-item>
                <text:p text:style-name="P13"><text:span text:style-name="T29">Architected a modular evaluation framework for </text:span><text:span text:style-name="T19">tool-using Agentic RAG</text:span><text:span text:style-name="T29"> systems to enable fine-grained failure localization.</text:span></text:p>
              </text:list-item>
              <text:list-item>
                <text:p text:style-name="P13"><text:span text:style-name="T29">Built a </text:span><text:span text:style-name="T19">multi-turn synthetic benchmark </text:span><text:span text:style-name="T29">that combines deterministic </text:span><text:span text:style-name="T19">task planning </text:span><text:span text:style-name="T29">with diverse user </text:span><text:span text:style-name="T19">personas</text:span><text:span text:style-name="T29">.</text:span></text:p>
              </text:list-item>
              <text:list-item>
                <text:p text:style-name="P13"><text:span text:style-name="T29">Engineered an </text:span><text:span text:style-name="T19">unsupervised retrieval engine </text:span><text:span text:style-name="T29">to audit a </text:span><text:span text:style-name="T19">RAG system </text:span><text:span text:style-name="T29">over </text:span><text:span text:style-name="T19">4M unannotated </text:span><text:span text:style-name="T29">corporate records.</text:span></text:p>
              </text:list-item>
            </text:list>
            <text:p text:style-name="P14"><text:span text:style-name="T30"/></text:p>
            <text:p text:style-name="P8"><text:span text:style-name="T9">Data Scientist Werkstudent </text:span><text:span text:style-name="T10">August-Wilhelm Scheer Institute</text:span><text:span text:style-name="T10"><text:tab/></text:span><text:span text:style-name="T10"><text:tab/></text:span><text:span text:style-name="T10"><text:tab/></text:span><text:span text:style-name="T12">10/2024 – 02/2026</text:span><text:span text:style-name="T12"><text:tab/></text:span><text:span text:style-name="T12">Saarbrücken, Germany</text:span><text:span text:style-name="T13"> </text:span></text:p>
            <text:list text:continue-numbering="true" text:style-name="L1">
              <text:list-item>
                <text:p text:style-name="P9"><text:span text:style-name="T31">Developed a </text:span><text:span text:style-name="T26">KG-RAG </text:span><text:span text:style-name="T31">over unstructured technical documentation and a </text:span><text:span text:style-name="T26">Planning Agent</text:span><text:span text:style-name="T31">, using </text:span><text:span text:style-name="T26">LangChain</text:span><text:span text:style-name="T31"> and </text:span><text:span text:style-name="T26">HuggingFace</text:span><text:span text:style-name="T31">.</text:span></text:p>
              </text:list-item>
              <text:list-item>
                <text:p text:style-name="P9"><text:span text:style-name="T14">Implemented an </text:span><text:span text:style-name="T19">Autoencoder</text:span><text:span text:style-name="T14"> model for </text:span><text:span text:style-name="T19">Anomaly Detection</text:span><text:span text:style-name="T14"> via </text:span><text:span text:style-name="T19">Federated Learning </text:span><text:span text:style-name="T14">across edge devices.</text:span></text:p>
              </text:list-item>
            </text:list>
            <text:p text:style-name="P10"><text:span text:style-name="T21"/></text:p>
            <text:p text:style-name="P8"><text:span text:style-name="T9">Cloud Software Engineer </text:span><text:span text:style-name="T10">Oracle</text:span><text:span text:style-name="T10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12">11/2023 – 10/2024</text:span><text:span text:style-name="T12"><text:tab/></text:span><text:span text:style-name="T12">Guadalajara, Mexico</text:span><text:span text:style-name="T13"> </text:span></text:p>
            <text:list text:continue-numbering="true" text:style-name="L1">
              <text:list-item>
                <text:p text:style-name="P9"><text:span text:style-name="T33">Worked on the </text:span><text:span text:style-name="T34">Oracle Cloud Infrastructure </text:span><text:span text:style-name="T33">in the team of </text:span><text:span text:style-name="T34">Big Data Service</text:span><text:span text:style-name="T33"> in </text:span><text:span text:style-name="T34">Oracle Analytics</text:span><text:span text:style-name="T33">.</text:span><text:span text:style-name="T14"> </text:span></text:p>
              </text:list-item>
              <text:list-item>
                <text:p text:style-name="P9"><text:span text:style-name="T33">Developed tools for managing and deploying </text:span><text:span text:style-name="T34">big data clusters</text:span><text:span text:style-name="T33">. Implemented </text:span><text:span text:style-name="T34">pipelines </text:span><text:span text:style-name="T33">for automation and testing.</text:span><text:span text:style-name="T14"> </text:span></text:p>
              </text:list-item>
            </text:list>
            <text:p text:style-name="P10"><text:span text:style-name="T21"/></text:p>
            <text:p text:style-name="P8"><text:span text:style-name="T9">Data Analyst Intern </text:span><text:span text:style-name="T10">BMW Group</text:span><text:span text:style-name="T10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12">03/2023 – 09/2023</text:span><text:span text:style-name="T12"><text:tab/></text:span><text:span text:style-name="T12">Munich, Germany</text:span><text:span text:style-name="T13"> </text:span></text:p>
            <text:list text:continue-numbering="true" text:style-name="L1">
              <text:list-item>
                <text:p text:style-name="P9"><text:span text:style-name="T33">Developed a high-accuracy algorithm for </text:span><text:span text:style-name="T34">detecting external battery replacements</text:span><text:span text:style-name="T33">.</text:span><text:span text:style-name="T14"> </text:span></text:p>
              </text:list-item>
              <text:list-item>
                <text:p text:style-name="P9"><text:span text:style-name="T33">Identified </text:span><text:span text:style-name="T34">root cause</text:span><text:span text:style-name="T33"> of </text:span><text:span text:style-name="T34">missing db values </text:span><text:span text:style-name="T33">and created a new processing pipeline, </text:span><text:span text:style-name="T34">increasing service demand by 62%</text:span><text:span text:style-name="T33">.</text:span><text:span text:style-name="T14"> </text:span></text:p>
              </text:list-item>
              <text:list-item>
                <text:p text:style-name="P9"><text:span text:style-name="T33">Designed a </text:span><text:span text:style-name="T34">Streamlit dashboard </text:span><text:span text:style-name="T33">for adjusting prediction model parameters and obtaining a </text:span><text:span text:style-name="T34">real-time output (&lt;8 seconds</text:span><text:span text:style-name="T33">).</text:span><text:span text:style-name="T14"> </text:span></text:p>
              </text:list-item>
              <text:list-item>
                <text:p text:style-name="P9"><text:span text:style-name="T33">Configured </text:span><text:span text:style-name="T34">cloud-based environments </text:span><text:span text:style-name="T33">for working with </text:span><text:span text:style-name="T34">PySpark</text:span><text:span text:style-name="T33">. </text:span></text:p>
              </text:list-item>
            </text:list>
            <text:p text:style-name="P10"><text:span text:style-name="T21"/></text:p>
            <text:p text:style-name="P8"><text:span text:style-name="T9">Site Reliability Engineer </text:span><text:span text:style-name="T10">Xira</text:span><text:span text:style-name="T35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2">01/2022 – 04/2022</text:span><text:span text:style-name="T12"><text:tab/></text:span><text:span text:style-name="T12">Mexico City, Mexico</text:span><text:span text:style-name="T13"> </text:span></text:p>
            <text:list text:continue-numbering="true" text:style-name="L1">
              <text:list-item>
                <text:p text:style-name="P9"><text:span text:style-name="T19">Managed </text:span><text:span text:style-name="T14">over 10 servers, </text:span><text:span text:style-name="T19">monitored </text:span><text:span text:style-name="T14">services and </text:span><text:span text:style-name="T19">enhanced </text:span><text:span text:style-name="T14">engineering processes. </text:span></text:p>
              </text:list-item>
              <text:list-item>
                <text:p text:style-name="P9"><text:span text:style-name="T14">Built a </text:span><text:span text:style-name="T19">platform </text:span><text:span text:style-name="T14">to manage client </text:span><text:span text:style-name="T19">APIs</text:span><text:span text:style-name="T14">, integrating payments and subscription systems using </text:span><text:span text:style-name="T19">NextJS</text:span><text:span text:style-name="T14">, </text:span><text:span text:style-name="T19">Stripe </text:span><text:span text:style-name="T14">and </text:span><text:span text:style-name="T19">Docker</text:span><text:span text:style-name="T14">. </text:span></text:p>
              </text:list-item>
            </text:list>
            <text:p text:style-name="P10"><text:span text:style-name="T21"/></text:p>
            <text:p text:style-name="P8"><text:span text:style-name="T36">Production Engineer </text:span><text:span text:style-name="T9">Fellow </text:span><text:span text:style-name="T10">Major League Hacking &amp; Meta</text:span><text:span text:style-name="T32"><text:tab/></text:span><text:span text:style-name="T11"><text:tab/></text:span><text:span text:style-name="T11"><text:tab/></text:span><text:span text:style-name="T12">06/2021 – 09/2021</text:span><text:span text:style-name="T12"><text:tab/></text:span><text:span text:style-name="T12">New York, USA</text:span><text:span text:style-name="T14"> </text:span></text:p>
            <text:list text:continue-numbering="true" text:style-name="L1">
              <text:list-item>
                <text:p text:style-name="P13"><text:span text:style-name="T37">Selected among 120 out of 20,000 applicants. </text:span><text:span text:style-name="T38">Implemented monitoring with</text:span><text:span text:style-name="T14"> </text:span><text:span text:style-name="T19">Prometheus </text:span><text:span text:style-name="T14">and </text:span><text:span text:style-name="T19">Grafana</text:span><text:span text:style-name="T14">.</text:span><text:span text:style-name="T21"> </text:span></text:p>
              </text:list-item>
              <text:list-item>
                <text:p text:style-name="P9"><text:span text:style-name="T14">Automated </text:span><text:span text:style-name="T19">CI/CD </text:span><text:span text:style-name="T14">workflow </text:span><text:span text:style-name="T38">for efficient deployment <text:s/>to a production server using Docker in an </text:span><text:span text:style-name="T39">AWS EC2 </text:span><text:span text:style-name="T38">instance</text:span></text:p>
              </text:list-item>
            </text:list>
            <text:p text:style-name="P10"><text:span text:style-name="T21"/></text:p>
            <text:p text:style-name="P8"><text:span text:style-name="T9">Full Stack &amp; Data Engineer <text:s/></text:span><text:span text:style-name="T10">Jiit Technologies</text:span><text:span text:style-name="T10"><text:tab/></text:span><text:span text:style-name="T32"><text:tab/></text:span><text:span text:style-name="T32"><text:tab/></text:span><text:span text:style-name="T32"><text:tab/></text:span><text:span text:style-name="T32"><text:tab/></text:span><text:span text:style-name="T12">10/2020 – 06/2021</text:span><text:span text:style-name="T12"><text:tab/></text:span><text:span text:style-name="T12">Guadalajara, Mexico</text:span><text:span text:style-name="T13"> </text:span></text:p>
            <text:list text:continue-numbering="true" text:style-name="L1">
              <text:list-item>
                <text:p text:style-name="P9"><text:span text:style-name="T38">Designed a custom sales data analysis pipeline API using </text:span><text:span text:style-name="T19">Flask</text:span><text:span text:style-name="T14">, </text:span><text:span text:style-name="T19">SciPy </text:span><text:span text:style-name="T14">and </text:span><text:span text:style-name="T19">Prophet</text:span><text:span text:style-name="T14">.</text:span><text:span text:style-name="T21"> </text:span></text:p>
              </text:list-item>
              <text:list-item>
                <text:p text:style-name="P9"><text:span text:style-name="T14">Built an </text:span><text:span text:style-name="T19">ERP </text:span><text:span text:style-name="T14">platform from scratch to manage inventory, human resources, shipments, income and expenses. </text:span><text:span text:style-name="T19">Angular</text:span><text:span text:style-name="T14">. </text:span></text:p>
              </text:list-item>
            </text:list>
          </draw:text-box>
        </draw:frame>
        <draw:frame draw:style-name="gr12" draw:text-style-name="P17" draw:layer="layout" svg:width="18.452cm" svg:height="4.052cm" svg:x="1.239cm" svg:y="23.092cm">
          <draw:text-box>
            <text:p text:style-name="P14"><text:span text:style-name="T40">VectorDrive-Route: Autonomous BEV Trajectory Planning</text:span><text:span text:style-name="T41"><text:tab/></text:span></text:p>
            <text:list text:style-name="L1">
              <text:list-item>
                <text:p text:style-name="P15"><text:span text:style-name="T42">Built a </text:span><text:span text:style-name="T43">PyTorch</text:span><text:span text:style-name="T42"> pipeline using </text:span><text:span text:style-name="T43">nuScenes</text:span><text:span text:style-name="T42">, </text:span><text:span text:style-name="T43">ResNet</text:span><text:span text:style-name="T42"> and </text:span><text:span text:style-name="T43">depth lifting</text:span><text:span text:style-name="T42"> to map multi-camera feeds into a </text:span><text:span text:style-name="T43">Bird’s-Eye-View</text:span><text:span text:style-name="T42"> grid.</text:span></text:p>
              </text:list-item>
              <text:list-item>
                <text:p text:style-name="P15"><text:span text:style-name="T42">Designed a </text:span><text:span text:style-name="T43">temporal motion planning head</text:span><text:span text:style-name="T42"> with </text:span><text:span text:style-name="T43">drivable-area and occupancy decoders</text:span><text:span text:style-name="T42"> to generate safe paths. </text:span></text:p>
                <text:p text:style-name="P15"><text:span text:style-name="T44"/></text:p>
              </text:list-item>
            </text:list>
            <text:p text:style-name="P14"><text:span text:style-name="T40">Daten-Mapping-Framework für die AAS</text:span><text:span text:style-name="T40"><text:tab/></text:span><text:span text:style-name="T40"><text:tab/></text:span><text:span text:style-name="T40"><text:tab/></text:span><text:span text:style-name="T40"><text:tab/></text:span><text:span text:style-name="T45"><text:a xlink:href="https://doi.org/10.17560/atp.v68i5.2836" xlink:type="simple">DOI: 10.17560/atp.v68i5.2836	</text:a></text:span><text:span text:style-name="T46"><text:tab/></text:span><text:span text:style-name="T46"><text:tab/></text:span></text:p>
            <text:list text:continue-numbering="true" text:style-name="L1">
              <text:list-item>
                <text:p text:style-name="P15"><text:span text:style-name="T47">Developed a mapping </text:span><text:span text:style-name="T48">framework</text:span><text:span text:style-name="T47"> from schemas to </text:span><text:span text:style-name="T48">Asset Administration Shell </text:span><text:span text:style-name="T47">to achieve interoperability in </text:span><text:span text:style-name="T48">Industry 4.0</text:span><text:span text:style-name="T47">.</text:span></text:p>
              </text:list-item>
              <text:list-item>
                <text:p text:style-name="P15"><text:span text:style-name="T47">Designed a dual alignment strategy separating standard </text:span><text:span text:style-name="T48">relational</text:span><text:span text:style-name="T47"> tables from </text:span><text:span text:style-name="T48">hierarchical</text:span><text:span text:style-name="T47"> <text:s/>assets.</text:span></text:p>
                <text:p text:style-name="P15"><text:span text:style-name="T49"/></text:p>
              </text:list-item>
            </text:list>
            <text:p text:style-name="P10"><text:span text:style-name="T50">See Your World</text:span></text:p>
            <text:list text:continue-numbering="true" text:style-name="L1">
              <text:list-item>
                <text:p text:style-name="P16"><text:span text:style-name="T14">Crafted a hackathon </text:span><text:span text:style-name="T19">award-winning</text:span><text:span text:style-name="T14"> app for the </text:span><text:span text:style-name="T19">visually impaired</text:span><text:span text:style-name="T14">, supporting </text:span><text:span text:style-name="T19">11 languages</text:span><text:span text:style-name="T14">.</text:span><text:span text:style-name="T51"> </text:span></text:p>
              </text:list-item>
              <text:list-item>
                <text:p text:style-name="P16"><text:span text:style-name="T14">Engineered </text:span><text:span text:style-name="T19">Image Captioning </text:span><text:span text:style-name="T14">DL model with </text:span><text:span text:style-name="T19">TensorFlow</text:span><text:span text:style-name="T14">, deployed using </text:span><text:span text:style-name="T19">Flask, Docker, </text:span><text:span text:style-name="T14">and </text:span><text:span text:style-name="T19">Google Cloud VM</text:span><text:span text:style-name="T14">.</text:span></text:p>
              </text:list-item>
            </text:list>
          </draw:text-box>
        </draw:frame>
        <draw:frame draw:style-name="gr9" draw:text-style-name="P3" draw:layer="layout" svg:width="6.019cm" svg:height="0.971cm" svg:x="1.256cm" svg:y="9.899cm">
          <draw:text-box>
            <text:p text:style-name="P2"><text:span text:style-name="T8">WORK EXPERIENCE </text:span></text:p>
          </draw:text-box>
        </draw:frame>
        <draw:frame draw:style-name="gr9" draw:text-style-name="P17" draw:layer="layout" svg:width="6.019cm" svg:height="0.971cm" svg:x="1.26cm" svg:y="22.33cm">
          <draw:text-box>
            <text:p text:style-name="P2"><text:span text:style-name="T8">PROJECTS </text:span></text:p>
          </draw:text-box>
        </draw:frame>
        <draw:frame draw:style-name="gr9" draw:text-style-name="P3" draw:layer="layout" svg:width="2.2cm" svg:height="0.971cm" svg:x="1.292cm" svg:y="7.297cm">
          <draw:text-box>
            <text:p text:style-name="P2"><text:span text:style-name="T8">SKILLS </text:span></text:p>
          </draw:text-box>
        </draw:frame>
        <draw:g draw:style-name="gr13">
          <draw:path draw:style-name="gr14" draw:text-style-name="P18" draw:layer="layout" svg:width="2.375cm" svg:height="0.534cm" svg:x="8.627cm" svg:y="8.071cm" svg:viewBox="0 0 2376 535" svg:d="M108 0c-54 0-108 44-108 88v358c0 45 54 89 108 89h2158c55 0 110-44 110-89v-358c0-44-55-88-110-88zM108 0z">
            <text:p/>
          </draw:path>
          <draw:frame draw:style-name="gr15" draw:text-style-name="P20" draw:layer="layout" svg:width="2.375cm" svg:height="0.863cm" svg:x="8.627cm" svg:y="8.071cm">
            <draw:text-box>
              <text:p text:style-name="P19"><text:span text:style-name="T52">HuggingFace </text:span></text:p>
            </draw:text-box>
          </draw:frame>
        </draw:g>
        <draw:g draw:style-name="gr13">
          <draw:path draw:style-name="gr14" draw:text-style-name="P18" draw:layer="layout" svg:width="2cm" svg:height="0.534cm" svg:x="4.575cm" svg:y="8.071cm" svg:viewBox="0 0 2001 535" svg:d="M88 0c-44 0-88 44-88 88v358c0 45 44 89 88 89h1825c44 0 88-44 88-89v-358c0-44-44-88-88-88zM88 0z">
            <text:p/>
          </draw:path>
          <draw:frame draw:style-name="gr15" draw:text-style-name="P20" draw:layer="layout" svg:width="2cm" svg:height="0.863cm" svg:x="4.575cm" svg:y="8.071cm">
            <draw:text-box>
              <text:p text:style-name="P19"><text:span text:style-name="T52">LangChain </text:span></text:p>
            </draw:text-box>
          </draw:frame>
        </draw:g>
        <draw:g draw:style-name="gr13">
          <draw:path draw:style-name="gr14" draw:text-style-name="P18" draw:layer="layout" svg:width="2.145cm" svg:height="0.534cm" svg:x="13.94cm" svg:y="8.072cm" svg:viewBox="0 0 2146 535" svg:d="M126 0c-63 0-126 44-126 88v358c0 45 63 89 126 89h1894c63 0 126-44 126-89v-358c0-44-63-88-126-88zM126 0z">
            <text:p/>
          </draw:path>
          <draw:frame draw:style-name="gr16" draw:text-style-name="P20" draw:layer="layout" svg:width="2.145cm" svg:height="0.534cm" svg:x="13.94cm" svg:y="8.072cm">
            <draw:text-box>
              <text:p text:style-name="P19"><text:span text:style-name="T52">TensorFlow </text:span></text:p>
            </draw:text-box>
          </draw:frame>
        </draw:g>
        <draw:g draw:style-name="gr13">
          <draw:path draw:style-name="gr14" draw:text-style-name="P18" draw:layer="layout" svg:width="1.962cm" svg:height="0.534cm" svg:x="6.622cm" svg:y="8.059cm" svg:viewBox="0 0 1963 535" svg:d="M101 0c-50 0-101 44-101 88v358c0 45 51 89 101 89h1761c50 0 101-44 101-89v-358c0-44-51-88-101-88zM101 0z">
            <text:p/>
          </draw:path>
          <draw:frame draw:style-name="gr16" draw:text-style-name="P20" draw:layer="layout" svg:width="1.962cm" svg:height="0.534cm" svg:x="6.622cm" svg:y="8.059cm">
            <draw:text-box>
              <text:p text:style-name="P19"><text:span text:style-name="T52">LangGraph</text:span></text:p>
            </draw:text-box>
          </draw:frame>
        </draw:g>
        <draw:g draw:style-name="gr13">
          <draw:path draw:style-name="gr14" draw:text-style-name="P18" draw:layer="layout" svg:width="0.5cm" svg:height="0.534cm" svg:x="12.322cm" svg:y="8.071cm" svg:viewBox="0 0 501 535" svg:d="M83 0c-42 0-83 41-83 83v369c0 42 41 83 83 83h335c42 0 83-41 83-83v-369c0-42-41-83-83-83zM83 0z">
            <text:p/>
          </draw:path>
          <draw:frame draw:style-name="gr16" draw:text-style-name="P20" draw:layer="layout" svg:width="0.5cm" svg:height="0.534cm" svg:x="12.322cm" svg:y="8.071cm">
            <draw:text-box>
              <text:p text:style-name="P19"><text:span text:style-name="T52">R </text:span></text:p>
            </draw:text-box>
          </draw:frame>
        </draw:g>
        <draw:frame draw:style-name="gr17" draw:text-style-name="P3" draw:layer="layout" svg:width="1.901cm" svg:height="0.658cm" svg:x="1.274cm" svg:y="8.059cm">
          <draw:text-box>
            <text:p text:style-name="P2"><text:span text:style-name="T53">Data </text:span></text:p>
          </draw:text-box>
        </draw:frame>
        <draw:g draw:style-name="gr13">
          <draw:path draw:style-name="gr18" draw:text-style-name="P21" draw:layer="layout" svg:width="1.6cm" svg:height="0.534cm" svg:x="11.823cm" svg:y="8.71cm" svg:viewBox="0 0 1601 535" svg:d="M88 0c-44 0-88 44-88 88v358c0 45 44 89 88 89h1425c44 0 88-44 88-89v-358c0-44-44-88-88-88zM88 0z">
            <text:p/>
          </draw:path>
          <draw:frame draw:style-name="gr16" draw:text-style-name="P20" draw:layer="layout" svg:width="1.6cm" svg:height="0.534cm" svg:x="11.823cm" svg:y="8.71cm">
            <draw:text-box>
              <text:p text:style-name="P19"><text:span text:style-name="T52">Angular </text:span></text:p>
            </draw:text-box>
          </draw:frame>
        </draw:g>
        <draw:g draw:style-name="gr13">
          <draw:path draw:style-name="gr18" draw:text-style-name="P21" draw:layer="layout" svg:width="1.2cm" svg:height="0.534cm" svg:x="10.572cm" svg:y="8.71cm" svg:viewBox="0 0 1201 535" svg:d="M88 0c-44 0-88 44-88 88v358c0 45 44 89 88 89h1024c44 0 89-44 89-89v-358c0-44-45-88-89-88zM88 0z">
            <text:p/>
          </draw:path>
          <draw:frame draw:style-name="gr16" draw:text-style-name="P20" draw:layer="layout" svg:width="1.2cm" svg:height="0.534cm" svg:x="10.572cm" svg:y="8.71cm">
            <draw:text-box>
              <text:p text:style-name="P19"><text:span text:style-name="T52">React </text:span></text:p>
            </draw:text-box>
          </draw:frame>
        </draw:g>
        <draw:g draw:style-name="gr13">
          <draw:path draw:style-name="gr18" draw:text-style-name="P21" draw:layer="layout" svg:width="1.1cm" svg:height="0.534cm" svg:x="13.519cm" svg:y="8.71cm" svg:viewBox="0 0 1101 535" svg:d="M88 0c-44 0-88 44-88 88v358c0 45 44 89 88 89h924c44 0 89-44 89-89v-358c0-44-45-88-89-88zM88 0z">
            <text:p/>
          </draw:path>
          <draw:frame draw:style-name="gr15" draw:text-style-name="P20" draw:layer="layout" svg:width="1.1cm" svg:height="0.863cm" svg:x="13.519cm" svg:y="8.71cm">
            <draw:text-box>
              <text:p text:style-name="P19"><text:span text:style-name="T52">Flask </text:span></text:p>
            </draw:text-box>
          </draw:frame>
        </draw:g>
        <draw:frame draw:style-name="gr19" draw:text-style-name="P3" draw:layer="layout" svg:width="2.222cm" svg:height="0.641cm" svg:x="1.27cm" svg:y="8.724cm">
          <draw:text-box>
            <text:p text:style-name="P2"><text:span text:style-name="T53">Software</text:span></text:p>
          </draw:text-box>
        </draw:frame>
        <draw:g draw:style-name="gr13">
          <draw:path draw:style-name="gr18" draw:text-style-name="P21" draw:layer="layout" svg:width="1.2cm" svg:height="0.534cm" svg:x="14.666cm" svg:y="8.71cm" svg:viewBox="0 0 1201 535" svg:d="M88 0c-44 0-88 44-88 88v358c0 45 44 89 88 89h1024c44 0 89-44 89-89v-358c0-44-45-88-89-88zM88 0z">
            <text:p/>
          </draw:path>
          <draw:frame draw:style-name="gr16" draw:text-style-name="P20" draw:layer="layout" svg:width="1.2cm" svg:height="0.534cm" svg:x="14.666cm" svg:y="8.71cm">
            <draw:text-box>
              <text:p text:style-name="P19"><text:span text:style-name="T52">Node </text:span></text:p>
            </draw:text-box>
          </draw:frame>
        </draw:g>
        <draw:frame draw:style-name="gr17" draw:text-style-name="P3" draw:layer="layout" svg:width="2.222cm" svg:height="0.658cm" svg:x="1.27cm" svg:y="9.377cm">
          <draw:text-box>
            <text:p text:style-name="P2"><text:span text:style-name="T53">Systems</text:span></text:p>
          </draw:text-box>
        </draw:frame>
        <draw:g draw:style-name="gr13">
          <draw:path draw:style-name="gr20" draw:text-style-name="P18" draw:layer="layout" svg:width="1.2cm" svg:height="0.534cm" svg:x="9.764cm" svg:y="9.345cm" svg:viewBox="0 0 1201 535" svg:d="M88 0c-44 0-88 44-88 88v358c0 45 44 89 88 89h1024c44 0 89-44 89-89v-358c0-44-45-88-89-88zM88 0z">
            <text:p/>
          </draw:path>
          <draw:frame draw:style-name="gr21" draw:text-style-name="P20" draw:layer="layout" svg:width="1.2cm" svg:height="0.534cm" svg:x="9.764cm" svg:y="9.345cm">
            <draw:text-box>
              <text:p text:style-name="P19"><text:span text:style-name="T52">CI/CD </text:span></text:p>
            </draw:text-box>
          </draw:frame>
        </draw:g>
        <draw:g draw:style-name="gr13">
          <draw:path draw:style-name="gr14" draw:text-style-name="P18" draw:layer="layout" svg:width="1cm" svg:height="0.534cm" svg:x="12.914cm" svg:y="8.059cm" svg:viewBox="0 0 1001 535" svg:d="M88 0c-44 0-88 44-88 88v358c0 45 44 89 88 89h824c44 0 89-44 89-89v-358c0-44-45-88-89-88zM88 0z">
            <text:p/>
          </draw:path>
          <draw:frame draw:style-name="gr16" draw:text-style-name="P20" draw:layer="layout" svg:width="1cm" svg:height="0.534cm" svg:x="12.914cm" svg:y="8.059cm">
            <draw:text-box>
              <text:p text:style-name="P19"><text:span text:style-name="T52">SQL </text:span></text:p>
            </draw:text-box>
          </draw:frame>
        </draw:g>
        <draw:g draw:style-name="gr13">
          <draw:path draw:style-name="gr20" draw:text-style-name="P18" draw:layer="layout" svg:width="1.2cm" svg:height="0.534cm" svg:x="3.572cm" svg:y="9.345cm" svg:viewBox="0 0 1201 535" svg:d="M88 0c-44 0-88 44-88 88v358c0 45 44 89 88 89h1024c44 0 89-44 89-89v-358c0-44-45-88-89-88zM88 0z">
            <text:p/>
          </draw:path>
          <draw:frame draw:style-name="gr21" draw:text-style-name="P20" draw:layer="layout" svg:width="1.2cm" svg:height="0.534cm" svg:x="3.572cm" svg:y="9.345cm">
            <draw:text-box>
              <text:p text:style-name="P19"><text:span text:style-name="T52">Linux </text:span></text:p>
            </draw:text-box>
          </draw:frame>
        </draw:g>
        <draw:g draw:style-name="gr13">
          <draw:path draw:style-name="gr18" draw:text-style-name="P21" draw:layer="layout" svg:width="1.869cm" svg:height="0.534cm" svg:x="3.562cm" svg:y="8.707cm" svg:viewBox="0 0 1870 535" svg:d="M118 0c-59 0-118 44-118 88v358c0 45 59 89 118 89h1633c59 0 119-44 119-89v-358c0-44-60-88-119-88zM118 0z">
            <text:p/>
          </draw:path>
          <draw:frame draw:style-name="gr22" draw:text-style-name="P23" draw:layer="layout" svg:width="1.869cm" svg:height="0.534cm" svg:x="3.562cm" svg:y="8.707cm">
            <draw:text-box>
              <text:p text:style-name="P22"><text:span text:style-name="T52">JavaScript</text:span></text:p>
            </draw:text-box>
          </draw:frame>
        </draw:g>
        <draw:frame draw:style-name="gr23" draw:text-style-name="P25" draw:layer="layout" svg:width="2.443cm" svg:height="1.902cm" svg:x="15.153cm" svg:y="27.646cm">
          <draw:text-box>
            <text:p text:style-name="P24"><text:span text:style-name="T54">Spanish <text:s text:c="2"/></text:span><text:span text:style-name="T55">Native</text:span><text:span text:style-name="T56"> </text:span></text:p>
            <text:p text:style-name="P24"><text:span text:style-name="T54">English <text:s text:c="3"/></text:span><text:span text:style-name="T55">C1</text:span><text:span text:style-name="T56"> </text:span></text:p>
            <text:p text:style-name="P24"><text:span text:style-name="T54">German <text:s/></text:span><text:span text:style-name="T55">C1</text:span><text:span text:style-name="T56"> </text:span></text:p>
          </draw:text-box>
        </draw:frame>
        <draw:g draw:style-name="gr24">
          <draw:g draw:style-name="gr13">
            <draw:path draw:style-name="gr25" draw:text-style-name="P26" draw:layer="layout" svg:width="0.171cm" svg:height="0.177cm" svg:x="17.585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7.585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7.988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7.988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8.383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8.383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8.791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8.791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9.193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9.193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</draw:g>
        <draw:g draw:style-name="gr24">
          <draw:g draw:style-name="gr13">
            <draw:path draw:style-name="gr27" draw:text-style-name="P27" draw:layer="layout" svg:width="0.171cm" svg:height="0.177cm" svg:x="17.585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7.585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7.987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7.987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8.389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8.389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8.791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8.791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9.193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9.193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</draw:g>
        <draw:frame draw:style-name="gr9" draw:text-style-name="P17" draw:layer="layout" svg:width="4.062cm" svg:height="0.971cm" svg:x="15.153cm" svg:y="26.884cm">
          <draw:text-box>
            <text:p text:style-name="P2"><text:span text:style-name="T8">LANGUAGES </text:span></text:p>
          </draw:text-box>
        </draw:frame>
        <draw:frame draw:style-name="gr29" draw:text-style-name="P11" draw:layer="layout" svg:width="13.113cm" svg:height="2.038cm" svg:x="1.292cm" svg:y="27.649cm">
          <draw:text-box>
            <text:list text:style-name="L1">
              <text:list-item>
                <text:p text:style-name="P9"><text:span text:style-name="T14">Mathematics for Data Science Specialization <text:s text:c="2"/></text:span><text:span text:style-name="T14"><text:tab/></text:span><text:span text:style-name="T57">Higher School of Economics <text:s/>- <text:s/>2021</text:span><text:span text:style-name="T14"> </text:span></text:p>
              </text:list-item>
              <text:list-item>
                <text:p text:style-name="P9"><text:span text:style-name="T14">Data Science Professional Certificate</text:span><text:span text:style-name="T14"><text:tab/></text:span><text:span text:style-name="T14"> <text:s text:c="3"/></text:span><text:span text:style-name="T14"><text:tab/></text:span><text:span text:style-name="T57">Harvard <text:s/>- <text:s/>2020</text:span><text:span text:style-name="T14"> </text:span></text:p>
              </text:list-item>
              <text:list-item>
                <text:p text:style-name="P9"><text:span text:style-name="T14">Python Data Science Professional Certificate <text:s/></text:span><text:span text:style-name="T14"><text:tab/></text:span><text:span text:style-name="T57">IBM <text:s/>- 2020</text:span><text:span text:style-name="T14"> </text:span></text:p>
              </text:list-item>
              <text:list-item>
                <text:p text:style-name="P9"><text:span text:style-name="T14">Deep Learning <text:s/>Professional Certificate</text:span><text:span text:style-name="T14"><text:tab/></text:span><text:span text:style-name="T14"> <text:s text:c="3"/></text:span><text:span text:style-name="T14"><text:tab/></text:span><text:span text:style-name="T57">IBM <text:s/>- <text:s/>2020</text:span><text:span text:style-name="T14"> </text:span></text:p>
              </text:list-item>
            </text:list>
          </draw:text-box>
        </draw:frame>
        <draw:frame draw:style-name="gr9" draw:text-style-name="P17" draw:layer="layout" svg:width="6.019cm" svg:height="0.971cm" svg:x="1.26cm" svg:y="26.887cm">
          <draw:text-box>
            <text:p text:style-name="P2"><text:span text:style-name="T8">CERTIFICATIONS </text:span></text:p>
          </draw:text-box>
        </draw:frame>
        <draw:g draw:style-name="gr13">
          <draw:path draw:style-name="gr18" draw:text-style-name="P21" draw:layer="layout" svg:width="2.049cm" svg:height="0.534cm" svg:x="15.92cm" svg:y="8.71cm" svg:viewBox="0 0 2050 535" svg:d="M78 0c-39 0-78 44-78 88v358c0 45 39 89 78 89h1893c39 0 79-44 79-89v-358c0-44-40-88-79-88zM78 0z">
            <text:p/>
          </draw:path>
          <draw:frame draw:style-name="gr15" draw:text-style-name="P20" draw:layer="layout" svg:width="2.049cm" svg:height="0.863cm" svg:x="15.92cm" svg:y="8.71cm">
            <draw:text-box>
              <text:p text:style-name="P19"><text:span text:style-name="T52">Ionic/Tauri</text:span></text:p>
            </draw:text-box>
          </draw:frame>
        </draw:g>
        <draw:g draw:style-name="gr13">
          <draw:path draw:style-name="gr20" draw:text-style-name="P18" draw:layer="layout" svg:width="1.5cm" svg:height="0.534cm" svg:x="4.85cm" svg:y="9.345cm" svg:viewBox="0 0 1501 535" svg:d="M88 0c-44 0-88 44-88 88v358c0 45 44 89 88 89h1325c44 0 88-44 88-89v-358c0-44-44-88-88-88zM88 0z">
            <text:p/>
          </draw:path>
          <draw:frame draw:style-name="gr21" draw:text-style-name="P20" draw:layer="layout" svg:width="1.5cm" svg:height="0.534cm" svg:x="4.85cm" svg:y="9.345cm">
            <draw:text-box>
              <text:p text:style-name="P19"><text:span text:style-name="T52">Docker </text:span></text:p>
            </draw:text-box>
          </draw:frame>
        </draw:g>
        <draw:g draw:style-name="gr24">
          <draw:g draw:style-name="gr13">
            <draw:path draw:style-name="gr25" draw:text-style-name="P26" draw:layer="layout" svg:width="0.169cm" svg:height="0.161cm" svg:x="17.585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7" draw:layer="layout" svg:width="0.169cm" svg:height="0.161cm" svg:x="17.585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  <draw:g draw:style-name="gr13">
            <draw:path draw:style-name="gr25" draw:text-style-name="P26" draw:layer="layout" svg:width="0.169cm" svg:height="0.161cm" svg:x="17.983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7" draw:layer="layout" svg:width="0.169cm" svg:height="0.161cm" svg:x="17.983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  <draw:g draw:style-name="gr13">
            <draw:path draw:style-name="gr25" draw:text-style-name="P26" draw:layer="layout" svg:width="0.169cm" svg:height="0.161cm" svg:x="18.381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7" draw:layer="layout" svg:width="0.169cm" svg:height="0.161cm" svg:x="18.381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  <draw:g draw:style-name="gr13">
            <draw:path draw:style-name="gr30" draw:text-style-name="P28" draw:layer="layout" svg:width="0.187cm" svg:height="0.177cm" svg:x="19.176cm" svg:y="28.704cm" svg:viewBox="0 0 188 178" svg:d="M188 89c0 16-4 31-13 45-8 13-20 25-34 32-14 8-30 12-47 12s-33-4-47-12c-14-7-26-19-34-32-9-14-13-29-13-45s4-31 13-45c8-13 20-25 34-32 14-8 30-12 47-12s33 4 47 12c14 7 26 19 34 32 9 14 13 29 13 45zM188 89z">
              <text:p/>
            </draw:path>
            <draw:path draw:style-name="gr31" draw:text-style-name="P17" draw:layer="layout" svg:width="0.187cm" svg:height="0.177cm" svg:x="19.176cm" svg:y="28.704cm" svg:viewBox="0 0 188 178" svg:d="M188 89c0 16-4 31-13 45-8 13-20 25-34 32-14 8-30 12-47 12s-33-4-47-12c-14-7-26-19-34-32-9-14-13-29-13-45s4-31 13-45c8-13 20-25 34-32 14-8 30-12 47-12s33 4 47 12c14 7 26 19 34 32 9 14 13 29 13 45z">
              <text:p/>
            </draw:path>
          </draw:g>
          <draw:g draw:style-name="gr13">
            <draw:path draw:style-name="gr25" draw:text-style-name="P26" draw:layer="layout" svg:width="0.169cm" svg:height="0.161cm" svg:x="18.778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7" draw:layer="layout" svg:width="0.169cm" svg:height="0.161cm" svg:x="18.778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</draw:g>
        <draw:g draw:style-name="gr13">
          <draw:path draw:style-name="gr20" draw:text-style-name="P18" draw:layer="layout" svg:width="1.016cm" svg:height="0.534cm" svg:x="8.67cm" svg:y="9.345cm" svg:viewBox="0 0 1017 535" svg:d="M88 0c-44 0-88 44-88 88v358c0 45 44 89 88 89h841c44 0 88-44 88-89v-358c0-44-44-88-88-88zM88 0z">
            <text:p/>
          </draw:path>
          <draw:frame draw:style-name="gr21" draw:text-style-name="P20" draw:layer="layout" svg:width="1.016cm" svg:height="0.534cm" svg:x="8.67cm" svg:y="9.345cm">
            <draw:text-box>
              <text:p text:style-name="P19"><text:span text:style-name="T52">AWS </text:span></text:p>
            </draw:text-box>
          </draw:frame>
        </draw:g>
        <draw:g draw:style-name="gr13">
          <draw:path draw:style-name="gr20" draw:text-style-name="P18" draw:layer="layout" svg:width="1.575cm" svg:height="0.534cm" svg:x="15.12cm" svg:y="9.345cm" svg:viewBox="0 0 1576 535" svg:d="M88 0c-44 0-88 44-88 88v358c0 45 44 89 88 89h1399c45 0 89-44 89-89v-358c0-44-44-88-89-88zM88 0z">
            <text:p/>
          </draw:path>
          <draw:frame draw:style-name="gr21" draw:text-style-name="P20" draw:layer="layout" svg:width="1.575cm" svg:height="0.534cm" svg:x="15.12cm" svg:y="9.345cm">
            <draw:text-box>
              <text:p text:style-name="P19"><text:span text:style-name="T52">Arduino </text:span></text:p>
            </draw:text-box>
          </draw:frame>
        </draw:g>
        <draw:g draw:style-name="gr13">
          <draw:path draw:style-name="gr20" draw:text-style-name="P18" draw:layer="layout" svg:width="1.465cm" svg:height="0.534cm" svg:x="11.082cm" svg:y="9.345cm" svg:viewBox="0 0 1466 535" svg:d="M61 0c-30 0-61 44-61 88v358c0 45 31 89 61 89h1343c31 0 62-44 62-89v-358c0-44-31-88-62-88zM61 0z">
            <text:p/>
          </draw:path>
          <draw:frame draw:style-name="gr21" draw:text-style-name="P20" draw:layer="layout" svg:width="1.465cm" svg:height="0.534cm" svg:x="11.082cm" svg:y="9.345cm">
            <draw:text-box>
              <text:p text:style-name="P19"><text:span text:style-name="T52">Grafana</text:span></text:p>
            </draw:text-box>
          </draw:frame>
        </draw:g>
        <draw:g draw:style-name="gr13">
          <draw:path draw:style-name="gr20" draw:text-style-name="P18" draw:layer="layout" svg:width="1.269cm" svg:height="0.534cm" svg:x="12.67cm" svg:y="9.345cm" svg:viewBox="0 0 1270 535" svg:d="M53 0c-26 0-53 44-53 88v358c0 45 27 89 53 89h1163c27 0 54-44 54-89v-358c0-44-27-88-54-88zM53 0z">
            <text:p/>
          </draw:path>
          <draw:frame draw:style-name="gr21" draw:text-style-name="P20" draw:layer="layout" svg:width="1.269cm" svg:height="0.534cm" svg:x="12.67cm" svg:y="9.345cm">
            <draw:text-box>
              <text:p text:style-name="P19"><text:span text:style-name="T52">MQTT</text:span></text:p>
            </draw:text-box>
          </draw:frame>
        </draw:g>
        <draw:g draw:style-name="gr13">
          <draw:path draw:style-name="gr20" draw:text-style-name="P18" draw:layer="layout" svg:width="0.952cm" svg:height="0.534cm" svg:x="14.057cm" svg:y="9.345cm" svg:viewBox="0 0 953 535" svg:d="M40 0c-20 0-40 44-40 88v358c0 45 20 89 40 89h873c20 0 40-44 40-89v-358c0-44-20-88-40-88zM40 0z">
            <text:p/>
          </draw:path>
          <draw:frame draw:style-name="gr21" draw:text-style-name="P20" draw:layer="layout" svg:width="0.952cm" svg:height="0.534cm" svg:x="14.057cm" svg:y="9.345cm">
            <draw:text-box>
              <text:p text:style-name="P19"><text:span text:style-name="T52">PLC</text:span></text:p>
            </draw:text-box>
          </draw:frame>
        </draw:g>
        <draw:g draw:style-name="gr13">
          <draw:path draw:style-name="gr20" draw:text-style-name="P18" draw:layer="layout" svg:width="2.1cm" svg:height="0.534cm" svg:x="6.424cm" svg:y="9.345cm" svg:viewBox="0 0 2101 535" svg:d="M88 0c-44 0-88 44-88 88v358c0 45 44 89 88 89h1924c44 0 89-44 89-89v-358c0-44-45-88-89-88zM88 0z">
            <text:p/>
          </draw:path>
          <draw:frame draw:style-name="gr21" draw:text-style-name="P20" draw:layer="layout" svg:width="2.1cm" svg:height="0.534cm" svg:x="6.424cm" svg:y="9.345cm">
            <draw:text-box>
              <text:p text:style-name="P19"><text:span text:style-name="T52">Kubernetes </text:span></text:p>
            </draw:text-box>
          </draw:frame>
        </draw:g>
        <draw:g draw:style-name="gr13">
          <draw:path draw:style-name="gr18" draw:text-style-name="P21" draw:layer="layout" svg:width="1.904cm" svg:height="0.534cm" svg:x="5.485cm" svg:y="8.707cm" svg:viewBox="0 0 1905 535" svg:d="M120 0c-60 0-120 44-120 88v358c0 45 60 89 120 89h1664c60 0 121-44 121-89v-358c0-44-61-88-121-88zM120 0z">
            <text:p/>
          </draw:path>
          <draw:frame draw:style-name="gr16" draw:text-style-name="P20" draw:layer="layout" svg:width="1.904cm" svg:height="0.534cm" svg:x="5.485cm" svg:y="8.707cm">
            <draw:text-box>
              <text:p text:style-name="P19"><text:span text:style-name="T52">TypeScript</text:span></text:p>
            </draw:text-box>
          </draw:frame>
        </draw:g>
        <draw:g draw:style-name="gr13">
          <draw:path draw:style-name="gr18" draw:text-style-name="P21" draw:layer="layout" svg:width="1.438cm" svg:height="0.534cm" svg:x="7.486cm" svg:y="8.708cm" svg:viewBox="0 0 1439 535" svg:d="M91 0c-46 0-91 44-91 88v358c0 45 45 89 91 89h1256c46 0 92-44 92-89v-358c0-44-46-88-92-88zM91 0z">
            <text:p/>
          </draw:path>
          <draw:frame draw:style-name="gr16" draw:text-style-name="P20" draw:layer="layout" svg:width="1.438cm" svg:height="0.534cm" svg:x="7.486cm" svg:y="8.708cm">
            <draw:text-box>
              <text:p text:style-name="P19"><text:span text:style-name="T52">Python</text:span></text:p>
            </draw:text-box>
          </draw:frame>
        </draw:g>
        <draw:g draw:style-name="gr13">
          <draw:path draw:style-name="gr18" draw:text-style-name="P21" draw:layer="layout" svg:width="0.572cm" svg:height="0.534cm" svg:x="8.987cm" svg:y="8.709cm" svg:viewBox="0 0 573 535" svg:d="M36 0c-18 0-36 44-36 88v358c0 45 18 89 36 89h501c18 0 36-44 36-89v-358c0-44-18-88-36-88zM36 0z">
            <text:p/>
          </draw:path>
          <draw:frame draw:style-name="gr16" draw:text-style-name="P20" draw:layer="layout" svg:width="0.573cm" svg:height="0.534cm" svg:x="8.987cm" svg:y="8.709cm">
            <draw:text-box>
              <text:p text:style-name="P19"><text:span text:style-name="T52">C</text:span></text:p>
            </draw:text-box>
          </draw:frame>
        </draw:g>
        <draw:g draw:style-name="gr13">
          <draw:path draw:style-name="gr18" draw:text-style-name="P21" draw:layer="layout" svg:width="0.823cm" svg:height="0.534cm" svg:x="9.688cm" svg:y="8.71cm" svg:viewBox="0 0 824 535" svg:d="M52 0c-26 0-52 44-52 88v358c0 45 26 89 52 89h720c25 0 52-44 52-89v-358c0-44-27-88-52-88zM52 0z">
            <text:p/>
          </draw:path>
          <draw:frame draw:style-name="gr16" draw:text-style-name="P20" draw:layer="layout" svg:width="0.824cm" svg:height="0.534cm" svg:x="9.688cm" svg:y="8.71cm">
            <draw:text-box>
              <text:p text:style-name="P19"><text:span text:style-name="T52">C++</text:span></text:p>
            </draw:text-box>
          </draw:frame>
        </draw:g>
        <draw:g draw:style-name="gr13">
          <draw:path draw:style-name="gr14" draw:text-style-name="P18" draw:layer="layout" svg:width="0.914cm" svg:height="0.534cm" svg:x="3.527cm" svg:y="8.072cm" svg:viewBox="0 0 915 535" svg:d="M40 0c-20 0-40 44-40 88v358c0 45 20 89 40 89h835c20 0 40-44 40-89v-358c0-44-20-88-40-88zM40 0z">
            <text:p/>
          </draw:path>
          <draw:frame draw:style-name="gr15" draw:text-style-name="P20" draw:layer="layout" svg:width="0.915cm" svg:height="0.863cm" svg:x="3.527cm" svg:y="8.072cm">
            <draw:text-box>
              <text:p text:style-name="P19"><text:span text:style-name="T52">RAG</text:span></text:p>
            </draw:text-box>
          </draw:frame>
        </draw:g>
        <draw:g draw:style-name="gr13">
          <draw:path draw:style-name="gr14" draw:text-style-name="P18" draw:layer="layout" svg:width="1.093cm" svg:height="0.534cm" svg:x="11.101cm" svg:y="8.072cm" svg:viewBox="0 0 1094 535" svg:d="M57 0c-29 0-57 44-57 88v358c0 45 28 89 57 89h980c29 0 57-44 57-89v-358c0-44-28-88-57-88zM57 0z">
            <text:p/>
          </draw:path>
          <draw:frame draw:style-name="gr16" draw:text-style-name="P20" draw:layer="layout" svg:width="1.093cm" svg:height="0.534cm" svg:x="11.101cm" svg:y="8.072cm">
            <draw:text-box>
              <text:p text:style-name="P19"><text:span text:style-name="T52">MCP </text:span></text:p>
            </draw:text-box>
          </draw:frame>
        </draw:g>
        <draw:g draw:style-name="gr13">
          <draw:path draw:style-name="gr14" draw:text-style-name="P18" draw:layer="layout" svg:width="3.244cm" svg:height="0.534cm" svg:x="16.14cm" svg:y="8.073cm" svg:viewBox="0 0 3245 535" svg:d="M190 0c-95 0-190 44-190 88v358c0 45 95 89 190 89h2865c95 0 190-44 190-89v-358c0-44-95-88-190-88zM190 0z">
            <text:p/>
          </draw:path>
          <draw:frame draw:style-name="gr16" draw:text-style-name="P20" draw:layer="layout" svg:width="3.244cm" svg:height="0.534cm" svg:x="16.14cm" svg:y="8.073cm">
            <draw:text-box>
              <text:p text:style-name="P19"><text:span text:style-name="T52">Knowledge Graphs</text:span></text:p>
            </draw:text-box>
          </draw:frame>
        </draw:g>
        <draw:g draw:style-name="gr13">
          <draw:path draw:style-name="gr32" draw:text-style-name="P17" draw:layer="layout" svg:width="1.601cm" svg:height="0.286cm" svg:x="4.447cm" svg:y="25.958cm" svg:viewBox="0 0 1602 287" svg:d="M118 0c-60 0-118 23-118 47v192c0 24 58 48 118 48h1364c60 0 120-24 120-48v-192c0-24-60-47-120-47z">
            <text:p/>
          </draw:path>
          <draw:frame draw:style-name="gr33" draw:text-style-name="P30" draw:layer="layout" svg:width="1.599cm" svg:height="0.873cm" svg:x="4.439cm" svg:y="25.668cm">
            <draw:text-box>
              <text:p text:style-name="P29"><text:span text:style-name="T58">Tensorflow </text:span></text:p>
            </draw:text-box>
          </draw:frame>
        </draw:g>
        <draw:g draw:style-name="gr13">
          <draw:path draw:style-name="gr32" draw:text-style-name="P17" draw:layer="layout" svg:width="1.838cm" svg:height="0.286cm" svg:x="6.148cm" svg:y="25.959cm" svg:viewBox="0 0 1839 287" svg:d="M136 0c-69 0-136 23-136 47v192c0 24 67 48 136 48h1565c69 0 138-24 138-48v-192c0-24-69-47-138-47z">
            <text:p/>
          </draw:path>
          <draw:frame draw:style-name="gr34" draw:text-style-name="P30" draw:layer="layout" svg:width="1.835cm" svg:height="0.873cm" svg:x="6.139cm" svg:y="25.669cm">
            <draw:text-box>
              <text:p text:style-name="P29"><text:span text:style-name="T58">Google Cloud </text:span></text:p>
            </draw:text-box>
          </draw:frame>
        </draw:g>
        <draw:g draw:style-name="gr13">
          <draw:path draw:style-name="gr32" draw:text-style-name="P17" draw:layer="layout" svg:width="0.866cm" svg:height="0.286cm" svg:x="8.143cm" svg:y="25.959cm" svg:viewBox="0 0 867 287" svg:d="M64 0c-32 0-64 23-64 47v192c0 24 32 48 64 48h738c32 0 65-24 65-48v-192c0-24-33-47-65-47z">
            <text:p/>
          </draw:path>
          <draw:frame draw:style-name="gr35" draw:text-style-name="P30" draw:layer="layout" svg:width="0.865cm" svg:height="0.873cm" svg:x="8.139cm" svg:y="25.669cm">
            <draw:text-box>
              <text:p text:style-name="P29"><text:span text:style-name="T58">Flask </text:span></text:p>
            </draw:text-box>
          </draw:frame>
        </draw:g>
        <draw:g draw:style-name="gr13">
          <draw:path draw:style-name="gr32" draw:text-style-name="P17" draw:layer="layout" svg:width="0.742cm" svg:height="0.286cm" svg:x="8.802cm" svg:y="24.62cm" svg:viewBox="0 0 743 287" svg:d="M55 0c-28 0-55 23-55 47v192c0 24 27 48 55 48h633c27 0 55-24 55-48v-192c0-24-28-47-55-47z">
            <text:p/>
          </draw:path>
          <draw:frame draw:style-name="gr36" draw:text-style-name="P30" draw:layer="layout" svg:width="0.742cm" svg:height="0.873cm" svg:x="8.798cm" svg:y="24.33cm">
            <draw:text-box>
              <text:p text:style-name="P29"><text:span text:style-name="T58">AAS </text:span></text:p>
            </draw:text-box>
          </draw:frame>
        </draw:g>
        <draw:g draw:style-name="gr13">
          <draw:path draw:style-name="gr32" draw:text-style-name="P17" draw:layer="layout" svg:width="1.683cm" svg:height="0.286cm" svg:x="9.708cm" svg:y="24.621cm" svg:viewBox="0 0 1684 287" svg:d="M124 0c-63 0-124 23-124 47v192c0 24 61 48 124 48h1434c63 0 126-24 126-48v-192c0-24-63-47-126-47z">
            <text:p/>
          </draw:path>
          <draw:frame draw:style-name="gr37" draw:text-style-name="P30" draw:layer="layout" svg:width="1.682cm" svg:height="1.541cm" svg:x="9.699cm" svg:y="23.997cm">
            <draw:text-box>
              <text:p text:style-name="P29"><text:span text:style-name="T58">Industry 4.0</text:span></text:p>
            </draw:text-box>
          </draw:frame>
        </draw:g>
        <draw:g draw:style-name="gr13">
          <draw:path draw:style-name="gr32" draw:text-style-name="P17" draw:layer="layout" svg:width="0.748cm" svg:height="0.286cm" svg:x="11.504cm" svg:y="24.622cm" svg:viewBox="0 0 749 287" svg:d="M55 0c-28 0-55 23-55 47v192c0 24 27 48 55 48h638c28 0 56-24 56-48v-192c0-24-28-47-56-47z">
            <text:p/>
          </draw:path>
          <draw:frame draw:style-name="gr38" draw:text-style-name="P30" draw:layer="layout" svg:width="0.748cm" svg:height="1.541cm" svg:x="11.5cm" svg:y="23.998cm">
            <draw:text-box>
              <text:p text:style-name="P29"><text:span text:style-name="T58">LLM</text:span></text:p>
            </draw:text-box>
          </draw:frame>
        </draw:g>
        <draw:g draw:style-name="gr24">
          <draw:g draw:style-name="gr13">
            <draw:path draw:style-name="gr39" draw:text-style-name="P31" draw:layer="layout" svg:width="1.35cm" svg:height="0.286cm" svg:x="9.239cm" svg:y="25.98cm" svg:viewBox="0 0 1351 287" svg:d="M100 0c-51 0-100 23-100 47v192c0 24 49 48 100 48h1150c50 0 101-24 101-48v-192c0-24-51-47-101-47z">
              <text:p/>
            </draw:path>
            <draw:frame draw:style-name="gr40" draw:text-style-name="P30" draw:layer="layout" svg:width="1.348cm" svg:height="1.207cm" svg:x="9.232cm" svg:y="25.523cm">
              <draw:text-box>
                <text:p text:style-name="P29"><text:span text:style-name="T59"><text:s text:c="4"/></text:span><text:span text:style-name="T59"><text:a xlink:href="https://github.com/LaloVene/Image-Captioning-Project" xlink:type="simple">Github</text:a></text:span></text:p>
              </draw:text-box>
            </draw:frame>
          </draw:g>
          <draw:frame draw:style-name="gr41" draw:text-style-name="P32" draw:layer="layout" svg:width="0.273cm" svg:height="0.26cm" svg:x="9.302cm" svg:y="25.995cm">
            <draw:image xlink:href="Pictures/100000010000006400000064C10219C4.png" xlink:type="simple" xlink:show="embed" xlink:actuate="onLoad" draw:mime-type="image/png">
              <text:p/>
            </draw:image>
          </draw:frame>
        </draw:g>
        <draw:frame draw:style-name="gr41" draw:text-style-name="P32" draw:layer="layout" svg:width="0.547cm" svg:height="0.547cm" svg:x="10.507cm" svg:y="1.268cm">
          <draw:image xlink:href="Pictures/100000010000006400000064C10219C4.png" xlink:type="simple" xlink:show="embed" xlink:actuate="onLoad" draw:mime-type="image/png">
            <text:p/>
          </draw:image>
        </draw:frame>
        <draw:frame draw:style-name="gr41" draw:text-style-name="P32" draw:layer="layout" svg:width="0.46cm" svg:height="0.46cm" svg:x="10.537cm" svg:y="0.694cm">
          <draw:image xlink:href="Pictures/1000000100000064000000647E7E347F.png" xlink:type="simple" xlink:show="embed" xlink:actuate="onLoad" draw:mime-type="image/png">
            <text:p/>
          </draw:image>
        </draw:frame>
        <draw:frame draw:style-name="gr41" draw:text-style-name="P32" draw:layer="layout" svg:width="0.442cm" svg:height="0.442cm" svg:x="10.565cm" svg:y="0.153cm">
          <draw:image xlink:href="Pictures/100000010000006400000064C40BEBAE.png" xlink:type="simple" xlink:show="embed" xlink:actuate="onLoad" draw:mime-type="image/png">
            <text:p/>
          </draw:image>
        </draw:frame>
        <draw:frame draw:style-name="gr41" draw:text-style-name="P32" draw:layer="layout" svg:width="0.467cm" svg:height="0.467cm" svg:x="14.51cm" svg:y="0.137cm">
          <draw:image xlink:href="Pictures/100000010000006400000064BC6DCE55.png" xlink:type="simple" xlink:show="embed" xlink:actuate="onLoad" draw:mime-type="image/png">
            <text:p/>
          </draw:image>
        </draw:frame>
        <draw:g draw:style-name="gr13">
          <draw:path draw:style-name="gr18" draw:text-style-name="P21" draw:layer="layout" svg:width="1.336cm" svg:height="0.534cm" svg:x="18.024cm" svg:y="8.711cm" svg:viewBox="0 0 1337 535" svg:d="M73 0c-36 0-73 44-73 88v358c0 45 37 89 73 89h1191c36 0 73-44 73-89v-358c0-44-37-88-73-88zM73 0z">
            <text:p/>
          </draw:path>
          <draw:frame draw:style-name="gr16" draw:text-style-name="P20" draw:layer="layout" svg:width="1.336cm" svg:height="0.534cm" svg:x="18.024cm" svg:y="8.711cm">
            <draw:text-box>
              <text:p text:style-name="P19"><text:span text:style-name="T52">Matlab </text:span></text:p>
            </draw:text-box>
          </draw:frame>
        </draw:g>
        <draw:g draw:style-name="gr24">
          <draw:g draw:style-name="gr13">
            <draw:path draw:style-name="gr39" draw:text-style-name="P31" draw:layer="layout" svg:width="1.35cm" svg:height="0.286cm" svg:x="16.83cm" svg:y="23.333cm" svg:viewBox="0 0 1351 287" svg:d="M100 0c-51 0-100 23-100 47v192c0 24 49 48 100 48h1150c50 0 101-24 101-48v-192c0-24-51-47-101-47z">
              <text:p/>
            </draw:path>
            <draw:frame draw:style-name="gr42" draw:text-style-name="P30" draw:layer="layout" svg:width="1.348cm" svg:height="1.207cm" svg:x="16.823cm" svg:y="22.876cm">
              <draw:text-box>
                <text:p text:style-name="P29"><text:span text:style-name="T59"><text:s text:c="4"/></text:span><text:span text:style-name="T59"><text:a xlink:href="https://github.com/LaloVene/vectordrive-route" xlink:type="simple">Github</text:a></text:span></text:p>
              </draw:text-box>
            </draw:frame>
          </draw:g>
          <draw:frame draw:style-name="gr41" draw:text-style-name="P32" draw:layer="layout" svg:width="0.273cm" svg:height="0.26cm" svg:x="16.893cm" svg:y="23.348cm">
            <draw:image xlink:href="Pictures/100000010000006400000064C10219C4.png" xlink:type="simple" xlink:show="embed" xlink:actuate="onLoad" draw:mime-type="image/png">
              <text:p/>
            </draw:image>
          </draw:frame>
        </draw:g>
        <draw:g draw:style-name="gr13">
          <draw:path draw:style-name="gr32" draw:text-style-name="P17" draw:layer="layout" svg:width="1.214cm" svg:height="0.286cm" svg:x="11.838cm" svg:y="23.328cm" svg:viewBox="0 0 1215 287" svg:d="M89 0c-45 0-89 23-89 47v192c0 24 44 48 89 48h1035c45 0 91-24 91-48v-192c0-24-46-47-91-47z">
            <text:p/>
          </draw:path>
          <draw:frame draw:style-name="gr43" draw:text-style-name="P30" draw:layer="layout" svg:width="1.213cm" svg:height="1.541cm" svg:x="11.832cm" svg:y="22.704cm">
            <draw:text-box>
              <text:p text:style-name="P29"><text:span text:style-name="T58">PyTorch</text:span></text:p>
            </draw:text-box>
          </draw:frame>
        </draw:g>
        <draw:g draw:style-name="gr13">
          <draw:path draw:style-name="gr32" draw:text-style-name="P17" draw:layer="layout" svg:width="1.131cm" svg:height="0.286cm" svg:x="13.139cm" svg:y="23.329cm" svg:viewBox="0 0 1132 287" svg:d="M83 0c-42 0-83 23-83 47v192c0 24 41 48 83 48h964c43 0 85-24 85-48v-192c0-24-42-47-85-47z">
            <text:p/>
          </draw:path>
          <draw:frame draw:style-name="gr44" draw:text-style-name="P30" draw:layer="layout" svg:width="1.131cm" svg:height="1.541cm" svg:x="13.133cm" svg:y="22.705cm">
            <draw:text-box>
              <text:p text:style-name="P29"><text:span text:style-name="T58">ResNet</text:span></text:p>
            </draw:text-box>
          </draw:frame>
        </draw:g>
        <draw:g draw:style-name="gr13">
          <draw:path draw:style-name="gr32" draw:text-style-name="P17" draw:layer="layout" svg:width="2.249cm" svg:height="0.286cm" svg:x="14.345cm" svg:y="23.33cm" svg:viewBox="0 0 2250 287" svg:d="M166 0c-84 0-166 23-166 47v192c0 24 82 48 166 48h1916c84 0 168-24 168-48v-192c0-24-84-47-168-47z">
            <text:p/>
          </draw:path>
          <draw:frame draw:style-name="gr45" draw:text-style-name="P30" draw:layer="layout" svg:width="2.248cm" svg:height="1.541cm" svg:x="14.333cm" svg:y="22.706cm">
            <draw:text-box>
              <text:p text:style-name="P29"><text:span text:style-name="T58">Computer Vision</text:span></text:p>
            </draw:text-box>
          </draw:frame>
        </draw:g>
        <draw:frame draw:style-name="gr46" draw:text-style-name="P33" draw:layer="layout" svg:width="2.779cm" svg:height="3.7cm" svg:x="18.059cm" svg:y="0.128cm">
          <draw:image xlink:href="Pictures/100000000000043F000005A7A95B12D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venir Next LT Pro" svg:font-family="'Avenir Next LT Pro'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5f_1" draw:display-name="Bitmap_1" xlink:href="Pictures/100000010000003000000030C27FB9E7.png" xlink:type="simple" xlink:show="embed" xlink:actuate="onLoad"/>
    <draw:fill-image draw:name="Bitmap_5f_5" draw:display-name="Bitmap_5" xlink:href="Pictures/10000000000007C000000A5028CD7EB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01T15:58:14.342682190</dc:date>
    <meta:creation-date>2025-07-18T15:54:30Z</meta:creation-date>
    <meta:generator>LibreOffice/26.2.4.2$Linux_X86_64 LibreOffice_project/620$Build-2</meta:generator>
    <meta:editing-duration>PT2H40M27S</meta:editing-duration>
    <meta:editing-cycles>58</meta:editing-cycles>
    <meta:print-date>2026-06-09T15:23:31.829795023</meta:print-date>
    <meta:printed-by>PDF files</meta:printed-by>
    <meta:document-statistic meta:object-count="200"/>
  </office:meta>
</office:document-meta>
</file>